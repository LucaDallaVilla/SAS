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10.285cm"/>
    </style:style>
    <style:style style:name="Table1.C" style:family="table-column">
      <style:table-column-properties style:column-width="7.2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Standard">
      <style:paragraph-properties fo:margin-left="0.176cm" fo:margin-right="0cm" fo:text-align="left" style:justify-single-word="false" fo:text-indent="0cm" style:auto-text-indent="false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1161a1" officeooo:paragraph-rsid="001161a1"/>
    </style:style>
    <style:style style:name="P1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5" style:family="paragraph" style:parent-style-name="Standard">
      <style:paragraph-properties fo:text-align="left" style:justify-single-word="false"/>
      <style:text-properties fo:background-color="#ffffff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1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3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850b1"/>
    </style:style>
    <style:style style:name="P3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left" style:justify-single-word="false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officeooo:rsid="000e1943"/>
    </style:style>
    <style:style style:name="T4" style:family="text">
      <style:text-properties officeooo:rsid="001320e9"/>
    </style:style>
    <style:style style:name="T5" style:family="text">
      <style:text-properties officeooo:rsid="001161a1"/>
    </style:style>
    <style:style style:name="T6" style:family="text">
      <style:text-properties officeooo:rsid="000c7e60"/>
    </style:style>
    <style:style style:name="T7" style:family="text">
      <style:text-properties officeooo:rsid="000eeca5"/>
    </style:style>
    <style:style style:name="T8" style:family="text">
      <style:text-properties officeooo:rsid="00085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 <text:span text:style-name="T2">Sistema</text:span></text:p>
      <text:p text:style-name="P4">Livello: <text:span text:style-name="T2">Obiettivo Utente</text:span></text:p>
      <text:p text:style-name="P4">Attore primario: <text:span text:style-name="T2">Organizzatore</text:span></text:p>
      <text:p text:style-name="P4">Parti Interessate: <text:span text:style-name="T2">Chef, Personale, Cuoco, Utente</text:span></text:p>
      <text:p text:style-name="P4">Pre-condizioni: <text:span text:style-name="T2">L’utente Organizzatore deve aver fatto l’accesso alla piattaforma<text:line-break/></text:span>Garanzie di successo o post-condizioni: <text:span text:style-name="T2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B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3">A</text:span>ccetta la commessa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1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4" office:value-type="string">
            <text:p text:style-name="P11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B4" office:value-type="string">
            <text:p text:style-name="P13">Se non desidera prenotare preventivamente il personale salta al passo 5</text:p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1">4</text:p>
          </table:table-cell>
          <table:table-cell table:style-name="Table1.B6" office:value-type="string">
            <text:p text:style-name="P14"><text:span text:style-name="T4">Prenota preventivamente</text:span> il personale per <text:span text:style-name="T4">il</text:span><text:span text:style-name="T3"> servizio</text:span></text:p>
          </table:table-cell>
          <table:table-cell table:style-name="Table1.C6" office:value-type="string">
            <text:p text:style-name="P15"/>
          </table:table-cell>
        </table:table-row>
        <table:table-row table:style-name="Table1.1">
          <table:table-cell table:style-name="Table1.A7" office:value-type="string">
            <text:p text:style-name="P16">5</text:p>
          </table:table-cell>
          <table:table-cell table:style-name="Table1.B7" office:value-type="string">
            <text:p text:style-name="P14"><text:span text:style-name="T3">Riceve</text:span> il menù <text:span text:style-name="T4">per il servizio </text:span>dallo chef <text:span text:style-name="T3">e lo approva</text:span></text:p>
          </table:table-cell>
          <table:table-cell table:style-name="Table1.C7" office:value-type="string">
            <text:p text:style-name="P17"/>
          </table:table-cell>
        </table:table-row>
        <table:table-row table:style-name="Table1.1">
          <table:table-cell table:style-name="Table1.A8" office:value-type="string">
            <text:p text:style-name="P18">6</text:p>
          </table:table-cell>
          <table:table-cell table:style-name="Table1.B8" office:value-type="string">
            <text:p text:style-name="P19"><text:span text:style-name="T3">P</text:span>renota il personale <text:span text:style-name="T5">in modo definitivo</text:span> e assegna loro i ruoli. <text:span text:style-name="T3">L</text:span>ibera il personale in eccesso</text:p>
          </table:table-cell>
          <table:table-cell table:style-name="Table1.C8" office:value-type="string">
            <text:p text:style-name="P17"/>
          </table:table-cell>
        </table:table-row>
        <table:table-row table:style-name="Table1.1">
          <table:table-cell table:style-name="Table1.A8" office:value-type="string">
            <text:p text:style-name="P20"/>
          </table:table-cell>
          <table:table-cell table:style-name="Table1.B8" office:value-type="string">
            <text:p text:style-name="P21">Opzionalmente ripete dal punto <text:span text:style-name="T3">4</text:span> <text:span text:style-name="T6">per ogni servizio dell’evento che ne necessita</text:span></text:p>
          </table:table-cell>
          <table:table-cell table:style-name="Table1.C8" office:value-type="string">
            <text:p text:style-name="P17"/>
          </table:table-cell>
        </table:table-row>
        <table:table-row table:style-name="Table1.1">
          <table:table-cell table:style-name="Table1.A10" office:value-type="string">
            <text:p text:style-name="P18">7</text:p>
          </table:table-cell>
          <table:table-cell table:style-name="Table1.B10" office:value-type="string">
            <text:p text:style-name="P22"><text:span text:style-name="T7"><text:s text:c="2"/>S</text:span>ceglie la location e allestisce la sala</text:p>
          </table:table-cell>
          <table:table-cell table:style-name="Table1.C10" office:value-type="string">
            <text:p text:style-name="P15"/>
          </table:table-cell>
        </table:table-row>
        <table:table-row table:style-name="Table1.1">
          <table:table-cell table:style-name="Table1.A11" office:value-type="string">
            <text:p text:style-name="P23">8</text:p>
          </table:table-cell>
          <table:table-cell table:style-name="Table1.B11" office:value-type="string">
            <text:p text:style-name="P24"><text:span text:style-name="T7">Ad evento terminato</text:span> <text:span text:style-name="T7">si </text:span>segna alcune note <text:span text:style-name="T7">e</text:span> salv<text:span text:style-name="T7">a</text:span> i menù usati</text:p>
          </table:table-cell>
          <table:table-cell table:style-name="Table1.C11" office:value-type="string">
            <text:p text:style-name="P15"/>
          </table:table-cell>
        </table:table-row>
        <table:table-row table:style-name="Table1.1">
          <table:table-cell table:style-name="Table1.A12" office:value-type="string">
            <text:p text:style-name="P23"/>
          </table:table-cell>
          <table:table-cell table:style-name="Table1.B12" office:value-type="string">
            <text:p text:style-name="P25">Termina il Caso d’Uso</text:p>
          </table:table-cell>
          <table:table-cell table:style-name="Table1.C12" office:value-type="string">
            <text:p text:style-name="P26"/>
          </table:table-cell>
        </table:table-row>
      </table:table>
      <text:p text:style-name="P27"/>
      <text:p text:style-name="P28"><text:bookmark text:name="_heading=h.tyjcwt"/><text:soft-page-break/></text:p>
      <text:p text:style-name="P28"><text:bookmark text:name="_heading=h.3dy6vkm"/>Estensione <text:span text:style-name="T8">8</text:span>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bookmark text:name="_heading=h.1t3h5sf"/># </text:p>
          </table:table-cell>
          <table:table-cell table:style-name="Table2.B1" office:value-type="string">
            <text:p text:style-name="P7"><text:bookmark text:name="_heading=h.4d34og8"/>Attore</text:p>
          </table:table-cell>
          <table:table-cell table:style-name="Table2.B1" office:value-type="string">
            <text:p text:style-name="P7"><text:bookmark text:name="_heading=h.2s8eyo1"/>Sistema</text:p>
          </table:table-cell>
        </table:table-row>
        <table:table-row table:style-name="Table2.1">
          <table:table-cell table:style-name="Table2.A2" office:value-type="string">
            <text:p text:style-name="P29"><text:bookmark text:name="_heading=h.17dp8vu"/></text:p>
          </table:table-cell>
          <table:table-cell table:style-name="Table2.B2" office:value-type="string">
            <text:p text:style-name="P30">Può modificare l’evento o alcuni suoi servizi</text:p>
          </table:table-cell>
          <table:table-cell table:style-name="Table2.C2" office:value-type="string">
            <text:p text:style-name="P12"/>
          </table:table-cell>
        </table:table-row>
        <table:table-row table:style-name="Table2.1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10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7-09T17:38:31.693190600</dc:date>
    <meta:editing-duration>PT7M58S</meta:editing-duration>
    <meta:editing-cycles>4</meta:editing-cycles>
    <meta:document-statistic meta:table-count="2" meta:image-count="0" meta:object-count="0" meta:page-count="2" meta:paragraph-count="36" meta:word-count="178" meta:character-count="1117" meta:non-whitespace-character-count="971"/>
  </office:meta>
</office:document-meta>
</file>