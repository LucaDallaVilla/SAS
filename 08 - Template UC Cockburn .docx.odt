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nux_Libertine_G_1.ttf" manifest:media-type="application/x-font-ttf"/>
  <manifest:file-entry manifest:full-path="Fonts/Font_Linux_Libertine_G_2.ttf" manifest:media-type="application/x-font-ttf"/>
  <manifest:file-entry manifest:full-path="Fonts/Font_Linux_Libertine_G_3.ttf" manifest:media-type="application/x-font-ttf"/>
  <manifest:file-entry manifest:full-path="Fonts/Font_Linux_Libertine_G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ontdiner Swanky" svg:font-family="'Fontdiner Swanky'" style:font-family-generic="roman" style:font-pitch="variable"/>
    <style:font-face style:name="Fontdiner Swanky1" svg:font-family="'Fontdiner Swanky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56cm" fo:margin-left="0.053cm" fo:margin-top="0cm" fo:margin-bottom="0cm" fo:break-before="page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8.583cm"/>
    </style:style>
    <style:style style:name="Table1.C" style:family="table-column">
      <style:table-column-properties style:column-width="8.9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none" fo:border-top="1pt solid #000000" fo:border-bottom="1pt solid #000000">
        <style:background-image/>
      </style:table-cell-properties>
    </style:style>
    <style:style style:name="Table1.C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2" style:family="table-cell">
      <style:table-cell-properties style:vertical-align="" fo:padding="0.176cm" fo:border-left="none" fo:border-right="none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3" style:family="table-cell">
      <style:table-cell-properties style:vertical-align="" fo:padding="0.176cm" fo:border-left="none" fo:border-right="none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4" style:family="table-cell">
      <style:table-cell-properties style:vertical-align="" fo:padding="0.176cm" fo:border-left="none" fo:border-right="none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5" style:family="table-cell">
      <style:table-cell-properties style:vertical-align="" fo:padding="0.176cm" fo:border-left="none" fo:border-right="none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6" style:family="table-cell">
      <style:table-cell-properties style:vertical-align="" fo:padding="0.176cm" fo:border-left="none" fo:border-right="none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7" style:family="table-cell">
      <style:table-cell-properties style:vertical-align="" fo:padding="0.176cm" fo:border-left="none" fo:border-right="none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8" style:family="table-cell">
      <style:table-cell-properties style:vertical-align="" fo:padding="0.176cm" fo:border-left="none" fo:border-right="none" fo:border-top="none" fo:border-bottom="1pt solid #000000"/>
    </style:style>
    <style:style style:name="Table1.C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9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9" style:family="table-cell">
      <style:table-cell-properties style:vertical-align="" fo:padding="0.176cm" fo:border-left="none" fo:border-right="none" fo:border-top="none" fo:border-bottom="1pt solid #000000"/>
    </style:style>
    <style:style style:name="Table1.C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0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10" style:family="table-cell">
      <style:table-cell-properties style:vertical-align="" fo:padding="0.176cm" fo:border-left="none" fo:border-right="none" fo:border-top="none" fo:border-bottom="1pt solid #000000"/>
    </style:style>
    <style:style style:name="Table1.C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1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11" style:family="table-cell">
      <style:table-cell-properties style:vertical-align="" fo:padding="0.176cm" fo:border-left="none" fo:border-right="none" fo:border-top="none" fo:border-bottom="1pt solid #000000"/>
    </style:style>
    <style:style style:name="Table1.C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" style:family="table">
      <style:table-properties style:width="18.547cm" fo:margin-left="0.053cm" fo:margin-top="0cm" fo:margin-bottom="0cm" table:align="left" style:writing-mode="lr-tb"/>
    </style:style>
    <style:style style:name="Table3.A" style:family="table-column">
      <style:table-column-properties style:column-width="1.903cm"/>
    </style:style>
    <style:style style:name="Table3.B" style:family="table-column">
      <style:table-column-properties style:column-width="8.123cm"/>
    </style:style>
    <style:style style:name="Table3.C" style:family="table-column">
      <style:table-column-properties style:column-width="8.5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" style:family="table">
      <style:table-properties style:width="18.547cm" fo:margin-left="0.053cm" fo:margin-top="0cm" fo:margin-bottom="0cm" table:align="left" style:writing-mode="lr-tb"/>
    </style:style>
    <style:style style:name="Table4.A" style:family="table-column">
      <style:table-column-properties style:column-width="1.903cm"/>
    </style:style>
    <style:style style:name="Table4.B" style:family="table-column">
      <style:table-column-properties style:column-width="8.123cm"/>
    </style:style>
    <style:style style:name="Table4.C" style:family="table-column">
      <style:table-column-properties style:column-width="8.52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" style:family="table">
      <style:table-properties style:width="18.547cm" fo:margin-left="0.053cm" fo:margin-top="0cm" fo:margin-bottom="0cm" table:align="left" style:writing-mode="lr-tb"/>
    </style:style>
    <style:style style:name="Tabella1.A" style:family="table-column">
      <style:table-column-properties style:column-width="1.903cm"/>
    </style:style>
    <style:style style:name="Tabella1.B" style:family="table-column">
      <style:table-column-properties style:column-width="8.123cm"/>
    </style:style>
    <style:style style:name="Tabella1.C" style:family="table-column">
      <style:table-column-properties style:column-width="8.52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" style:family="table">
      <style:table-properties style:width="18.547cm" fo:margin-left="0.053cm" fo:margin-top="0cm" fo:margin-bottom="0cm" table:align="left" style:writing-mode="lr-tb"/>
    </style:style>
    <style:style style:name="Table2.A" style:family="table-column">
      <style:table-column-properties style:column-width="1.903cm"/>
    </style:style>
    <style:style style:name="Table2.B" style:family="table-column">
      <style:table-column-properties style:column-width="8.123cm"/>
    </style:style>
    <style:style style:name="Table2.C" style:family="table-column">
      <style:table-column-properties style:column-width="8.5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" style:family="table">
      <style:table-properties style:width="18.547cm" fo:margin-left="0.053cm" fo:margin-top="0cm" fo:margin-bottom="0cm" table:align="left" style:writing-mode="lr-tb"/>
    </style:style>
    <style:style style:name="Table16.A" style:family="table-column">
      <style:table-column-properties style:column-width="1.903cm"/>
    </style:style>
    <style:style style:name="Table16.B" style:family="table-column">
      <style:table-column-properties style:column-width="8.123cm"/>
    </style:style>
    <style:style style:name="Table16.C" style:family="table-column">
      <style:table-column-properties style:column-width="8.52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6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" style:family="table">
      <style:table-properties style:width="18.547cm" fo:margin-left="0.053cm" fo:margin-top="0cm" fo:margin-bottom="0cm" table:align="left" style:writing-mode="lr-tb"/>
    </style:style>
    <style:style style:name="Table7.A" style:family="table-column">
      <style:table-column-properties style:column-width="1.903cm"/>
    </style:style>
    <style:style style:name="Table7.B" style:family="table-column">
      <style:table-column-properties style:column-width="8.123cm"/>
    </style:style>
    <style:style style:name="Table7.C" style:family="table-column">
      <style:table-column-properties style:column-width="8.52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7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7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053cm" fo:margin-top="0cm" fo:margin-bottom="0cm" table:align="left" style:writing-mode="lr-tb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2" style:family="table">
      <style:table-properties style:width="18.547cm" fo:margin-left="0.053cm" fo:margin-top="0cm" fo:margin-bottom="0cm" table:align="left" style:writing-mode="lr-tb"/>
    </style:style>
    <style:style style:name="Table12.A" style:family="table-column">
      <style:table-column-properties style:column-width="1.903cm"/>
    </style:style>
    <style:style style:name="Table12.B" style:family="table-column">
      <style:table-column-properties style:column-width="8.123cm"/>
    </style:style>
    <style:style style:name="Table12.C" style:family="table-column">
      <style:table-column-properties style:column-width="8.52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5" style:family="table">
      <style:table-properties style:width="18.547cm" fo:margin-left="0.053cm" fo:margin-top="0cm" fo:margin-bottom="0cm" table:align="left" style:writing-mode="lr-tb"/>
    </style:style>
    <style:style style:name="Table5.A" style:family="table-column">
      <style:table-column-properties style:column-width="1.903cm"/>
    </style:style>
    <style:style style:name="Table5.B" style:family="table-column">
      <style:table-column-properties style:column-width="8.123cm"/>
    </style:style>
    <style:style style:name="Table5.C" style:family="table-column">
      <style:table-column-properties style:column-width="8.52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5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6" style:family="table">
      <style:table-properties style:width="18.547cm" fo:margin-left="0.053cm" fo:margin-top="0cm" fo:margin-bottom="0cm" table:align="left" style:writing-mode="lr-tb"/>
    </style:style>
    <style:style style:name="Table6.A" style:family="table-column">
      <style:table-column-properties style:column-width="1.903cm"/>
    </style:style>
    <style:style style:name="Table6.B" style:family="table-column">
      <style:table-column-properties style:column-width="8.123cm"/>
    </style:style>
    <style:style style:name="Table6.C" style:family="table-column">
      <style:table-column-properties style:column-width="8.52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6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" style:family="table">
      <style:table-properties style:width="18.547cm" fo:margin-left="0.053cm" fo:margin-top="0cm" fo:margin-bottom="0cm" table:align="left" style:writing-mode="lr-tb"/>
    </style:style>
    <style:style style:name="Table8.A" style:family="table-column">
      <style:table-column-properties style:column-width="1.903cm"/>
    </style:style>
    <style:style style:name="Table8.B" style:family="table-column">
      <style:table-column-properties style:column-width="7.989cm"/>
    </style:style>
    <style:style style:name="Table8.C" style:family="table-column">
      <style:table-column-properties style:column-width="8.65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8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8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053cm" fo:margin-top="0cm" fo:margin-bottom="0cm" table:align="left" style:writing-mode="lr-tb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7.989cm"/>
    </style:style>
    <style:style style:name="Tabella3.C" style:family="table-column">
      <style:table-column-properties style:column-width="8.655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" style:family="table">
      <style:table-properties style:width="18.547cm" fo:margin-left="0.053cm" fo:margin-top="0cm" fo:margin-bottom="0cm" table:align="left" style:writing-mode="lr-tb"/>
    </style:style>
    <style:style style:name="Table11.A" style:family="table-column">
      <style:table-column-properties style:column-width="1.903cm"/>
    </style:style>
    <style:style style:name="Table11.B" style:family="table-column">
      <style:table-column-properties style:column-width="8.123cm"/>
    </style:style>
    <style:style style:name="Table11.C" style:family="table-column">
      <style:table-column-properties style:column-width="8.52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053cm" fo:margin-top="0cm" fo:margin-bottom="0cm" table:align="left" style:writing-mode="lr-tb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" style:family="table">
      <style:table-properties style:width="18.547cm" fo:margin-left="0.053cm" fo:margin-top="0cm" fo:margin-bottom="0cm" table:align="left" style:writing-mode="lr-tb"/>
    </style:style>
    <style:style style:name="Table10.A" style:family="table-column">
      <style:table-column-properties style:column-width="1.903cm"/>
    </style:style>
    <style:style style:name="Table10.B" style:family="table-column">
      <style:table-column-properties style:column-width="8.123cm"/>
    </style:style>
    <style:style style:name="Table10.C" style:family="table-column">
      <style:table-column-properties style:column-width="8.52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0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0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" style:family="table">
      <style:table-properties style:width="18.547cm" fo:margin-left="0.053cm" fo:margin-top="0cm" fo:margin-bottom="0cm" table:align="left" style:writing-mode="lr-tb"/>
    </style:style>
    <style:style style:name="Table13.A" style:family="table-column">
      <style:table-column-properties style:column-width="1.903cm"/>
    </style:style>
    <style:style style:name="Table13.B" style:family="table-column">
      <style:table-column-properties style:column-width="8.123cm"/>
    </style:style>
    <style:style style:name="Table13.C" style:family="table-column">
      <style:table-column-properties style:column-width="8.52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" style:family="table">
      <style:table-properties style:width="18.547cm" fo:margin-left="0.053cm" fo:margin-top="0cm" fo:margin-bottom="0cm" table:align="left" style:writing-mode="lr-tb"/>
    </style:style>
    <style:style style:name="Table14.A" style:family="table-column">
      <style:table-column-properties style:column-width="1.903cm"/>
    </style:style>
    <style:style style:name="Table14.B" style:family="table-column">
      <style:table-column-properties style:column-width="8.123cm"/>
    </style:style>
    <style:style style:name="Table14.C" style:family="table-column">
      <style:table-column-properties style:column-width="8.52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" style:family="table">
      <style:table-properties style:width="18.547cm" fo:margin-left="0.053cm" fo:margin-top="0cm" fo:margin-bottom="0cm" table:align="left" style:writing-mode="lr-tb"/>
    </style:style>
    <style:style style:name="Table15.A" style:family="table-column">
      <style:table-column-properties style:column-width="1.903cm"/>
    </style:style>
    <style:style style:name="Table15.B" style:family="table-column">
      <style:table-column-properties style:column-width="8.123cm"/>
    </style:style>
    <style:style style:name="Table15.C" style:family="table-column">
      <style:table-column-properties style:column-width="8.52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C3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Title" style:master-page-name="Standard">
      <style:paragraph-properties fo:text-align="left" style:justify-single-word="false" style:page-number="1" fo:break-before="auto" fo:break-after="auto" fo:padding="0cm" fo:border="none"/>
      <style:text-properties style:font-name="Fontdiner Swanky" officeooo:rsid="00038f7a" officeooo:paragraph-rsid="00038f7a" style:font-name-asian="Fontdiner Swanky1" style:font-name-complex="Fontdiner Swanky1"/>
    </style:style>
    <style:style style:name="P2" style:family="paragraph" style:parent-style-name="Heading_20_1">
      <style:paragraph-properties fo:text-align="left" style:justify-single-word="false" fo:break-before="auto" fo:break-after="auto" fo:padding="0cm" fo:border="none"/>
    </style:style>
    <style:style style:name="P3" style:family="paragraph" style:parent-style-name="Standard">
      <style:paragraph-properties fo:text-align="left" style:justify-single-word="false" fo:break-before="auto" fo:break-after="auto" fo:padding="0cm" fo:border="none"/>
    </style:style>
    <style:style style:name="P4" style:family="paragraph" style:parent-style-name="Standard">
      <style:paragraph-properties fo:text-align="left" style:justify-single-word="false" fo:break-before="auto" fo:break-after="auto" fo:padding="0cm" fo:border="none"/>
      <style:text-properties fo:font-weight="bold" style:font-weight-asian="bold" style:font-weight-complex="bold"/>
    </style:style>
    <style:style style:name="P5" style:family="paragraph" style:parent-style-name="Heading_20_1">
      <style:paragraph-properties fo:text-align="left" style:justify-single-word="false" fo:break-before="auto" fo:break-after="auto"/>
    </style:style>
    <style:style style:name="P6" style:family="paragraph" style:parent-style-name="Heading_20_2">
      <style:paragraph-properties fo:margin-top="0cm" fo:margin-bottom="0cm" style:contextual-spacing="false" fo:line-height="100%" fo:text-align="left" style:justify-single-word="false"/>
    </style:style>
    <style:style style:name="P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38f7a" officeooo:paragraph-rsid="00038f7a"/>
    </style:style>
    <style:style style:name="P9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3a9d9" officeooo:paragraph-rsid="0003a9d9"/>
    </style:style>
    <style:style style:name="P10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3a9d9" officeooo:paragraph-rsid="0003a9d9"/>
    </style:style>
    <style:style style:name="P1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3a9d9" officeooo:paragraph-rsid="0003a9d9"/>
    </style:style>
    <style:style style:name="P12" style:family="paragraph" style:parent-style-name="Standard">
      <style:paragraph-properties fo:text-align="left" style:justify-single-word="false"/>
    </style:style>
    <style:style style:name="P13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54409" officeooo:paragraph-rsid="00054409" fo:background-color="#ffffff"/>
    </style:style>
    <style:style style:name="P14" style:family="paragraph" style:parent-style-name="Standard">
      <style:paragraph-properties fo:text-align="left" style:justify-single-word="false"/>
      <style:text-properties fo:background-color="#ffffff"/>
    </style:style>
    <style:style style:name="P1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54409" officeooo:paragraph-rsid="00054409"/>
    </style:style>
    <style:style style:name="P1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66daa" officeooo:paragraph-rsid="00066daa"/>
    </style:style>
    <style:style style:name="P17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54409" officeooo:paragraph-rsid="000e1943" fo:background-color="#ffffff"/>
    </style:style>
    <style:style style:name="P18" style:family="paragraph" style:parent-style-name="Standard">
      <style:paragraph-properties fo:margin-left="0cm" fo:margin-right="0cm" fo:text-align="left" style:justify-single-word="false" fo:text-indent="0cm" style:auto-text-indent="false"/>
      <style:text-properties fo:background-color="#ffffff"/>
    </style:style>
    <style:style style:name="P1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eeca5" officeooo:paragraph-rsid="000eeca5"/>
    </style:style>
    <style:style style:name="P20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a9079" officeooo:paragraph-rsid="000a9079" fo:background-color="#ffffff"/>
    </style:style>
    <style:style style:name="P21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fo:background-color="#ffffff"/>
    </style:style>
    <style:style style:name="P22" style:family="paragraph" style:parent-style-name="Standard">
      <style:paragraph-properties fo:text-align="left" style:justify-single-word="false"/>
      <style:text-properties officeooo:rsid="000850b1" officeooo:paragraph-rsid="000850b1" fo:background-color="#ffffff"/>
    </style:style>
    <style:style style:name="P2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850b1" officeooo:paragraph-rsid="000850b1"/>
    </style:style>
    <style:style style:name="P24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850b1" officeooo:paragraph-rsid="000eeca5"/>
    </style:style>
    <style:style style:name="P25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eeca5" officeooo:paragraph-rsid="000eeca5"/>
    </style:style>
    <style:style style:name="P26" style:family="paragraph" style:parent-style-name="Standard">
      <style:paragraph-properties fo:text-align="left" style:justify-single-word="false"/>
      <style:text-properties officeooo:paragraph-rsid="000850b1" fo:background-color="#ffffff"/>
    </style:style>
    <style:style style:name="P27" style:family="paragraph" style:parent-style-name="Standard">
      <style:paragraph-properties fo:text-align="left" style:justify-single-word="false" fo:break-before="auto" fo:break-after="auto"/>
      <style:text-properties officeooo:paragraph-rsid="000850b1"/>
    </style:style>
    <style:style style:name="P28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</style:style>
    <style:style style:name="P29" style:family="paragraph" style:parent-style-name="Standard">
      <style:paragraph-properties fo:margin-top="0.706cm" fo:margin-bottom="0cm" style:contextual-spacing="false" fo:line-height="100%" fo:text-align="left" style:justify-single-word="false"/>
    </style:style>
    <style:style style:name="P30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c4640"/>
    </style:style>
    <style:style style:name="P31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c4640"/>
    </style:style>
    <style:style style:name="P32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c4640"/>
    </style:style>
    <style:style style:name="P3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c4640"/>
    </style:style>
    <style:style style:name="P3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1c4640"/>
    </style:style>
    <style:style style:name="P35" style:family="paragraph" style:parent-style-name="Standard">
      <style:paragraph-properties fo:text-align="left" style:justify-single-word="false"/>
      <style:text-properties officeooo:rsid="0021d79d" officeooo:paragraph-rsid="0021d79d"/>
    </style:style>
    <style:style style:name="P36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c4640"/>
    </style:style>
    <style:style style:name="P37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c4640"/>
    </style:style>
    <style:style style:name="P38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3829b"/>
    </style:style>
    <style:style style:name="P39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3829b"/>
    </style:style>
    <style:style style:name="P40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3829b"/>
    </style:style>
    <style:style style:name="P4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3829b"/>
    </style:style>
    <style:style style:name="P4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17be6b"/>
    </style:style>
    <style:style style:name="P4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622b" officeooo:paragraph-rsid="002a622b"/>
    </style:style>
    <style:style style:name="P44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4b720a"/>
    </style:style>
    <style:style style:name="P45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4b720a"/>
    </style:style>
    <style:style style:name="P46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4b720a"/>
    </style:style>
    <style:style style:name="P4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4b720a"/>
    </style:style>
    <style:style style:name="P48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4b720a"/>
    </style:style>
    <style:style style:name="P49" style:family="paragraph" style:parent-style-name="Standard">
      <style:text-properties officeooo:paragraph-rsid="004b720a"/>
    </style:style>
    <style:style style:name="P50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4b720a" officeooo:paragraph-rsid="004b720a"/>
    </style:style>
    <style:style style:name="P5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417f9e" officeooo:paragraph-rsid="004b720a"/>
    </style:style>
    <style:style style:name="P52" style:family="paragraph" style:parent-style-name="Standard">
      <style:paragraph-properties fo:text-align="left" style:justify-single-word="false"/>
      <style:text-properties officeooo:rsid="0021d79d" officeooo:paragraph-rsid="004b720a"/>
    </style:style>
    <style:style style:name="P5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622b" officeooo:paragraph-rsid="004b720a"/>
    </style:style>
    <style:style style:name="P54" style:family="paragraph" style:parent-style-name="Standard">
      <style:text-properties officeooo:rsid="003b7454" officeooo:paragraph-rsid="003b7454"/>
    </style:style>
    <style:style style:name="P55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3b7454"/>
    </style:style>
    <style:style style:name="P56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3b7454"/>
    </style:style>
    <style:style style:name="P5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3b7454"/>
    </style:style>
    <style:style style:name="P5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3b7454"/>
    </style:style>
    <style:style style:name="P5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3b7454"/>
    </style:style>
    <style:style style:name="P60" style:family="paragraph" style:parent-style-name="Standard">
      <style:text-properties officeooo:paragraph-rsid="003b7454"/>
    </style:style>
    <style:style style:name="P6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417f9e"/>
    </style:style>
    <style:style style:name="P6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417f9e" officeooo:paragraph-rsid="00417f9e"/>
    </style:style>
    <style:style style:name="P63" style:family="paragraph" style:parent-style-name="Standard">
      <style:text-properties officeooo:rsid="00467c57" officeooo:paragraph-rsid="004864ae"/>
    </style:style>
    <style:style style:name="P64" style:family="paragraph" style:parent-style-name="Standard">
      <style:paragraph-properties fo:margin-top="0.706cm" fo:margin-bottom="0cm" style:contextual-spacing="false" fo:line-height="100%" fo:text-align="left" style:justify-single-word="false"/>
      <style:text-properties fo:color="#00615e" loext:opacity="100%" style:font-name="Bitter" fo:font-size="18pt" fo:font-weight="bold" officeooo:paragraph-rsid="0017be6b" style:font-name-asian="Bitter1" style:font-size-asian="18pt" style:font-weight-asian="bold" style:font-name-complex="Bitter1" style:font-size-complex="18pt"/>
    </style:style>
    <style:style style:name="P65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7be6b"/>
    </style:style>
    <style:style style:name="P66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7be6b"/>
    </style:style>
    <style:style style:name="P6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7be6b"/>
    </style:style>
    <style:style style:name="P68" style:family="paragraph" style:parent-style-name="Standard">
      <style:text-properties officeooo:paragraph-rsid="0023cde6"/>
    </style:style>
    <style:style style:name="P6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b133" officeooo:paragraph-rsid="002ab133"/>
    </style:style>
    <style:style style:name="P70" style:family="paragraph" style:parent-style-name="Standard">
      <style:paragraph-properties fo:margin-top="0.706cm" fo:margin-bottom="0cm" style:contextual-spacing="false" fo:line-height="100%" fo:text-align="left" style:justify-single-word="false"/>
      <style:text-properties fo:color="#00615e" loext:opacity="100%" style:font-name="Bitter" fo:font-size="18pt" fo:font-weight="bold" officeooo:paragraph-rsid="004bb174" style:font-name-asian="Bitter1" style:font-size-asian="18pt" style:font-weight-asian="bold" style:font-name-complex="Bitter1" style:font-size-complex="18pt"/>
    </style:style>
    <style:style style:name="P71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4bb174"/>
    </style:style>
    <style:style style:name="P72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4bb174"/>
    </style:style>
    <style:style style:name="P7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4bb174"/>
    </style:style>
    <style:style style:name="P7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4bb174"/>
    </style:style>
    <style:style style:name="P75" style:family="paragraph" style:parent-style-name="Text_20_body">
      <style:text-properties officeooo:paragraph-rsid="004bb174"/>
    </style:style>
    <style:style style:name="P7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4bb174" officeooo:paragraph-rsid="004bb174"/>
    </style:style>
    <style:style style:name="P77" style:family="paragraph" style:parent-style-name="Text_20_body">
      <style:paragraph-properties fo:margin-left="0cm" fo:margin-right="0cm" fo:text-align="left" style:justify-single-word="false" fo:text-indent="0cm" style:auto-text-indent="false"/>
      <style:text-properties officeooo:rsid="0013829b" officeooo:paragraph-rsid="004bb174"/>
    </style:style>
    <style:style style:name="P78" style:family="paragraph" style:parent-style-name="Standard">
      <style:text-properties officeooo:paragraph-rsid="004bb174"/>
    </style:style>
    <style:style style:name="P7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b133" officeooo:paragraph-rsid="004bb174"/>
    </style:style>
    <style:style style:name="P80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32cb85"/>
    </style:style>
    <style:style style:name="P81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32cb85"/>
    </style:style>
    <style:style style:name="P82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32cb85"/>
    </style:style>
    <style:style style:name="P8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32cb85"/>
    </style:style>
    <style:style style:name="P8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2cb85" officeooo:paragraph-rsid="0032cb85"/>
    </style:style>
    <style:style style:name="P85" style:family="paragraph" style:parent-style-name="Standard">
      <style:text-properties officeooo:rsid="0034170c" officeooo:paragraph-rsid="0034170c"/>
    </style:style>
    <style:style style:name="P86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4e212"/>
    </style:style>
    <style:style style:name="P87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4e212"/>
    </style:style>
    <style:style style:name="P88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4e212"/>
    </style:style>
    <style:style style:name="P8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4e212" officeooo:paragraph-rsid="0014e212"/>
    </style:style>
    <style:style style:name="P90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4e212" officeooo:paragraph-rsid="0014e212"/>
    </style:style>
    <style:style style:name="P91" style:family="paragraph" style:parent-style-name="Standard">
      <style:paragraph-properties fo:text-align="left" style:justify-single-word="false"/>
      <style:text-properties officeooo:paragraph-rsid="0014e212"/>
    </style:style>
    <style:style style:name="P92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4e212"/>
    </style:style>
    <style:style style:name="P9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79f69" officeooo:paragraph-rsid="00179f69"/>
    </style:style>
    <style:style style:name="P94" style:family="paragraph" style:parent-style-name="Standard">
      <style:paragraph-properties fo:text-align="left" style:justify-single-word="false"/>
      <style:text-properties officeooo:rsid="0023cde6" officeooo:paragraph-rsid="0023cde6"/>
    </style:style>
    <style:style style:name="P95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9aa5f"/>
    </style:style>
    <style:style style:name="P96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9aa5f"/>
    </style:style>
    <style:style style:name="P9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9aa5f"/>
    </style:style>
    <style:style style:name="P9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19aa5f"/>
    </style:style>
    <style:style style:name="P9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19aa5f"/>
    </style:style>
    <style:style style:name="P100" style:family="paragraph" style:parent-style-name="Standard">
      <style:paragraph-properties fo:text-align="left" style:justify-single-word="false"/>
      <style:text-properties officeooo:rsid="00253203" officeooo:paragraph-rsid="00253203"/>
    </style:style>
    <style:style style:name="P10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368ce5" officeooo:paragraph-rsid="00368ce5"/>
    </style:style>
    <style:style style:name="P10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73623" officeooo:paragraph-rsid="00273623"/>
    </style:style>
    <style:style style:name="P10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9aa5f"/>
    </style:style>
    <style:style style:name="P10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273623"/>
    </style:style>
    <style:style style:name="P105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9aa5f"/>
    </style:style>
    <style:style style:name="P106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4bb174"/>
    </style:style>
    <style:style style:name="P10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4bb174"/>
    </style:style>
    <style:style style:name="P108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4bb174"/>
    </style:style>
    <style:style style:name="P109" style:family="paragraph" style:parent-style-name="Text_20_body">
      <style:paragraph-properties fo:text-align="left" style:justify-single-word="false"/>
      <style:text-properties officeooo:rsid="00253203" officeooo:paragraph-rsid="004bb174"/>
    </style:style>
    <style:style style:name="P110" style:family="paragraph" style:parent-style-name="Standard">
      <style:paragraph-properties fo:text-align="left" style:justify-single-word="false"/>
      <style:text-properties officeooo:rsid="00253203" officeooo:paragraph-rsid="004bb174"/>
    </style:style>
    <style:style style:name="P11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368ce5" officeooo:paragraph-rsid="004bb174"/>
    </style:style>
    <style:style style:name="P11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73623" officeooo:paragraph-rsid="004bb174"/>
    </style:style>
    <style:style style:name="P113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4bb174"/>
    </style:style>
    <style:style style:name="P114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4bb174"/>
    </style:style>
    <style:style style:name="P115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23cde6"/>
    </style:style>
    <style:style style:name="P116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23cde6"/>
    </style:style>
    <style:style style:name="P11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23cde6"/>
    </style:style>
    <style:style style:name="P118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23cde6"/>
    </style:style>
    <style:style style:name="P119" style:family="paragraph" style:parent-style-name="Standard">
      <style:paragraph-properties fo:text-align="left" style:justify-single-word="false"/>
      <style:text-properties officeooo:rsid="00253203" officeooo:paragraph-rsid="00273623"/>
    </style:style>
    <style:style style:name="P120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23cde6"/>
    </style:style>
    <style:style style:name="P12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1b08f" officeooo:paragraph-rsid="0031b08f"/>
    </style:style>
    <style:style style:name="P12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1b08f" officeooo:paragraph-rsid="004bb174"/>
    </style:style>
    <style:style style:name="P123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b2f1d"/>
    </style:style>
    <style:style style:name="P124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b2f1d"/>
    </style:style>
    <style:style style:name="P125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b2f1d"/>
    </style:style>
    <style:style style:name="P12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b2f1d"/>
    </style:style>
    <style:style style:name="P12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b2f1d" officeooo:paragraph-rsid="001b2f1d"/>
    </style:style>
    <style:style style:name="P128" style:family="paragraph" style:parent-style-name="Standard">
      <style:paragraph-properties fo:text-align="left" style:justify-single-word="false"/>
      <style:text-properties officeooo:rsid="004bb174" officeooo:paragraph-rsid="004e1256"/>
    </style:style>
    <style:style style:name="P12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b2f1d"/>
    </style:style>
    <style:style style:name="P130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b2f1d"/>
    </style:style>
    <style:style style:name="P131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b2f1d"/>
    </style:style>
    <style:style style:name="P132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d127e"/>
    </style:style>
    <style:style style:name="P133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d127e"/>
    </style:style>
    <style:style style:name="P134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d127e"/>
    </style:style>
    <style:style style:name="P13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d127e"/>
    </style:style>
    <style:style style:name="P136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d4cbb" officeooo:paragraph-rsid="001d4cbb"/>
    </style:style>
    <style:style style:name="P137" style:family="paragraph" style:parent-style-name="Standard">
      <style:paragraph-properties fo:text-align="left" style:justify-single-word="false"/>
      <style:text-properties officeooo:rsid="004c8e1a" officeooo:paragraph-rsid="004c8e1a"/>
    </style:style>
    <style:style style:name="P13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d127e"/>
    </style:style>
    <style:style style:name="P13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d127e"/>
    </style:style>
    <style:style style:name="P140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d127e"/>
    </style:style>
    <style:style style:name="P141" style:family="paragraph" style:parent-style-name="Standard">
      <style:paragraph-properties fo:text-align="left" style:justify-single-word="false"/>
      <style:text-properties officeooo:paragraph-rsid="001d127e"/>
    </style:style>
    <style:style style:name="P142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d4cbb"/>
    </style:style>
    <style:style style:name="P143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d4cbb"/>
    </style:style>
    <style:style style:name="P144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d4cbb"/>
    </style:style>
    <style:style style:name="P14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d4cbb"/>
    </style:style>
    <style:style style:name="P14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d4cbb"/>
    </style:style>
    <style:style style:name="P14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d4cbb"/>
    </style:style>
    <style:style style:name="P148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d4cbb"/>
    </style:style>
    <style:style style:name="P149" style:family="paragraph" style:parent-style-name="Standard">
      <style:paragraph-properties fo:text-align="left" style:justify-single-word="false"/>
      <style:text-properties officeooo:paragraph-rsid="001d4cbb"/>
    </style:style>
    <style:style style:name="P150" style:family="paragraph" style:parent-style-name="Standard">
      <style:paragraph-properties fo:text-align="left" style:justify-single-word="false"/>
      <style:text-properties officeooo:rsid="00179f69" officeooo:paragraph-rsid="001d4c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8f7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f7a" style:font-weight-asian="normal" style:font-weight-complex="normal"/>
    </style:style>
    <style:style style:name="T5" style:family="text">
      <style:text-properties fo:font-weight="normal" officeooo:rsid="00292b0d" style:font-weight-asian="normal" style:font-weight-complex="normal"/>
    </style:style>
    <style:style style:name="T6" style:family="text">
      <style:text-properties fo:font-weight="normal" officeooo:rsid="004b720a" style:font-weight-asian="normal" style:font-weight-complex="normal"/>
    </style:style>
    <style:style style:name="T7" style:family="text">
      <style:text-properties officeooo:rsid="000e1943"/>
    </style:style>
    <style:style style:name="T8" style:family="text">
      <style:text-properties officeooo:rsid="001ef407"/>
    </style:style>
    <style:style style:name="T9" style:family="text">
      <style:text-properties officeooo:rsid="0031ff13"/>
    </style:style>
    <style:style style:name="T10" style:family="text">
      <style:text-properties officeooo:rsid="001320e9"/>
    </style:style>
    <style:style style:name="T11" style:family="text">
      <style:text-properties officeooo:rsid="001161a1"/>
    </style:style>
    <style:style style:name="T12" style:family="text">
      <style:text-properties officeooo:rsid="001fff60"/>
    </style:style>
    <style:style style:name="T13" style:family="text">
      <style:text-properties officeooo:rsid="000c7e60"/>
    </style:style>
    <style:style style:name="T14" style:family="text">
      <style:text-properties officeooo:rsid="000eeca5"/>
    </style:style>
    <style:style style:name="T15" style:family="text">
      <style:text-properties officeooo:rsid="004fa883"/>
    </style:style>
    <style:style style:name="T16" style:family="text">
      <style:text-properties fo:color="#00615e" loext:opacity="100%" style:font-name="Bitter" fo:font-size="18pt" fo:font-weight="bold" officeooo:rsid="0015b19b" style:font-name-asian="Bitter1" style:font-size-asian="18pt" style:font-weight-asian="bold" style:font-name-complex="Bitter1" style:font-size-complex="18pt"/>
    </style:style>
    <style:style style:name="T17" style:family="text">
      <style:text-properties officeooo:rsid="0015b19b"/>
    </style:style>
    <style:style style:name="T18" style:family="text">
      <style:text-properties officeooo:rsid="0013829b"/>
    </style:style>
    <style:style style:name="T19" style:family="text">
      <style:text-properties style:text-position="0% 100%" officeooo:rsid="00159f37"/>
    </style:style>
    <style:style style:name="T20" style:family="text">
      <style:text-properties officeooo:rsid="00159f37"/>
    </style:style>
    <style:style style:name="T21" style:family="text">
      <style:text-properties officeooo:rsid="0017be6b"/>
    </style:style>
    <style:style style:name="T22" style:family="text">
      <style:text-properties officeooo:rsid="00185d98"/>
    </style:style>
    <style:style style:name="T23" style:family="text">
      <style:text-properties officeooo:rsid="0003a9d9"/>
    </style:style>
    <style:style style:name="T24" style:family="text">
      <style:text-properties officeooo:rsid="004b720a"/>
    </style:style>
    <style:style style:name="T25" style:family="text">
      <style:text-properties style:text-position="0% 100%" officeooo:rsid="004b720a"/>
    </style:style>
    <style:style style:name="T26" style:family="text">
      <style:text-properties officeooo:rsid="003fb947"/>
    </style:style>
    <style:style style:name="T27" style:family="text">
      <style:text-properties officeooo:rsid="00423db6"/>
    </style:style>
    <style:style style:name="T28" style:family="text">
      <style:text-properties officeooo:rsid="00149524"/>
    </style:style>
    <style:style style:name="T29" style:family="text">
      <style:text-properties officeooo:rsid="003b7454"/>
    </style:style>
    <style:style style:name="T30" style:family="text">
      <style:text-properties officeooo:rsid="003d62ea"/>
    </style:style>
    <style:style style:name="T31" style:family="text">
      <style:text-properties officeooo:rsid="003d98f4"/>
    </style:style>
    <style:style style:name="T32" style:family="text">
      <style:text-properties officeooo:rsid="00417f9e"/>
    </style:style>
    <style:style style:name="T33" style:family="text">
      <style:text-properties officeooo:rsid="004864ae"/>
    </style:style>
    <style:style style:name="T34" style:family="text">
      <style:text-properties officeooo:rsid="0046c001"/>
    </style:style>
    <style:style style:name="T35" style:family="text">
      <style:text-properties officeooo:rsid="0023cde6"/>
    </style:style>
    <style:style style:name="T36" style:family="text">
      <style:text-properties officeooo:rsid="004bb174"/>
    </style:style>
    <style:style style:name="T37" style:family="text">
      <style:text-properties officeooo:rsid="0032cb85"/>
    </style:style>
    <style:style style:name="T38" style:family="text">
      <style:text-properties officeooo:rsid="0014e212"/>
    </style:style>
    <style:style style:name="T39" style:family="text">
      <style:text-properties style:text-position="0% 100%" officeooo:rsid="0014e212"/>
    </style:style>
    <style:style style:name="T40" style:family="text">
      <style:text-properties officeooo:rsid="002e3c8d"/>
    </style:style>
    <style:style style:name="T41" style:family="text">
      <style:text-properties officeooo:rsid="00179f69"/>
    </style:style>
    <style:style style:name="T42" style:family="text">
      <style:text-properties officeooo:rsid="0019aa5f"/>
    </style:style>
    <style:style style:name="T43" style:family="text">
      <style:text-properties officeooo:rsid="0027330c"/>
    </style:style>
    <style:style style:name="T44" style:family="text">
      <style:text-properties officeooo:rsid="00273623"/>
    </style:style>
    <style:style style:name="T45" style:family="text">
      <style:text-properties style:text-position="0% 100%" officeooo:rsid="004bb174"/>
    </style:style>
    <style:style style:name="T46" style:family="text">
      <style:text-properties style:text-position="0% 100%" officeooo:rsid="0023cde6"/>
    </style:style>
    <style:style style:name="T47" style:family="text">
      <style:text-properties officeooo:rsid="0026d615"/>
    </style:style>
    <style:style style:name="T48" style:family="text">
      <style:text-properties fo:color="#e16173" loext:opacity="100%" officeooo:rsid="001b2f1d"/>
    </style:style>
    <style:style style:name="T49" style:family="text">
      <style:text-properties fo:color="#e16173" loext:opacity="100%"/>
    </style:style>
    <style:style style:name="T50" style:family="text">
      <style:text-properties fo:color="#e16173" loext:opacity="100%" officeooo:rsid="001d127e"/>
    </style:style>
    <style:style style:name="T51" style:family="text">
      <style:text-properties officeooo:rsid="001b2f1d"/>
    </style:style>
    <style:style style:name="T52" style:family="text">
      <style:text-properties officeooo:rsid="001d127e"/>
    </style:style>
    <style:style style:name="T53" style:family="text">
      <style:text-properties fo:color="#e16173" loext:opacity="100%" officeooo:rsid="001d4cbb"/>
    </style:style>
    <style:style style:name="T54" style:family="text">
      <style:text-properties officeooo:rsid="001d4c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re gli Eventi</text:p>
      <text:p text:style-name="P2"><text:bookmark text:name="_heading=h.30j0zll"/>Informazioni generali</text:p>
      <text:p text:style-name="P3"><text:span text:style-name="T1">Nome caso d’uso</text:span>: <text:span text:style-name="T2">Gestire gli Eventi</text:span></text:p>
      <text:p text:style-name="P4">Portata:<text:span text:style-name="T3"> </text:span><text:span text:style-name="T4">Sistema</text:span></text:p>
      <text:p text:style-name="P4">Livello: <text:span text:style-name="T4">Obiettivo Utente</text:span></text:p>
      <text:p text:style-name="P4">Attore primario: <text:span text:style-name="T4">Organizzatore</text:span></text:p>
      <text:p text:style-name="P4">Parti Interessate: <text:span text:style-name="T4">Chef, Personale, Cuoco, </text:span><text:span text:style-name="T5">Cliente</text:span></text:p>
      <text:p text:style-name="P4">Pre-condizioni: <text:span text:style-name="T4">L’</text:span><text:span text:style-name="T6">attore deve essere autenticato come </text:span><text:span text:style-name="T4">Organizzatore </text:span><text:span text:style-name="T6">e</text:span><text:span text:style-name="T4"> deve aver fatto l’accesso alla piattaforma</text:span><text:span text:style-name="T2"><text:line-break/></text:span>Garanzie di successo o post-condizioni: <text:span text:style-name="T4">L’evento o gli eventi sono creati con successo, i compiti sono distribuiti tra tutto il personale, l’evento viene chiuso</text:span></text:p>
      <text:p text:style-name="P5"><text:bookmark text:name="_heading=h.1fob9te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bookmark text:name="_heading=h.3znysh7"/># </text:p>
          </table:table-cell>
          <table:table-cell table:style-name="Table1.B1" office:value-type="string">
            <text:p text:style-name="P7">Attore</text:p>
          </table:table-cell>
          <table:table-cell table:style-name="Table1.C1" office:value-type="string">
            <text:p text:style-name="P7">Sistema</text:p>
          </table:table-cell>
        </table:table-row>
        <table:table-row table:style-name="Table1.1">
          <table:table-cell table:style-name="Table1.A2" office:value-type="string">
            <text:p text:style-name="P8"><text:bookmark text:name="_heading=h.2et92p0"/>1</text:p>
          </table:table-cell>
          <table:table-cell table:style-name="Table1.B2" office:value-type="string">
            <text:p text:style-name="P9"><text:span text:style-name="T7">A</text:span>ccetta la commessa</text:p>
          </table:table-cell>
          <table:table-cell table:style-name="Table1.C2" office:value-type="string">
            <text:p text:style-name="Standard">Registra l'accettazione, genera un ID univoco per il nuovo evento e predispone l'apertura di una nuova scheda evento nello stato "In compilazione".</text:p>
            <text:p text:style-name="Standard">Invia una notifica di presa in carico al cliente.</text:p>
          </table:table-cell>
        </table:table-row>
        <table:table-row table:style-name="Table1.1">
          <table:table-cell table:style-name="Table1.A3" office:value-type="string">
            <text:p text:style-name="P10">2</text:p>
          </table:table-cell>
          <table:table-cell table:style-name="Table1.B3" office:value-type="string">
            <text:p text:style-name="P9">Compila la scheda del nuovo evento</text:p>
          </table:table-cell>
          <table:table-cell table:style-name="Table1.C3" office:value-type="string">
            <text:p text:style-name="P11">Valida la correttezza formale e la coerenza di <text:span text:style-name="T8">tutti i</text:span> dati inseriti (es. date, numero di ospiti, tipologia di servizio, <text:span text:style-name="T9">ricorrenza</text:span>).</text:p>
            <text:p text:style-name="Standard">Salva la scheda a database e aggiorna lo stato dell'evento in "Da assegnare".</text:p>
          </table:table-cell>
        </table:table-row>
        <table:table-row table:style-name="Table1.1">
          <table:table-cell table:style-name="Table1.A4" office:value-type="string">
            <text:p text:style-name="P10">3</text:p>
          </table:table-cell>
          <table:table-cell table:style-name="Table1.B4" office:value-type="string">
            <text:p text:style-name="P9">Assegna uno chef all’evento</text:p>
          </table:table-cell>
          <table:table-cell table:style-name="Table1.C4" office:value-type="string">
            <text:p text:style-name="P12">Associa il profilo dello Chef selezionato alla scheda evento e aggiorna lo stato in "Chef Assegnato".</text:p>
            <text:p text:style-name="P12">Invia una notifica allo Chef con il riepilogo delle specifiche dell'evento e la richiesta di elaborazione del menù.</text:p>
          </table:table-cell>
        </table:table-row>
        <table:table-row table:style-name="Table1.1">
          <table:table-cell table:style-name="Table1.A5" office:value-type="string">
            <text:p text:style-name="P10">4</text:p>
          </table:table-cell>
          <table:table-cell table:style-name="Table1.B5" office:value-type="string">
            <text:p text:style-name="P13"><text:span text:style-name="T10">Prenota preventivamente</text:span> il personale per <text:span text:style-name="T10">il</text:span><text:span text:style-name="T7"> servizio</text:span></text:p>
          </table:table-cell>
          <table:table-cell table:style-name="Table1.C5" office:value-type="string">
            <text:p text:style-name="P14">Verifica la disponibilità preliminare delle risorse a calendario.</text:p>
            <text:p text:style-name="P14">Riserva temporaneamente le risorse selezionate per le date dell'evento.</text:p>
          </table:table-cell>
        </table:table-row>
        <table:table-row table:style-name="Table1.1">
          <table:table-cell table:style-name="Table1.A6" office:value-type="string">
            <text:p text:style-name="P15">5</text:p>
          </table:table-cell>
          <table:table-cell table:style-name="Table1.B6" office:value-type="string">
            <text:p text:style-name="P13"><text:span text:style-name="T7">Riceve</text:span> il menù <text:span text:style-name="T10">per il servizio </text:span>dallo chef <text:span text:style-name="T7">e lo approva</text:span></text:p>
          </table:table-cell>
          <table:table-cell table:style-name="Table1.C6" office:value-type="string">
            <text:p text:style-name="Standard">Salva il menù approvato, vincola gli ingredienti/piatti all'evento e cambia lo stato in "<text:span text:style-name="T8">Evento in corso</text:span>".</text:p>
          </table:table-cell>
        </table:table-row>
        <table:table-row table:style-name="Table1.1">
          <table:table-cell table:style-name="Table1.A7" office:value-type="string">
            <text:p text:style-name="P16">6</text:p>
          </table:table-cell>
          <table:table-cell table:style-name="Table1.B7" office:value-type="string">
            <text:p text:style-name="P17"><text:span text:style-name="T7">P</text:span>renota il personale <text:span text:style-name="T11">in modo definitivo</text:span> e assegna loro i ruoli. <text:span text:style-name="T7">L</text:span>ibera il personale in eccesso</text:p>
          </table:table-cell>
          <table:table-cell table:style-name="Table1.C7" office:value-type="string">
            <text:p text:style-name="P18">Converte la riserva temporanea del personale confermato in impegno definitivo a calendario, registrando i ruoli operativi specificat<text:span text:style-name="T12">i.</text:span></text:p>
            <text:p text:style-name="P18">Rimuove l'impegno dal calendario per le risorse prenotate in eccesso non confermate, rendendole nuovamente disponibili.</text:p>
            <text:p text:style-name="P18">Invia notifica di conferma e dettaglio ruolo allo staff assegnato.</text:p>
          </table:table-cell>
        </table:table-row>
        <table:table-row table:style-name="Table1.1">
          <table:table-cell table:style-name="Table1.A7" office:value-type="string">
            <text:p text:style-name="P19"/>
          </table:table-cell>
          <table:table-cell table:style-name="Table1.B7" office:value-type="string">
            <text:p text:style-name="P20">Opzionalmente ripete dal punto <text:span text:style-name="T7">4</text:span> <text:span text:style-name="T13">per ogni servizio dell’evento che ne necessita</text:span></text:p>
          </table:table-cell>
          <table:table-cell table:style-name="Table1.C7" office:value-type="string">
            <text:p text:style-name="P21"/>
          </table:table-cell>
        </table:table-row>
        <table:table-row table:style-name="Table1.1">
          <table:table-cell table:style-name="Table1.A9" office:value-type="string">
            <text:p text:style-name="P16">7</text:p>
          </table:table-cell>
          <table:table-cell table:style-name="Table1.B9" office:value-type="string">
            <text:p text:style-name="P22"><text:span text:style-name="T14"><text:s text:c="2"/>S</text:span>ceglie la location e allestisce la sala</text:p>
          </table:table-cell>
          <table:table-cell table:style-name="Table1.C9" office:value-type="string">
            <text:p text:style-name="P14">Registra l'indirizzo e i dettagli logistici della location definitiva sulla scheda evento.</text:p>
            <text:p text:style-name="P14">Genera l'elenco delle attrezzature necessarie per l'allestimento sala.</text:p>
          </table:table-cell>
        </table:table-row>
        <table:table-row table:style-name="Table1.1">
          <table:table-cell table:style-name="Table1.A10" office:value-type="string">
            <text:p text:style-name="P23">8</text:p>
          </table:table-cell>
          <table:table-cell table:style-name="Table1.B10" office:value-type="string">
            <text:p text:style-name="P24"><text:span text:style-name="T15">Opzionalmente, a</text:span><text:span text:style-name="T14">d evento terminato</text:span> <text:span text:style-name="T14">si </text:span>segna alcune note <text:span text:style-name="T14">e</text:span> salv<text:span text:style-name="T14">a</text:span> i menù usati</text:p>
          </table:table-cell>
          <table:table-cell table:style-name="Table1.C10" office:value-type="string">
            <text:p text:style-name="P14">Salva e archivia in modo permanente le note conclusive di fine servizio a storico.</text:p>
            <text:p text:style-name="P14">Storicizza definitivamente il menù effettivamente <text:soft-page-break/>servito.</text:p>
            <text:p text:style-name="Standard">Aggiorna lo stato della commessa in "Evento Chiuso", segna i compiti come completati e libera definitivamente lo staff.</text:p>
          </table:table-cell>
        </table:table-row>
        <table:table-row table:style-name="Table1.1">
          <table:table-cell table:style-name="Table1.A11" office:value-type="string">
            <text:p text:style-name="P23"/>
          </table:table-cell>
          <table:table-cell table:style-name="Table1.B11" office:value-type="string">
            <text:p text:style-name="P25">Termina il Caso d’Uso</text:p>
          </table:table-cell>
          <table:table-cell table:style-name="Table1.C11" office:value-type="string">
            <text:p text:style-name="P26"/>
          </table:table-cell>
        </table:table-row>
      </table:table>
      <text:p text:style-name="P27"/>
      <text:p text:style-name="P28"/>
      <text:p text:style-name="P29"/>
      <text:p text:style-name="P29"/>
      <text:p text:style-name="P29"/>
      <text:p text:style-name="P30"><text:span text:style-name="T16">Estensione 1a</text:span>: <text:span text:style-name="T17">rifiuto della commessa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<text:bookmark text:name="_heading=h.1t3h5sf Copy 1"/># </text:p>
          </table:table-cell>
          <table:table-cell table:style-name="Table3.B1" office:value-type="string">
            <text:p text:style-name="P32"><text:bookmark text:name="_heading=h.4d34og8 Copy 1"/>Attore</text:p>
          </table:table-cell>
          <table:table-cell table:style-name="Table3.B1" office:value-type="string">
            <text:p text:style-name="P32"><text:bookmark text:name="_heading=h.2s8eyo1 Copy 1"/>Sistema</text:p>
          </table:table-cell>
        </table:table-row>
        <table:table-row table:style-name="Table3.1">
          <table:table-cell table:style-name="Table3.A2" office:value-type="string">
            <text:p text:style-name="P33"><text:bookmark text:name="_heading=h.17dp8vu Copy 1"/>1a.1</text:p>
          </table:table-cell>
          <table:table-cell table:style-name="Table3.B2" office:value-type="string">
            <text:p text:style-name="P34">Non accetta la commessa</text:p>
          </table:table-cell>
          <table:table-cell table:style-name="Table3.C2" office:value-type="string">
            <text:p text:style-name="P35">Invia una notifica di rifiuto commessa al cliente</text:p>
          </table:table-cell>
        </table:table-row>
        <table:table-row table:style-name="Table3.1">
          <table:table-cell table:style-name="Table3.A3" office:value-type="string">
            <text:p text:style-name="P33"/>
          </table:table-cell>
          <table:table-cell table:style-name="Table3.B3" office:value-type="string">
            <text:p text:style-name="P36">Termina il Caso d’Uso</text:p>
          </table:table-cell>
          <table:table-cell table:style-name="Table3.C3" office:value-type="string">
            <text:p text:style-name="P37"/>
          </table:table-cell>
        </table:table-row>
      </table:table>
      <text:p text:style-name="P38"><text:bookmark text:name="_heading=h.3dy6vkm Copy 1 Copy 1"/>Estensione <text:span text:style-name="T18">2</text:span><text:span text:style-name="T19">a</text:span><text:span text:style-name="T18">: </text:span><text:span text:style-name="T20">modifica </text:span><text:span text:style-name="T21">evento</text:span><text:span text:style-name="T20"> prima dell’inizio dei lavori </text:span><text:span text:style-name="T22">(fino a punto 4 incluso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9"><text:bookmark text:name="_heading=h.1t3h5sf Copy 1 Copy 1"/># </text:p>
          </table:table-cell>
          <table:table-cell table:style-name="Table4.B1" office:value-type="string">
            <text:p text:style-name="P40"><text:bookmark text:name="_heading=h.4d34og8 Copy 1 Copy 1"/>Attore</text:p>
          </table:table-cell>
          <table:table-cell table:style-name="Table4.B1" office:value-type="string">
            <text:p text:style-name="P40"><text:bookmark text:name="_heading=h.2s8eyo1 Copy 1 Copy 1"/>Sistema</text:p>
          </table:table-cell>
        </table:table-row>
        <table:table-row table:style-name="Table4.1">
          <table:table-cell table:style-name="Table4.A2" office:value-type="string">
            <text:p text:style-name="P41">2a.1</text:p>
          </table:table-cell>
          <table:table-cell table:style-name="Table4.B2" office:value-type="string">
            <text:p text:style-name="P42">Modifica un<text:span text:style-name="T17"> </text:span><text:span text:style-name="T21">evento</text:span> già esistente</text:p>
          </table:table-cell>
          <table:table-cell table:style-name="Table4.C2" office:value-type="string">
            <text:p text:style-name="P35"><text:span text:style-name="T23">Valida la correttezza formale e la coerenza di </text:span><text:span text:style-name="T8">tutti i</text:span><text:span text:style-name="T23"> dati inseriti (es. date, numero di ospiti, tipologia di servizio).</text:span></text:p>
            <text:p text:style-name="P35">Salva a database le modiche effettuate sull’evento esistente</text:p>
          </table:table-cell>
        </table:table-row>
        <table:table-row table:style-name="Table4.1">
          <table:table-cell table:style-name="Table4.A3" office:value-type="string">
            <text:p text:style-name="P41"/>
          </table:table-cell>
          <table:table-cell table:style-name="Table4.B3" office:value-type="string">
            <text:p text:style-name="P43">Riprende da dove si era interrotto</text:p>
          </table:table-cell>
          <table:table-cell table:style-name="Table4.C3" office:value-type="string">
            <text:p text:style-name="P35"/>
          </table:table-cell>
        </table:table-row>
      </table:table>
      <text:p text:style-name="P44"><text:bookmark text:name="Copia _heading=h.3dy6vkm Copy 1 Copy 1 1"/><text:soft-page-break/>Estensione <text:span text:style-name="T18">2</text:span><text:span text:style-name="T24">a</text:span><text:span text:style-name="T19">.</text:span><text:span text:style-name="T25">1a</text:span><text:span text:style-name="T18">: </text:span><text:span text:style-name="T20">modifica </text:span><text:span text:style-name="T21">evento </text:span><text:span text:style-name="T24">ricorrente</text:span><text:span text:style-name="T20"> prima dell’inizio dei lavori </text:span><text:span text:style-name="T22">(fino a punto 4 incluso)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45"><text:bookmark text:name="Copia _heading=h.1t3h5sf Copy 1 Copy 1 1"/># </text:p>
          </table:table-cell>
          <table:table-cell table:style-name="Tabella1.B1" office:value-type="string">
            <text:p text:style-name="P46"><text:bookmark text:name="Copia _heading=h.4d34og8 Copy 1 Copy 1 1"/>Attore</text:p>
          </table:table-cell>
          <table:table-cell table:style-name="Tabella1.B1" office:value-type="string">
            <text:p text:style-name="P46"><text:bookmark text:name="Copia _heading=h.2s8eyo1 Copy 1 Copy 1 1"/>Sistema</text:p>
          </table:table-cell>
        </table:table-row>
        <table:table-row table:style-name="Tabella1.1">
          <table:table-cell table:style-name="Tabella1.A2" office:value-type="string">
            <text:p text:style-name="P47">2a.1<text:span text:style-name="T24">a.1</text:span></text:p>
          </table:table-cell>
          <table:table-cell table:style-name="Tabella1.B2" office:value-type="string">
            <text:p text:style-name="P48">Modifica un<text:span text:style-name="T17"> </text:span><text:span text:style-name="T21">evento</text:span> già esistente</text:p>
          </table:table-cell>
          <table:table-cell table:style-name="Tabella1.C2" office:value-type="string">
            <text:p text:style-name="P49"><text:span text:style-name="T26">C</text:span>hiede se si vuole <text:span text:style-name="T24">modificare</text:span> una sola o tutte le istanze.</text:p>
          </table:table-cell>
        </table:table-row>
        <table:table-row table:style-name="Tabella1.1">
          <table:table-cell table:style-name="Tabella1.A2" office:value-type="string">
            <text:p text:style-name="P50">2a.1a.2</text:p>
          </table:table-cell>
          <table:table-cell table:style-name="Tabella1.B2" office:value-type="string">
            <text:p text:style-name="P51">Sceglie se <text:span text:style-name="T24">modificare</text:span> un solo evento o tutt<text:span text:style-name="T27">e le instanze.</text:span></text:p>
          </table:table-cell>
          <table:table-cell table:style-name="Tabella1.C2" office:value-type="string">
            <text:p text:style-name="P52"><text:span text:style-name="T23">Valida la correttezza formale e la coerenza di </text:span><text:span text:style-name="T8">tutti i</text:span><text:span text:style-name="T23"> dati inseriti (es. date, numero di ospiti, tipologia di servizio).</text:span></text:p>
            <text:p text:style-name="P52">Salva a database le modiche effettuate sull’evento esistente</text:p>
          </table:table-cell>
        </table:table-row>
        <table:table-row table:style-name="Tabella1.1">
          <table:table-cell table:style-name="Tabella1.A4" office:value-type="string">
            <text:p text:style-name="P47"/>
          </table:table-cell>
          <table:table-cell table:style-name="Tabella1.B4" office:value-type="string">
            <text:p text:style-name="P53">Riprende da dove si era interrotto</text:p>
          </table:table-cell>
          <table:table-cell table:style-name="Tabella1.C4" office:value-type="string">
            <text:p text:style-name="P52"/>
          </table:table-cell>
        </table:table-row>
      </table:table>
      <text:p text:style-name="P38"><text:bookmark text:name="_heading=h.3dy6vkm Copy 1 Copy 1 Copy 1"/>Estensione 2<text:span text:style-name="T18">b: </text:span><text:span text:style-name="T17">eliminazione di un </text:span><text:span text:style-name="T21">event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9"><text:bookmark text:name="_heading=h.1t3h5sf Copy 1 Copy 1 Copy 2"/># </text:p>
          </table:table-cell>
          <table:table-cell table:style-name="Table2.B1" office:value-type="string">
            <text:p text:style-name="P40"><text:bookmark text:name="_heading=h.4d34og8 Copy 1 Copy 1 Copy 2"/>Attore</text:p>
          </table:table-cell>
          <table:table-cell table:style-name="Table2.B1" office:value-type="string">
            <text:p text:style-name="P40"><text:bookmark text:name="_heading=h.2s8eyo1 Copy 1 Copy 1 Copy 2"/>Sistema</text:p>
          </table:table-cell>
        </table:table-row>
        <table:table-row table:style-name="Table2.1">
          <table:table-cell table:style-name="Table2.A2" office:value-type="string">
            <text:p text:style-name="P41">2b.<text:span text:style-name="T28">1</text:span></text:p>
          </table:table-cell>
          <table:table-cell table:style-name="Table2.B2" office:value-type="string">
            <text:p text:style-name="P42"><text:span text:style-name="T28">Elimina</text:span> un<text:span text:style-name="T17"> </text:span><text:span text:style-name="T21">evento</text:span> già esistente</text:p>
          </table:table-cell>
          <table:table-cell table:style-name="Table2.C2" office:value-type="string">
            <text:p text:style-name="P54">Rimuove l’evento dal database.</text:p>
          </table:table-cell>
        </table:table-row>
      </table:table>
      <text:p text:style-name="P55"><text:bookmark text:name="_heading=h.3dy6vkm Copy 1 Copy 1 Copy 1 Copy 4"/>Estensione 2<text:span text:style-name="T18">b.</text:span><text:span text:style-name="T29">1a</text:span><text:span text:style-name="T18">: </text:span><text:span text:style-name="T17">eliminazione di un </text:span><text:span text:style-name="T21">evento </text:span><text:span text:style-name="T30">ricorrente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56"><text:bookmark text:name="_heading=h.1t3h5sf Copy 1 Copy 1 Copy 2 Copy 5"/># </text:p>
          </table:table-cell>
          <table:table-cell table:style-name="Table16.B1" office:value-type="string">
            <text:p text:style-name="P57"><text:bookmark text:name="_heading=h.4d34og8 Copy 1 Copy 1 Copy 2 Copy 5"/>Attore</text:p>
          </table:table-cell>
          <table:table-cell table:style-name="Table16.B1" office:value-type="string">
            <text:p text:style-name="P57"><text:bookmark text:name="_heading=h.2s8eyo1 Copy 1 Copy 1 Copy 2 Copy 5"/>Sistema</text:p>
          </table:table-cell>
        </table:table-row>
        <table:table-row table:style-name="Table16.1">
          <table:table-cell table:style-name="Table16.A2" office:value-type="string">
            <text:p text:style-name="P58">2b.<text:span text:style-name="T28">1</text:span><text:span text:style-name="T29">a.</text:span><text:span text:style-name="T30">1</text:span></text:p>
          </table:table-cell>
          <table:table-cell table:style-name="Table16.B2" office:value-type="string">
            <text:p text:style-name="P59"><text:span text:style-name="T28">Elimina</text:span> un<text:span text:style-name="T17"> </text:span><text:span text:style-name="T21">evento</text:span> <text:span text:style-name="T31">ricorrente </text:span>già esistente</text:p>
          </table:table-cell>
          <table:table-cell table:style-name="Table16.C2" office:value-type="string">
            <text:p text:style-name="P60"><text:span text:style-name="T26">C</text:span>hiede se si vuole eliminare una sola o tutte le istanze.</text:p>
          </table:table-cell>
        </table:table-row>
        <table:table-row table:style-name="Table16.1">
          <table:table-cell table:style-name="Table16.A3" office:value-type="string">
            <text:p text:style-name="P61">2b.<text:span text:style-name="T28">1</text:span><text:span text:style-name="T29">a.</text:span><text:span text:style-name="T32">2</text:span></text:p>
          </table:table-cell>
          <table:table-cell table:style-name="Table16.B3" office:value-type="string">
            <text:p text:style-name="P62">Sceglie se eliminare un solo evento o tutt<text:span text:style-name="T27">e le instanze.</text:span></text:p>
          </table:table-cell>
          <table:table-cell table:style-name="Table16.C3" office:value-type="string">
            <text:p text:style-name="P63">Elimina <text:span text:style-name="T33">l’</text:span>/gli event<text:span text:style-name="T34">o/</text:span>i in base alla scelta.</text:p>
          </table:table-cell>
        </table:table-row>
      </table:table>
      <text:p text:style-name="P64">Estensione 2c: anullamento di un evento esistente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5"><text:bookmark text:name="_heading=h.1t3h5sf Copy 1 Copy 1 Copy 2 Copy 4"/># </text:p>
          </table:table-cell>
          <table:table-cell table:style-name="Table7.B1" office:value-type="string">
            <text:p text:style-name="P66"><text:bookmark text:name="_heading=h.4d34og8 Copy 1 Copy 1 Copy 2 Copy 4"/>Attore</text:p>
          </table:table-cell>
          <table:table-cell table:style-name="Table7.B1" office:value-type="string">
            <text:p text:style-name="P66"><text:bookmark text:name="_heading=h.2s8eyo1 Copy 1 Copy 1 Copy 2 Copy 4"/>Sistema</text:p>
          </table:table-cell>
        </table:table-row>
        <table:table-row table:style-name="Table7.1">
          <table:table-cell table:style-name="Table7.A2" office:value-type="string">
            <text:p text:style-name="P67">2<text:span text:style-name="T21">c.</text:span><text:span text:style-name="T28">1</text:span></text:p>
          </table:table-cell>
          <table:table-cell table:style-name="Table7.B2" office:value-type="string">
            <text:p text:style-name="P42"><text:span text:style-name="T21">Anulla</text:span> un<text:span text:style-name="T17"> </text:span><text:span text:style-name="T21">evento</text:span> già esistente</text:p>
          </table:table-cell>
          <table:table-cell table:style-name="Table7.C2" office:value-type="string">
            <text:p text:style-name="P68"><text:span text:style-name="T35">Modifica</text:span> la scheda a database aggiorna<text:span text:style-name="T35">ndo</text:span> lo stato dell'evento in "<text:span text:style-name="T35">Annullato</text:span>".</text:p>
          </table:table-cell>
        </table:table-row>
        <table:table-row table:style-name="Table7.1">
          <table:table-cell table:style-name="Table7.A3" office:value-type="string">
            <text:p text:style-name="P67"/>
          </table:table-cell>
          <table:table-cell table:style-name="Table7.B3" office:value-type="string">
            <text:p text:style-name="P69">Termina il caso d’uso</text:p>
          </table:table-cell>
          <table:table-cell table:style-name="Table7.C3" office:value-type="string">
            <text:p text:style-name="P68"/>
          </table:table-cell>
        </table:table-row>
      </table:table>
      <text:p text:style-name="P70"/>
      <text:p text:style-name="P70"/>
      <text:p text:style-name="P70"/>
      <text:p text:style-name="P70"><text:soft-page-break/>Estensione 2c.<text:span text:style-name="T36">1a</text:span>: anullamento di un evento <text:span text:style-name="T36">ricorrente</text:span> esistente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71"><text:bookmark text:name="Copia _heading=h.1t3h5sf Copy 1 Copy 1 Copy 2 Copy 4 1"/># </text:p>
          </table:table-cell>
          <table:table-cell table:style-name="Tabella2.B1" office:value-type="string">
            <text:p text:style-name="P72"><text:bookmark text:name="Copia _heading=h.4d34og8 Copy 1 Copy 1 Copy 2 Copy 4 1"/>Attore</text:p>
          </table:table-cell>
          <table:table-cell table:style-name="Tabella2.B1" office:value-type="string">
            <text:p text:style-name="P72"><text:bookmark text:name="Copia _heading=h.2s8eyo1 Copy 1 Copy 1 Copy 2 Copy 4 1"/>Sistema</text:p>
          </table:table-cell>
        </table:table-row>
        <table:table-row table:style-name="Tabella2.1">
          <table:table-cell table:style-name="Tabella2.A2" office:value-type="string">
            <text:p text:style-name="P73">2<text:span text:style-name="T21">c.</text:span><text:span text:style-name="T28">1</text:span><text:span text:style-name="T36">a.1</text:span></text:p>
          </table:table-cell>
          <table:table-cell table:style-name="Tabella2.B2" office:value-type="string">
            <text:p text:style-name="P74"><text:span text:style-name="T21">Anulla</text:span> un<text:span text:style-name="T17"> </text:span><text:span text:style-name="T21">evento</text:span> già esistente</text:p>
          </table:table-cell>
          <table:table-cell table:style-name="Tabella2.C2" office:value-type="string">
            <text:p text:style-name="P75">Chiede se si vuole <text:span text:style-name="T36">annullare</text:span> una sola o tutte le istanze.</text:p>
          </table:table-cell>
        </table:table-row>
        <table:table-row table:style-name="Tabella2.1">
          <table:table-cell table:style-name="Tabella2.A2" office:value-type="string">
            <text:p text:style-name="P76">2c.1a.2</text:p>
          </table:table-cell>
          <table:table-cell table:style-name="Tabella2.B2" office:value-type="string">
            <text:p text:style-name="P77">Sceglie se <text:span text:style-name="T36">annullare</text:span> un solo evento o tutte le instanze.</text:p>
          </table:table-cell>
          <table:table-cell table:style-name="Tabella2.C2" office:value-type="string">
            <text:p text:style-name="P78"><text:span text:style-name="T35">Modifica</text:span> la scheda a database aggiorna<text:span text:style-name="T35">ndo</text:span> lo stato dell'evento in "<text:span text:style-name="T35">Annullato</text:span>".</text:p>
          </table:table-cell>
        </table:table-row>
        <table:table-row table:style-name="Tabella2.1">
          <table:table-cell table:style-name="Tabella2.A4" office:value-type="string">
            <text:p text:style-name="P73"/>
          </table:table-cell>
          <table:table-cell table:style-name="Tabella2.B4" office:value-type="string">
            <text:p text:style-name="P79">Termina il caso d’uso</text:p>
          </table:table-cell>
          <table:table-cell table:style-name="Tabella2.C4" office:value-type="string">
            <text:p text:style-name="P78"/>
          </table:table-cell>
        </table:table-row>
      </table:table>
      <text:p text:style-name="P80"><text:span text:style-name="T21">Estensione 2</text:span><text:span text:style-name="T37">d</text:span><text:span text:style-name="T21">: </text:span><text:span text:style-name="T37">creazione di un evento ricorrente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81"><text:bookmark text:name="_heading=h.1t3h5sf Copy 1 Copy 1 Copy 2 Copy 4 Copy 1"/># </text:p>
          </table:table-cell>
          <table:table-cell table:style-name="Table12.B1" office:value-type="string">
            <text:p text:style-name="P82"><text:bookmark text:name="_heading=h.4d34og8 Copy 1 Copy 1 Copy 2 Copy 4 Copy 1"/>Attore</text:p>
          </table:table-cell>
          <table:table-cell table:style-name="Table12.B1" office:value-type="string">
            <text:p text:style-name="P82"><text:bookmark text:name="_heading=h.2s8eyo1 Copy 1 Copy 1 Copy 2 Copy 4 Copy 1"/>Sistema</text:p>
          </table:table-cell>
        </table:table-row>
        <table:table-row table:style-name="Table12.1">
          <table:table-cell table:style-name="Table12.A2" office:value-type="string">
            <text:p text:style-name="P83">2<text:span text:style-name="T37">d</text:span><text:span text:style-name="T21">.</text:span><text:span text:style-name="T28">1</text:span></text:p>
          </table:table-cell>
          <table:table-cell table:style-name="Table12.B2" office:value-type="string">
            <text:p text:style-name="P84">Crea un evento ricorrente indicando o il numero di ricorrenze o la data dell’ultima ricorrenza, e la frequenza.</text:p>
          </table:table-cell>
          <table:table-cell table:style-name="Table12.C2" office:value-type="string">
            <text:p text:style-name="P85">Salva nel database tutte le occorrenze identiche di un evento.</text:p>
          </table:table-cell>
        </table:table-row>
      </table:table>
      <text:p text:style-name="P86"><text:bookmark text:name="_heading=h.3dy6vkm Copy 1 Copy 1 Copy 1 Copy 2"/>Estensione <text:span text:style-name="T38">4</text:span><text:span text:style-name="T39">a</text:span><text:span text:style-name="T38">: </text:span><text:span text:style-name="T17">preselezione del personale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7"><text:bookmark text:name="_heading=h.1t3h5sf Copy 1 Copy 1 Copy 2 Copy 2"/># </text:p>
          </table:table-cell>
          <table:table-cell table:style-name="Table5.B1" office:value-type="string">
            <text:p text:style-name="P88"><text:bookmark text:name="_heading=h.4d34og8 Copy 1 Copy 1 Copy 2 Copy 2"/>Attore</text:p>
          </table:table-cell>
          <table:table-cell table:style-name="Table5.B1" office:value-type="string">
            <text:p text:style-name="P88"><text:bookmark text:name="_heading=h.2s8eyo1 Copy 1 Copy 1 Copy 2 Copy 2"/>Sistema</text:p>
          </table:table-cell>
        </table:table-row>
        <table:table-row table:style-name="Table5.1">
          <table:table-cell table:style-name="Table5.A2" office:value-type="string">
            <text:p text:style-name="P89">4a.1</text:p>
          </table:table-cell>
          <table:table-cell table:style-name="Table5.B2" office:value-type="string">
            <text:p text:style-name="P90">Decide di selezionare il personale <text:span text:style-name="T40">nel passo 6</text:span></text:p>
          </table:table-cell>
          <table:table-cell table:style-name="Table5.C2" office:value-type="string">
            <text:p text:style-name="P91"><text:span text:style-name="T18">Il sistema registra la scelta e mantiene lo stato del personale come </text:span>"Non Assegnato".</text:p>
          </table:table-cell>
        </table:table-row>
      </table:table>
      <text:p text:style-name="P92"><text:bookmark text:name="_heading=h.3dy6vkm Copy 1 Copy 1 Copy 1 Copy 3"/>Estensione <text:span text:style-name="T38">5</text:span><text:span text:style-name="T39">a</text:span><text:span text:style-name="T38">: </text:span><text:span text:style-name="T41">proposta di modifiche del menù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87"><text:bookmark text:name="_heading=h.1t3h5sf Copy 1 Copy 1 Copy 2 Copy 3"/># </text:p>
          </table:table-cell>
          <table:table-cell table:style-name="Table6.B1" office:value-type="string">
            <text:p text:style-name="P88"><text:bookmark text:name="_heading=h.4d34og8 Copy 1 Copy 1 Copy 2 Copy 3"/>Attore</text:p>
          </table:table-cell>
          <table:table-cell table:style-name="Table6.B1" office:value-type="string">
            <text:p text:style-name="P88"><text:bookmark text:name="_heading=h.2s8eyo1 Copy 1 Copy 1 Copy 2 Copy 3"/>Sistema</text:p>
          </table:table-cell>
        </table:table-row>
        <table:table-row table:style-name="Table6.1">
          <table:table-cell table:style-name="Table6.A2" office:value-type="string">
            <text:p text:style-name="P89">5a.1</text:p>
          </table:table-cell>
          <table:table-cell table:style-name="Table6.B2" office:value-type="string">
            <text:p text:style-name="P93">Propone delle modifiche al menù</text:p>
          </table:table-cell>
          <table:table-cell table:style-name="Table6.C2" office:value-type="string">
            <text:p text:style-name="P94">Invia una notifica di modifica allo chef.</text:p>
          </table:table-cell>
        </table:table-row>
      </table:table>
      <text:p text:style-name="P95"><text:bookmark text:name="_heading=h.3dy6vkm Copy 1 Copy 1 Copy 1 Copy 3 Copy 1"/>Estensione <text:span text:style-name="T42">6</text:span><text:span text:style-name="T39">a</text:span><text:span text:style-name="T38">: </text:span><text:span text:style-name="T42">annullamento evento con penale (incluso il punto 7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96"><text:bookmark text:name="_heading=h.1t3h5sf Copy 1 Copy 1 Copy 2 Copy 3 Copy 1"/># </text:p>
          </table:table-cell>
          <table:table-cell table:style-name="Table8.B1" office:value-type="string">
            <text:p text:style-name="P97"><text:bookmark text:name="_heading=h.4d34og8 Copy 1 Copy 1 Copy 2 Copy 3 Copy 1"/>Attore</text:p>
          </table:table-cell>
          <table:table-cell table:style-name="Table8.B1" office:value-type="string">
            <text:p text:style-name="P97"><text:bookmark text:name="_heading=h.2s8eyo1 Copy 1 Copy 1 Copy 2 Copy 3 Copy 1"/>Sistema</text:p>
          </table:table-cell>
        </table:table-row>
        <table:table-row table:style-name="Table8.1">
          <table:table-cell table:style-name="Table8.A2" office:value-type="string">
            <text:p text:style-name="P98">6a.1</text:p>
          </table:table-cell>
          <table:table-cell table:style-name="Table8.B2" office:value-type="string">
            <text:p text:style-name="P99">Annulla l’evento</text:p>
          </table:table-cell>
          <table:table-cell table:style-name="Table8.C2" office:value-type="string">
            <text:p text:style-name="P100"><text:span text:style-name="T43">Controlla se le politiche dell’organizzatore applicano una penale. In tal caso, </text:span><text:span text:style-name="T44">richiede l’applicazione della penale.</text:span></text:p>
            <text:p text:style-name="P100">Contrassegna l’evento come “Annullato”.</text:p>
          </table:table-cell>
        </table:table-row>
        <table:table-row table:style-name="Table8.1">
          <table:table-cell table:style-name="Table8.A3" office:value-type="string">
            <text:p text:style-name="P101">6a.2</text:p>
          </table:table-cell>
          <table:table-cell table:style-name="Table8.B3" office:value-type="string">
            <text:p text:style-name="P102">Decide se far pagare la penale</text:p>
          </table:table-cell>
          <table:table-cell table:style-name="Table8.C3" office:value-type="string">
            <text:p text:style-name="P102">In caso affermativo, invia una notifica di pagamento al cliente.</text:p>
          </table:table-cell>
        </table:table-row>
        <table:table-row table:style-name="Table8.1">
          <table:table-cell table:style-name="Table8.A4" office:value-type="string">
            <text:p text:style-name="P103"/>
          </table:table-cell>
          <table:table-cell table:style-name="Table8.B4" office:value-type="string">
            <text:p text:style-name="P104">Termina il caso d’uso</text:p>
          </table:table-cell>
          <table:table-cell table:style-name="Table8.C4" office:value-type="string">
            <text:p text:style-name="P105"/>
          </table:table-cell>
        </table:table-row>
      </table:table>
      <text:p text:style-name="P106"><text:bookmark text:name="Copia _heading=h.3dy6vkm Copy 1 Copy 1 Copy 1 Copy 3 Copy 1 1"/><text:soft-page-break/>Estensione <text:span text:style-name="T42">6</text:span><text:span text:style-name="T36">a</text:span><text:span text:style-name="T39">.</text:span><text:span text:style-name="T45">1a</text:span><text:span text:style-name="T38">: </text:span><text:span text:style-name="T42">annullamento evento </text:span><text:span text:style-name="T36">ricorrente</text:span><text:span text:style-name="T42"> con penale (incluso il punto 7)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71"><text:bookmark text:name="Copia _heading=h.1t3h5sf Copy 1 Copy 1 Copy 2 Copy 3 Copy 1 1"/># </text:p>
          </table:table-cell>
          <table:table-cell table:style-name="Tabella3.B1" office:value-type="string">
            <text:p text:style-name="P72"><text:bookmark text:name="Copia _heading=h.4d34og8 Copy 1 Copy 1 Copy 2 Copy 3 Copy 1 1"/>Attore</text:p>
          </table:table-cell>
          <table:table-cell table:style-name="Tabella3.B1" office:value-type="string">
            <text:p text:style-name="P72"><text:bookmark text:name="Copia _heading=h.2s8eyo1 Copy 1 Copy 1 Copy 2 Copy 3 Copy 1 1"/>Sistema</text:p>
          </table:table-cell>
        </table:table-row>
        <table:table-row table:style-name="Tabella3.1">
          <table:table-cell table:style-name="Tabella3.A2" office:value-type="string">
            <text:p text:style-name="P107">6a.1<text:span text:style-name="T36">a.1</text:span></text:p>
          </table:table-cell>
          <table:table-cell table:style-name="Tabella3.B2" office:value-type="string">
            <text:p text:style-name="P108">Annulla l’evento</text:p>
          </table:table-cell>
          <table:table-cell table:style-name="Tabella3.C2" office:value-type="string">
            <text:p text:style-name="P109">Chiede se si vuole <text:span text:style-name="T36">annullare</text:span> una sola o tutte le istanze.</text:p>
            <text:p text:style-name="P110"/>
          </table:table-cell>
        </table:table-row>
        <table:table-row table:style-name="Tabella3.1">
          <table:table-cell table:style-name="Tabella3.A3" office:value-type="string">
            <text:p text:style-name="P111">6a.<text:span text:style-name="T36">1a.2</text:span></text:p>
          </table:table-cell>
          <table:table-cell table:style-name="Tabella3.B3" office:value-type="string">
            <text:p text:style-name="P112">Sceglie se <text:span text:style-name="T36">annullare</text:span> un solo evento o tutte le instanze.</text:p>
            <text:p text:style-name="P112"/>
          </table:table-cell>
          <table:table-cell table:style-name="Tabella3.C3" office:value-type="string">
            <text:p text:style-name="P110"><text:span text:style-name="T43">Controlla se le politiche dell’organizzatore applicano una penale. In tal caso, </text:span><text:span text:style-name="T44">richiede l’applicazione della penale.</text:span></text:p>
            <text:p text:style-name="P110">Contrassegna l’evento come “Annullato”.</text:p>
          </table:table-cell>
        </table:table-row>
        <table:table-row table:style-name="Tabella3.1">
          <table:table-cell table:style-name="Tabella3.A4" office:value-type="string">
            <text:p text:style-name="P73"/>
          </table:table-cell>
          <table:table-cell table:style-name="Tabella3.B4" office:value-type="string">
            <text:p text:style-name="P108">Termina il caso d’uso</text:p>
          </table:table-cell>
          <table:table-cell table:style-name="Tabella3.C4" office:value-type="string">
            <text:p text:style-name="P113"/>
          </table:table-cell>
        </table:table-row>
      </table:table>
      <text:p text:style-name="P114"><text:bookmark text:name="_heading=h.3dy6vkm Copy 1 Copy 1 Copy 1 Copy 3 Copy 1 Copy 2"/>Estensione <text:span text:style-name="T42">6</text:span><text:span text:style-name="T46">b</text:span><text:span text:style-name="T38">: </text:span><text:span text:style-name="T35">modifica</text:span><text:span text:style-name="T42"> evento con penale (incluso il punto 7)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15"><text:bookmark text:name="_heading=h.1t3h5sf Copy 1 Copy 1 Copy 2 Copy 3 Copy 1 Copy 2"/># </text:p>
          </table:table-cell>
          <table:table-cell table:style-name="Table11.B1" office:value-type="string">
            <text:p text:style-name="P116"><text:bookmark text:name="_heading=h.4d34og8 Copy 1 Copy 1 Copy 2 Copy 3 Copy 1 Copy 2"/>Attore</text:p>
          </table:table-cell>
          <table:table-cell table:style-name="Table11.B1" office:value-type="string">
            <text:p text:style-name="P116"><text:bookmark text:name="_heading=h.2s8eyo1 Copy 1 Copy 1 Copy 2 Copy 3 Copy 1 Copy 2"/>Sistema</text:p>
          </table:table-cell>
        </table:table-row>
        <table:table-row table:style-name="Table11.1">
          <table:table-cell table:style-name="Table11.A2" office:value-type="string">
            <text:p text:style-name="P117">6<text:span text:style-name="T47">b</text:span>.1</text:p>
          </table:table-cell>
          <table:table-cell table:style-name="Table11.B2" office:value-type="string">
            <text:p text:style-name="P118"><text:span text:style-name="T35">Modifica</text:span> l’event<text:span text:style-name="T44">o</text:span></text:p>
          </table:table-cell>
          <table:table-cell table:style-name="Table11.C2" office:value-type="string">
            <text:p text:style-name="P119"><text:span text:style-name="T43">Controlla se le politiche dell’organizzatore applicano una penale. In tal caso, </text:span><text:span text:style-name="T44">richiede l’applicazione della penale.</text:span></text:p>
            <text:p text:style-name="P100">Salva le modifiche dell’evento nel database.</text:p>
          </table:table-cell>
        </table:table-row>
        <table:table-row table:style-name="Table11.1">
          <table:table-cell table:style-name="Table11.A3" office:value-type="string">
            <text:p text:style-name="P101">6b.2</text:p>
          </table:table-cell>
          <table:table-cell table:style-name="Table11.B3" office:value-type="string">
            <text:p text:style-name="P102">Decide se far pagare la penale</text:p>
          </table:table-cell>
          <table:table-cell table:style-name="Table11.C3" office:value-type="string">
            <text:p text:style-name="P119">Invia una richiesta di pagamento della penale al cliente.</text:p>
          </table:table-cell>
        </table:table-row>
        <table:table-row table:style-name="Table11.1">
          <table:table-cell table:style-name="Table11.A4" office:value-type="string">
            <text:p text:style-name="P120"/>
          </table:table-cell>
          <table:table-cell table:style-name="Table11.B4" office:value-type="string">
            <text:p text:style-name="P121">Riprende da dove si era interrotto</text:p>
          </table:table-cell>
          <table:table-cell table:style-name="Table11.C4" office:value-type="string">
            <text:p text:style-name="P119"/>
          </table:table-cell>
        </table:table-row>
      </table:table>
      <text:p text:style-name="P114"><text:bookmark text:name="Copia _heading=h.3dy6vkm Copy 1 Copy 1 Copy 1 Copy 3 Copy 1 Copy 2 1"/>Estensione <text:span text:style-name="T42">6</text:span><text:span text:style-name="T46">b.</text:span><text:span text:style-name="T45">1a</text:span><text:span text:style-name="T38">: </text:span><text:span text:style-name="T35">modifica</text:span><text:span text:style-name="T42"> evento </text:span><text:span text:style-name="T36">ricorrente </text:span><text:span text:style-name="T42">con penale (incluso il punto 7)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71"><text:bookmark text:name="Copia _heading=h.1t3h5sf Copy 1 Copy 1 Copy 2 Copy 3 Copy 1 Copy 2 1"/># </text:p>
          </table:table-cell>
          <table:table-cell table:style-name="Tabella4.B1" office:value-type="string">
            <text:p text:style-name="P72"><text:bookmark text:name="Copia _heading=h.4d34og8 Copy 1 Copy 1 Copy 2 Copy 3 Copy 1 Copy 2 1"/>Attore</text:p>
          </table:table-cell>
          <table:table-cell table:style-name="Tabella4.B1" office:value-type="string">
            <text:p text:style-name="P72"><text:bookmark text:name="Copia _heading=h.2s8eyo1 Copy 1 Copy 1 Copy 2 Copy 3 Copy 1 Copy 2 1"/>Sistema</text:p>
          </table:table-cell>
        </table:table-row>
        <table:table-row table:style-name="Tabella4.1">
          <table:table-cell table:style-name="Tabella4.A2" office:value-type="string">
            <text:p text:style-name="P107">6<text:span text:style-name="T47">b</text:span>.1</text:p>
          </table:table-cell>
          <table:table-cell table:style-name="Tabella4.B2" office:value-type="string">
            <text:p text:style-name="P108"><text:span text:style-name="T35">Modifica</text:span> l’event<text:span text:style-name="T44">o</text:span></text:p>
          </table:table-cell>
          <table:table-cell table:style-name="Tabella4.C2" office:value-type="string">
            <text:p text:style-name="P109">Chiede se si vuole <text:span text:style-name="T36">modificare</text:span> una sola o tutte le istanze.</text:p>
            <text:p text:style-name="P110"/>
          </table:table-cell>
        </table:table-row>
        <table:table-row table:style-name="Tabella4.1">
          <table:table-cell table:style-name="Tabella4.A3" office:value-type="string">
            <text:p text:style-name="P111">6b.2</text:p>
          </table:table-cell>
          <table:table-cell table:style-name="Tabella4.B3" office:value-type="string">
            <text:p text:style-name="P112">Sceglie se <text:span text:style-name="T36">modificare</text:span> un solo evento o tutte le instanze.</text:p>
            <text:p text:style-name="P112"/>
          </table:table-cell>
          <table:table-cell table:style-name="Tabella4.C3" office:value-type="string">
            <text:p text:style-name="P110"><text:span text:style-name="T43">Controlla se le politiche dell’organizzatore applicano una penale. In tal caso, </text:span><text:span text:style-name="T44">richiede l’applicazione della penale.</text:span></text:p>
            <text:p text:style-name="P110">Salva le modifiche dell’evento nel database.</text:p>
          </table:table-cell>
        </table:table-row>
        <table:table-row table:style-name="Tabella4.1">
          <table:table-cell table:style-name="Tabella4.A4" office:value-type="string">
            <text:p text:style-name="P73"/>
          </table:table-cell>
          <table:table-cell table:style-name="Tabella4.B4" office:value-type="string">
            <text:p text:style-name="P122">Riprende da dove si era interrotto</text:p>
          </table:table-cell>
          <table:table-cell table:style-name="Tabella4.C4" office:value-type="string">
            <text:p text:style-name="P110"/>
          </table:table-cell>
        </table:table-row>
      </table:table>
      <text:p text:style-name="P114"><text:soft-page-break/></text:p>
      <text:p text:style-name="P123"><text:span text:style-name="T48">Eccezione</text:span><text:span text:style-name="T49"> </text:span><text:span text:style-name="T50">1a</text:span>: <text:span text:style-name="T51">mancanza di dati obbligatori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4"><text:bookmark text:name="_heading=h.1t3h5sf Copy 1 Copy 2"/># </text:p>
          </table:table-cell>
          <table:table-cell table:style-name="Table10.B1" office:value-type="string">
            <text:p text:style-name="P125"><text:bookmark text:name="_heading=h.4d34og8 Copy 1 Copy 2"/>Attore</text:p>
          </table:table-cell>
          <table:table-cell table:style-name="Table10.B1" office:value-type="string">
            <text:p text:style-name="P125"><text:bookmark text:name="_heading=h.2s8eyo1 Copy 1 Copy 2"/>Sistema</text:p>
          </table:table-cell>
        </table:table-row>
        <table:table-row table:style-name="Table10.1">
          <table:table-cell table:style-name="Table10.A2" office:value-type="string">
            <text:p text:style-name="P126"><text:bookmark text:name="_heading=h.17dp8vu Copy 1 Copy 1"/>1a.1</text:p>
          </table:table-cell>
          <table:table-cell table:style-name="Table10.B2" office:value-type="string">
            <text:p text:style-name="P127">La commessa inviata dal cliente manca di dati necessari.</text:p>
          </table:table-cell>
          <table:table-cell table:style-name="Table10.C2" office:value-type="string">
            <text:p text:style-name="P128">Notifica il cliente dei dati mancanti. <text:span text:style-name="T51">Viene rifiutata la commessa</text:span></text:p>
          </table:table-cell>
        </table:table-row>
        <table:table-row table:style-name="Table10.1">
          <table:table-cell table:style-name="Table10.A3" office:value-type="string">
            <text:p text:style-name="P129"/>
          </table:table-cell>
          <table:table-cell table:style-name="Table10.B3" office:value-type="string">
            <text:p text:style-name="P130">Termina il Caso d’Uso</text:p>
          </table:table-cell>
          <table:table-cell table:style-name="Table10.C3" office:value-type="string">
            <text:p text:style-name="P131"/>
          </table:table-cell>
        </table:table-row>
      </table:table>
      <text:p text:style-name="P132"><text:span text:style-name="T48">Eccezione</text:span><text:span text:style-name="T49"> </text:span><text:span text:style-name="T50">3a</text:span>: <text:span text:style-name="T52">mancanza di uno chef idoneo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33"><text:bookmark text:name="_heading=h.1t3h5sf Copy 1 Copy 2 Copy 1 Copy 2"/># </text:p>
          </table:table-cell>
          <table:table-cell table:style-name="Table13.B1" office:value-type="string">
            <text:p text:style-name="P134"><text:bookmark text:name="_heading=h.4d34og8 Copy 1 Copy 2 Copy 1 Copy 2"/>Attore</text:p>
          </table:table-cell>
          <table:table-cell table:style-name="Table13.B1" office:value-type="string">
            <text:p text:style-name="P134"><text:bookmark text:name="_heading=h.2s8eyo1 Copy 1 Copy 2 Copy 1 Copy 2"/>Sistema</text:p>
          </table:table-cell>
        </table:table-row>
        <table:table-row table:style-name="Table13.1">
          <table:table-cell table:style-name="Table13.A2" office:value-type="string">
            <text:p text:style-name="P135"><text:span text:style-name="T52">2</text:span>a.1</text:p>
          </table:table-cell>
          <table:table-cell table:style-name="Table13.B2" office:value-type="string">
            <text:p text:style-name="P136">Non ha trovato uno chef idoneo rispetto alla scheda appena compilata</text:p>
          </table:table-cell>
          <table:table-cell table:style-name="Table13.C2" office:value-type="string">
            <text:p text:style-name="P137">Notifica l’organizzatore che non sono disponibili Chef per l’evento</text:p>
          </table:table-cell>
        </table:table-row>
        <table:table-row table:style-name="Table13.1">
          <table:table-cell table:style-name="Table13.A3" office:value-type="string">
            <text:p text:style-name="P138"/>
          </table:table-cell>
          <table:table-cell table:style-name="Table13.B3" office:value-type="string">
            <text:p text:style-name="P139">Termina il Caso d’Uso</text:p>
          </table:table-cell>
          <table:table-cell table:style-name="Table13.C3" office:value-type="string">
            <text:p text:style-name="P140"/>
          </table:table-cell>
        </table:table-row>
      </table:table>
      <text:p text:style-name="P141"/>
      <text:p text:style-name="P142"><text:span text:style-name="T48">Eccezione</text:span><text:span text:style-name="T49"> </text:span><text:span text:style-name="T53">4a</text:span>: <text:span text:style-name="T52">mancanza di </text:span><text:span text:style-name="T54">personale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43"><text:bookmark text:name="_heading=h.1t3h5sf Copy 1 Copy 2 Copy 1 Copy 2 Copy 1"/># </text:p>
          </table:table-cell>
          <table:table-cell table:style-name="Table14.B1" office:value-type="string">
            <text:p text:style-name="P144"><text:bookmark text:name="_heading=h.4d34og8 Copy 1 Copy 2 Copy 1 Copy 2 Copy 1"/>Attore</text:p>
          </table:table-cell>
          <table:table-cell table:style-name="Table14.B1" office:value-type="string">
            <text:p text:style-name="P144"><text:bookmark text:name="_heading=h.2s8eyo1 Copy 1 Copy 2 Copy 1 Copy 2 Copy 1"/>Sistema</text:p>
          </table:table-cell>
        </table:table-row>
        <table:table-row table:style-name="Table14.1">
          <table:table-cell table:style-name="Table14.A2" office:value-type="string">
            <text:p text:style-name="P145"><text:span text:style-name="T52">2</text:span>a.1</text:p>
          </table:table-cell>
          <table:table-cell table:style-name="Table14.B2" office:value-type="string">
            <text:p text:style-name="P136">Non ha trovato il personale per ciò che aveva pensato</text:p>
          </table:table-cell>
          <table:table-cell table:style-name="Table14.C2" office:value-type="string">
            <text:p text:style-name="P137">Notifica l’organizzatore che non c’è abbastanza personale disponibile per il dato evento/servizio</text:p>
          </table:table-cell>
        </table:table-row>
        <table:table-row table:style-name="Table14.1">
          <table:table-cell table:style-name="Table14.A3" office:value-type="string">
            <text:p text:style-name="P146"/>
          </table:table-cell>
          <table:table-cell table:style-name="Table14.B3" office:value-type="string">
            <text:p text:style-name="P147">Termina il Caso d’Uso</text:p>
          </table:table-cell>
          <table:table-cell table:style-name="Table14.C3" office:value-type="string">
            <text:p text:style-name="P148"/>
          </table:table-cell>
        </table:table-row>
      </table:table>
      <text:p text:style-name="P149"/>
      <text:p text:style-name="P142"><text:span text:style-name="T48">Eccezione</text:span><text:span text:style-name="T49"> </text:span><text:span text:style-name="T53">5a</text:span>: <text:span text:style-name="T54">mancanza di ricezione del menù nei tempi previsti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43"><text:bookmark text:name="_heading=h.1t3h5sf Copy 1 Copy 2 Copy 1 Copy 2 Copy 1 Copy 1"/># </text:p>
          </table:table-cell>
          <table:table-cell table:style-name="Table15.B1" office:value-type="string">
            <text:p text:style-name="P144"><text:bookmark text:name="_heading=h.4d34og8 Copy 1 Copy 2 Copy 1 Copy 2 Copy 1 Copy 1"/>Attore</text:p>
          </table:table-cell>
          <table:table-cell table:style-name="Table15.B1" office:value-type="string">
            <text:p text:style-name="P144"><text:bookmark text:name="_heading=h.2s8eyo1 Copy 1 Copy 2 Copy 1 Copy 2 Copy 1 Copy 1"/>Sistema</text:p>
          </table:table-cell>
        </table:table-row>
        <table:table-row table:style-name="Table15.1">
          <table:table-cell table:style-name="Table15.A2" office:value-type="string">
            <text:p text:style-name="P145"><text:span text:style-name="T52">2</text:span>a.1</text:p>
          </table:table-cell>
          <table:table-cell table:style-name="Table15.B2" office:value-type="string">
            <text:p text:style-name="P136">Non ha ricevuto il menù dallo chef nei tempi previsti</text:p>
          </table:table-cell>
          <table:table-cell table:style-name="Table15.C2" office:value-type="string">
            <text:p text:style-name="P137">Notifica l’organizzatore della mancata ricezione del menù</text:p>
          </table:table-cell>
        </table:table-row>
        <table:table-row table:style-name="Table15.1">
          <table:table-cell table:style-name="Table15.A3" office:value-type="string">
            <text:p text:style-name="P146"/>
          </table:table-cell>
          <table:table-cell table:style-name="Table15.B3" office:value-type="string">
            <text:p text:style-name="P147">Termina il Caso d’Uso</text:p>
          </table:table-cell>
          <table:table-cell table:style-name="Table15.C3" office:value-type="string">
            <text:p text:style-name="P148"/>
          </table:table-cell>
        </table:table-row>
      </table:table>
      <text:p text:style-name="P1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ontdiner Swanky" svg:font-family="'Fontdiner Swanky'" style:font-family-generic="roman" style:font-pitch="variable"/>
    <style:font-face style:name="Fontdiner Swanky1" svg:font-family="'Fontdiner Swanky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529cm" style:contextual-spacing="false" fo:line-height="100%" fo:keep-together="always" fo:break-before="auto" fo:break-after="auto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353cm" fo:margin-bottom="0.353cm" style:contextual-spacing="false" fo:line-height="100%" fo:text-align="left" style:justify-single-word="false" fo:keep-together="always" fo:break-before="auto" fo:break-after="auto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0c3635" loext:opacity="100%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style:contextual-spacing="false" fo:line-height="100%" fo:text-align="center" style:justify-single-word="false" fo:keep-together="always" fo:break-before="auto" fo:break-after="auto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02cm" style:type="center"/>
          <style:tab-stop style:position="19.00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02cm" style:type="center"/>
          <style:tab-stop style:position="19.004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7-16T16:27:00.115632000</dc:date>
    <meta:editing-duration>PT5H25M10S</meta:editing-duration>
    <meta:editing-cycles>57</meta:editing-cycles>
    <meta:document-statistic meta:table-count="19" meta:image-count="0" meta:object-count="0" meta:page-count="7" meta:paragraph-count="213" meta:word-count="1177" meta:character-count="7569" meta:non-whitespace-character-count="6584"/>
  </office:meta>
</office:document-meta>
</file>