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fo:break-before="page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8.583cm"/>
    </style:style>
    <style:style style:name="Table1.C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2" style:family="table-cell">
      <style:table-cell-properties style:vertical-align="" fo:padding="0.176cm" fo:border-left="none" fo:border-right="none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3" style:family="table-cell">
      <style:table-cell-properties style:vertical-align="" fo:padding="0.176cm" fo:border-left="none" fo:border-right="none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4" style:family="table-cell">
      <style:table-cell-properties style:vertical-align="" fo:padding="0.176cm" fo:border-left="none" fo:border-right="none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5" style:family="table-cell">
      <style:table-cell-properties style:vertical-align="" fo:padding="0.176cm" fo:border-left="none" fo:border-right="none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6" style:family="table-cell">
      <style:table-cell-properties style:vertical-align="" fo:padding="0.176cm" fo:border-left="none" fo:border-right="none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7" style:family="table-cell">
      <style:table-cell-properties style:vertical-align="" fo:padding="0.176cm" fo:border-left="none" fo:border-right="none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8" style:family="table-cell">
      <style:table-cell-properties style:vertical-align="" fo:padding="0.176cm" fo:border-left="none" fo:border-right="none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9" style:family="table-cell">
      <style:table-cell-properties style:vertical-align="" fo:padding="0.176cm" fo:border-left="none" fo:border-right="none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0" style:family="table-cell">
      <style:table-cell-properties style:vertical-align="" fo:padding="0.176cm" fo:border-left="none" fo:border-right="none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1" style:family="table-cell">
      <style:table-cell-properties style:vertical-align="" fo:padding="0.176cm" fo:border-left="none" fo:border-right="none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2" style:family="table-cell">
      <style:table-cell-properties style:vertical-align="" fo:padding="0.176cm" fo:border-left="none" fo:border-right="none" fo:border-top="none" fo:border-bottom="1pt solid #000000"/>
    </style:style>
    <style:style style:name="Table1.C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053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" style:family="table">
      <style:table-properties style:width="18.547cm" fo:margin-left="0.053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8.123cm"/>
    </style:style>
    <style:style style:name="Table16.C" style:family="table-column">
      <style:table-column-properties style:column-width="8.52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053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" style:family="table">
      <style:table-properties style:width="18.547cm" fo:margin-left="0.053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8.123cm"/>
    </style:style>
    <style:style style:name="Table12.C" style:family="table-column">
      <style:table-column-properties style:column-width="8.52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7.989cm"/>
    </style:style>
    <style:style style:name="Table8.C" style:family="table-column">
      <style:table-column-properties style:column-width="8.6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053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7.989cm"/>
    </style:style>
    <style:style style:name="Tabella3.C" style:family="table-column">
      <style:table-column-properties style:column-width="8.655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" style:family="table">
      <style:table-properties style:width="18.547cm" fo:margin-left="0.053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8.123cm"/>
    </style:style>
    <style:style style:name="Table11.C" style:family="table-column">
      <style:table-column-properties style:column-width="8.52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053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053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8.123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" style:family="table">
      <style:table-properties style:width="18.547cm" fo:margin-left="0.053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8.123cm"/>
    </style:style>
    <style:style style:name="Table13.C" style:family="table-column">
      <style:table-column-properties style:column-width="8.52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" style:family="table">
      <style:table-properties style:width="18.547cm" fo:margin-left="0.053cm" fo:margin-top="0cm" fo:margin-bottom="0cm" table:align="left" style:writing-mode="lr-tb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8.123cm"/>
    </style:style>
    <style:style style:name="Table14.C" style:family="table-column">
      <style:table-column-properties style:column-width="8.52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" style:family="table">
      <style:table-properties style:width="18.547cm" fo:margin-left="0.053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8.123cm"/>
    </style:style>
    <style:style style:name="Table15.C" style:family="table-column">
      <style:table-column-properties style:column-width="8.52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text-align="left" style:justify-single-word="false"/>
    </style:style>
    <style:style style:name="P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4" style:family="paragraph" style:parent-style-name="Standard">
      <style:paragraph-properties fo:text-align="left" style:justify-single-word="false"/>
      <style:text-properties fo:background-color="#ffffff"/>
    </style:style>
    <style:style style:name="P15" style:family="paragraph" style:parent-style-name="Standard">
      <style:paragraph-properties fo:text-align="left" style:justify-single-word="false"/>
      <style:text-properties officeooo:rsid="0054bb9a" officeooo:paragraph-rsid="0054bb9a" fo:background-color="#ffffff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19" style:family="paragraph" style:parent-style-name="Standard">
      <style:paragraph-properties fo:margin-left="0cm" fo:margin-right="0cm" fo:text-align="left" style:justify-single-word="false" fo:text-indent="0cm" style:auto-text-indent="false"/>
      <style:text-properties fo:background-color="#ffffff"/>
    </style:style>
    <style:style style:name="P2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54409" officeooo:paragraph-rsid="00541d25" fo:background-color="#ffffff"/>
    </style:style>
    <style:style style:name="P2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5681f8" officeooo:paragraph-rsid="005681f8" fo:background-color="#ffffff"/>
    </style:style>
    <style:style style:name="P2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eeca5" officeooo:paragraph-rsid="000eeca5"/>
    </style:style>
    <style:style style:name="P2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background-color="#ffffff"/>
    </style:style>
    <style:style style:name="P25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5a374a" officeooo:paragraph-rsid="005a374a"/>
    </style:style>
    <style:style style:name="P2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5a374a" officeooo:paragraph-rsid="005a374a"/>
    </style:style>
    <style:style style:name="P30" style:family="paragraph" style:parent-style-name="Standard">
      <style:paragraph-properties fo:text-align="left" style:justify-single-word="false"/>
      <style:text-properties officeooo:paragraph-rsid="005a374a" fo:background-color="#ffffff"/>
    </style:style>
    <style:style style:name="P3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32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33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3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35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3829b"/>
    </style:style>
    <style:style style:name="P3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3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3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4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1" style:family="paragraph" style:parent-style-name="Standard">
      <style:paragraph-properties fo:text-align="left" style:justify-single-word="false"/>
      <style:text-properties officeooo:rsid="0021d79d" officeooo:paragraph-rsid="0021d79d"/>
    </style:style>
    <style:style style:name="P4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2a622b"/>
    </style:style>
    <style:style style:name="P4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720a"/>
    </style:style>
    <style:style style:name="P44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720a"/>
    </style:style>
    <style:style style:name="P45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720a"/>
    </style:style>
    <style:style style:name="P4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720a"/>
    </style:style>
    <style:style style:name="P4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720a"/>
    </style:style>
    <style:style style:name="P48" style:family="paragraph" style:parent-style-name="Standard">
      <style:text-properties officeooo:paragraph-rsid="004b720a"/>
    </style:style>
    <style:style style:name="P4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720a" officeooo:paragraph-rsid="004b720a"/>
    </style:style>
    <style:style style:name="P5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b720a"/>
    </style:style>
    <style:style style:name="P51" style:family="paragraph" style:parent-style-name="Standard">
      <style:paragraph-properties fo:text-align="left" style:justify-single-word="false"/>
      <style:text-properties officeooo:rsid="0021d79d" officeooo:paragraph-rsid="004b720a"/>
    </style:style>
    <style:style style:name="P5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4b720a"/>
    </style:style>
    <style:style style:name="P53" style:family="paragraph" style:parent-style-name="Standard">
      <style:text-properties officeooo:rsid="003b7454" officeooo:paragraph-rsid="003b7454"/>
    </style:style>
    <style:style style:name="P5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3b7454"/>
    </style:style>
    <style:style style:name="P5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b7454"/>
    </style:style>
    <style:style style:name="P5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b7454"/>
    </style:style>
    <style:style style:name="P5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b7454"/>
    </style:style>
    <style:style style:name="P5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3b7454"/>
    </style:style>
    <style:style style:name="P59" style:family="paragraph" style:parent-style-name="Standard">
      <style:text-properties officeooo:paragraph-rsid="003b7454"/>
    </style:style>
    <style:style style:name="P6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17f9e"/>
    </style:style>
    <style:style style:name="P6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17f9e"/>
    </style:style>
    <style:style style:name="P62" style:family="paragraph" style:parent-style-name="Standard">
      <style:text-properties officeooo:rsid="00467c57" officeooo:paragraph-rsid="004864ae"/>
    </style:style>
    <style:style style:name="P63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17be6b" style:font-name-asian="Bitter1" style:font-size-asian="18pt" style:font-weight-asian="bold" style:font-name-complex="Bitter1" style:font-size-complex="18pt"/>
    </style:style>
    <style:style style:name="P64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65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6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67" style:family="paragraph" style:parent-style-name="Standard">
      <style:text-properties officeooo:paragraph-rsid="0023cde6"/>
    </style:style>
    <style:style style:name="P6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2ab133"/>
    </style:style>
    <style:style style:name="P69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4bb174" style:font-name-asian="Bitter1" style:font-size-asian="18pt" style:font-weight-asian="bold" style:font-name-complex="Bitter1" style:font-size-complex="18pt"/>
    </style:style>
    <style:style style:name="P7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b174"/>
    </style:style>
    <style:style style:name="P7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b174"/>
    </style:style>
    <style:style style:name="P7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b174"/>
    </style:style>
    <style:style style:name="P7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4" style:family="paragraph" style:parent-style-name="Text_20_body">
      <style:text-properties officeooo:paragraph-rsid="004bb174"/>
    </style:style>
    <style:style style:name="P7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b174" officeooo:paragraph-rsid="004bb174"/>
    </style:style>
    <style:style style:name="P76" style:family="paragraph" style:parent-style-name="Text_20_body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7" style:family="paragraph" style:parent-style-name="Standard">
      <style:text-properties officeooo:paragraph-rsid="004bb174"/>
    </style:style>
    <style:style style:name="P7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4bb174"/>
    </style:style>
    <style:style style:name="P79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32cb85"/>
    </style:style>
    <style:style style:name="P8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2cb85"/>
    </style:style>
    <style:style style:name="P8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2cb85"/>
    </style:style>
    <style:style style:name="P8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2cb85"/>
    </style:style>
    <style:style style:name="P8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2cb85" officeooo:paragraph-rsid="0032cb85"/>
    </style:style>
    <style:style style:name="P84" style:family="paragraph" style:parent-style-name="Standard">
      <style:text-properties officeooo:rsid="0034170c" officeooo:paragraph-rsid="0034170c"/>
    </style:style>
    <style:style style:name="P85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8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8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8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8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90" style:family="paragraph" style:parent-style-name="Standard">
      <style:paragraph-properties fo:text-align="left" style:justify-single-word="false"/>
      <style:text-properties officeooo:rsid="0023cde6" officeooo:paragraph-rsid="0023cde6"/>
    </style:style>
    <style:style style:name="P91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92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9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9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96" style:family="paragraph" style:parent-style-name="Standard">
      <style:paragraph-properties fo:text-align="left" style:justify-single-word="false"/>
      <style:text-properties officeooo:rsid="00253203" officeooo:paragraph-rsid="00253203"/>
    </style:style>
    <style:style style:name="P9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368ce5"/>
    </style:style>
    <style:style style:name="P9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273623"/>
    </style:style>
    <style:style style:name="P9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10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73623"/>
    </style:style>
    <style:style style:name="P10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102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b174"/>
    </style:style>
    <style:style style:name="P10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4bb174"/>
    </style:style>
    <style:style style:name="P10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4bb174"/>
    </style:style>
    <style:style style:name="P105" style:family="paragraph" style:parent-style-name="Text_20_body">
      <style:paragraph-properties fo:text-align="left" style:justify-single-word="false"/>
      <style:text-properties officeooo:rsid="00253203" officeooo:paragraph-rsid="004bb174"/>
    </style:style>
    <style:style style:name="P106" style:family="paragraph" style:parent-style-name="Standard">
      <style:paragraph-properties fo:text-align="left" style:justify-single-word="false"/>
      <style:text-properties officeooo:rsid="00253203" officeooo:paragraph-rsid="004bb174"/>
    </style:style>
    <style:style style:name="P10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4bb174"/>
    </style:style>
    <style:style style:name="P10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4bb174"/>
    </style:style>
    <style:style style:name="P10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4bb174"/>
    </style:style>
    <style:style style:name="P110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4bb174"/>
    </style:style>
    <style:style style:name="P11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23cde6"/>
    </style:style>
    <style:style style:name="P11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23cde6"/>
    </style:style>
    <style:style style:name="P11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23cde6"/>
    </style:style>
    <style:style style:name="P11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3cde6"/>
    </style:style>
    <style:style style:name="P115" style:family="paragraph" style:parent-style-name="Standard">
      <style:paragraph-properties fo:text-align="left" style:justify-single-word="false"/>
      <style:text-properties officeooo:rsid="00253203" officeooo:paragraph-rsid="00273623"/>
    </style:style>
    <style:style style:name="P1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23cde6"/>
    </style:style>
    <style:style style:name="P11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31b08f"/>
    </style:style>
    <style:style style:name="P1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4bb174"/>
    </style:style>
    <style:style style:name="P119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b2f1d"/>
    </style:style>
    <style:style style:name="P12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f1d"/>
    </style:style>
    <style:style style:name="P12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f1d"/>
    </style:style>
    <style:style style:name="P12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f1d"/>
    </style:style>
    <style:style style:name="P12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5e8f07" officeooo:paragraph-rsid="005e8f07"/>
    </style:style>
    <style:style style:name="P124" style:family="paragraph" style:parent-style-name="Standard">
      <style:paragraph-properties fo:text-align="left" style:justify-single-word="false"/>
      <style:text-properties officeooo:rsid="0060428a" officeooo:paragraph-rsid="0060428a"/>
    </style:style>
    <style:style style:name="P125" style:family="paragraph" style:parent-style-name="Standard">
      <style:paragraph-properties fo:text-align="left" style:justify-single-word="false"/>
      <style:text-properties officeooo:rsid="004bb174" officeooo:paragraph-rsid="0060428a"/>
    </style:style>
    <style:style style:name="P12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b2f1d"/>
    </style:style>
    <style:style style:name="P12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b2f1d"/>
    </style:style>
    <style:style style:name="P12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f1d"/>
    </style:style>
    <style:style style:name="P129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127e"/>
    </style:style>
    <style:style style:name="P13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127e"/>
    </style:style>
    <style:style style:name="P13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127e"/>
    </style:style>
    <style:style style:name="P13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127e"/>
    </style:style>
    <style:style style:name="P13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0428a" officeooo:paragraph-rsid="0060428a"/>
    </style:style>
    <style:style style:name="P134" style:family="paragraph" style:parent-style-name="Standard">
      <style:paragraph-properties fo:text-align="left" style:justify-single-word="false"/>
      <style:text-properties officeooo:rsid="00609b5d" officeooo:paragraph-rsid="00609b5d"/>
    </style:style>
    <style:style style:name="P135" style:family="paragraph" style:parent-style-name="Standard">
      <style:paragraph-properties fo:text-align="left" style:justify-single-word="false"/>
      <style:text-properties officeooo:rsid="004c8e1a" officeooo:paragraph-rsid="004c8e1a"/>
    </style:style>
    <style:style style:name="P13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127e"/>
    </style:style>
    <style:style style:name="P13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127e"/>
    </style:style>
    <style:style style:name="P13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127e"/>
    </style:style>
    <style:style style:name="P139" style:family="paragraph" style:parent-style-name="Standard">
      <style:paragraph-properties fo:text-align="left" style:justify-single-word="false"/>
      <style:text-properties officeooo:paragraph-rsid="001d127e"/>
    </style:style>
    <style:style style:name="P140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4cbb"/>
    </style:style>
    <style:style style:name="P14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4cbb"/>
    </style:style>
    <style:style style:name="P14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4cbb"/>
    </style:style>
    <style:style style:name="P14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4cbb"/>
    </style:style>
    <style:style style:name="P14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287fe" officeooo:paragraph-rsid="006287fe"/>
    </style:style>
    <style:style style:name="P145" style:family="paragraph" style:parent-style-name="Standard">
      <style:paragraph-properties fo:text-align="left" style:justify-single-word="false"/>
      <style:text-properties officeooo:rsid="004c8e1a" officeooo:paragraph-rsid="00628f07"/>
    </style:style>
    <style:style style:name="P14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4cbb"/>
    </style:style>
    <style:style style:name="P14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4cbb"/>
    </style:style>
    <style:style style:name="P14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4cbb"/>
    </style:style>
    <style:style style:name="P14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3603c" officeooo:paragraph-rsid="0063603c"/>
    </style:style>
    <style:style style:name="P150" style:family="paragraph" style:parent-style-name="Standard">
      <style:paragraph-properties fo:text-align="left" style:justify-single-word="false"/>
      <style:text-properties officeooo:rsid="006414a7" officeooo:paragraph-rsid="006414a7"/>
    </style:style>
    <style:style style:name="P151" style:family="paragraph" style:parent-style-name="Standard">
      <style:paragraph-properties fo:text-align="left" style:justify-single-word="false"/>
      <style:text-properties officeooo:rsid="00179f69" officeooo:paragraph-rsid="001d4c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f7a" style:font-weight-asian="normal" style:font-weight-complex="normal"/>
    </style:style>
    <style:style style:name="T5" style:family="text">
      <style:text-properties fo:font-weight="normal" officeooo:rsid="00292b0d" style:font-weight-asian="normal" style:font-weight-complex="normal"/>
    </style:style>
    <style:style style:name="T6" style:family="text">
      <style:text-properties fo:font-weight="normal" officeooo:rsid="004b720a" style:font-weight-asian="normal" style:font-weight-complex="normal"/>
    </style:style>
    <style:style style:name="T7" style:family="text">
      <style:text-properties officeooo:rsid="000e1943"/>
    </style:style>
    <style:style style:name="T8" style:family="text">
      <style:text-properties officeooo:rsid="001ef407"/>
    </style:style>
    <style:style style:name="T9" style:family="text">
      <style:text-properties officeooo:rsid="0031ff13"/>
    </style:style>
    <style:style style:name="T10" style:family="text">
      <style:text-properties officeooo:rsid="0051784a"/>
    </style:style>
    <style:style style:name="T11" style:family="text">
      <style:text-properties officeooo:rsid="005d3103"/>
    </style:style>
    <style:style style:name="T12" style:family="text">
      <style:text-properties officeooo:rsid="001320e9"/>
    </style:style>
    <style:style style:name="T13" style:family="text">
      <style:text-properties officeooo:rsid="005681f8"/>
    </style:style>
    <style:style style:name="T14" style:family="text">
      <style:text-properties officeooo:rsid="001161a1"/>
    </style:style>
    <style:style style:name="T15" style:family="text">
      <style:text-properties officeooo:rsid="0057abac"/>
    </style:style>
    <style:style style:name="T16" style:family="text">
      <style:text-properties officeooo:rsid="001fff60"/>
    </style:style>
    <style:style style:name="T17" style:family="text">
      <style:text-properties officeooo:rsid="000c7e60"/>
    </style:style>
    <style:style style:name="T18" style:family="text">
      <style:text-properties officeooo:rsid="000eeca5"/>
    </style:style>
    <style:style style:name="T19" style:family="text">
      <style:text-properties officeooo:rsid="004fa883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5c161c"/>
    </style:style>
    <style:style style:name="T22" style:family="text">
      <style:text-properties officeooo:rsid="0013829b"/>
    </style:style>
    <style:style style:name="T23" style:family="text">
      <style:text-properties style:text-position="0% 100%" officeooo:rsid="00159f37"/>
    </style:style>
    <style:style style:name="T24" style:family="text">
      <style:text-properties officeooo:rsid="00159f37"/>
    </style:style>
    <style:style style:name="T25" style:family="text">
      <style:text-properties officeooo:rsid="0017be6b"/>
    </style:style>
    <style:style style:name="T26" style:family="text">
      <style:text-properties officeooo:rsid="00185d98"/>
    </style:style>
    <style:style style:name="T27" style:family="text">
      <style:text-properties officeooo:rsid="0015b19b"/>
    </style:style>
    <style:style style:name="T28" style:family="text">
      <style:text-properties officeooo:rsid="0003a9d9"/>
    </style:style>
    <style:style style:name="T29" style:family="text">
      <style:text-properties officeooo:rsid="004b720a"/>
    </style:style>
    <style:style style:name="T30" style:family="text">
      <style:text-properties style:text-position="0% 100%" officeooo:rsid="004b720a"/>
    </style:style>
    <style:style style:name="T31" style:family="text">
      <style:text-properties officeooo:rsid="003fb947"/>
    </style:style>
    <style:style style:name="T32" style:family="text">
      <style:text-properties officeooo:rsid="00423db6"/>
    </style:style>
    <style:style style:name="T33" style:family="text">
      <style:text-properties officeooo:rsid="00149524"/>
    </style:style>
    <style:style style:name="T34" style:family="text">
      <style:text-properties officeooo:rsid="003b7454"/>
    </style:style>
    <style:style style:name="T35" style:family="text">
      <style:text-properties officeooo:rsid="003d62ea"/>
    </style:style>
    <style:style style:name="T36" style:family="text">
      <style:text-properties officeooo:rsid="003d98f4"/>
    </style:style>
    <style:style style:name="T37" style:family="text">
      <style:text-properties officeooo:rsid="00417f9e"/>
    </style:style>
    <style:style style:name="T38" style:family="text">
      <style:text-properties officeooo:rsid="004864ae"/>
    </style:style>
    <style:style style:name="T39" style:family="text">
      <style:text-properties officeooo:rsid="0046c001"/>
    </style:style>
    <style:style style:name="T40" style:family="text">
      <style:text-properties officeooo:rsid="0023cde6"/>
    </style:style>
    <style:style style:name="T41" style:family="text">
      <style:text-properties officeooo:rsid="004bb174"/>
    </style:style>
    <style:style style:name="T42" style:family="text">
      <style:text-properties officeooo:rsid="0032cb85"/>
    </style:style>
    <style:style style:name="T43" style:family="text">
      <style:text-properties officeooo:rsid="0014e212"/>
    </style:style>
    <style:style style:name="T44" style:family="text">
      <style:text-properties style:text-position="0% 100%" officeooo:rsid="0014e212"/>
    </style:style>
    <style:style style:name="T45" style:family="text">
      <style:text-properties officeooo:rsid="00179f69"/>
    </style:style>
    <style:style style:name="T46" style:family="text">
      <style:text-properties officeooo:rsid="0019aa5f"/>
    </style:style>
    <style:style style:name="T47" style:family="text">
      <style:text-properties officeooo:rsid="0027330c"/>
    </style:style>
    <style:style style:name="T48" style:family="text">
      <style:text-properties officeooo:rsid="00273623"/>
    </style:style>
    <style:style style:name="T49" style:family="text">
      <style:text-properties style:text-position="0% 100%" officeooo:rsid="004bb174"/>
    </style:style>
    <style:style style:name="T50" style:family="text">
      <style:text-properties style:text-position="0% 100%" officeooo:rsid="0023cde6"/>
    </style:style>
    <style:style style:name="T51" style:family="text">
      <style:text-properties officeooo:rsid="0026d615"/>
    </style:style>
    <style:style style:name="T52" style:family="text">
      <style:text-properties fo:color="#e16173" loext:opacity="100%" officeooo:rsid="001b2f1d"/>
    </style:style>
    <style:style style:name="T53" style:family="text">
      <style:text-properties fo:color="#e16173" loext:opacity="100%"/>
    </style:style>
    <style:style style:name="T54" style:family="text">
      <style:text-properties fo:color="#e16173" loext:opacity="100%" officeooo:rsid="001d127e"/>
    </style:style>
    <style:style style:name="T55" style:family="text">
      <style:text-properties officeooo:rsid="001b2f1d"/>
    </style:style>
    <style:style style:name="T56" style:family="text">
      <style:text-properties officeooo:rsid="001d127e"/>
    </style:style>
    <style:style style:name="T57" style:family="text">
      <style:text-properties officeooo:rsid="00609b5d"/>
    </style:style>
    <style:style style:name="T58" style:family="text">
      <style:text-properties fo:color="#e16173" loext:opacity="100%" officeooo:rsid="001d4cbb"/>
    </style:style>
    <style:style style:name="T59" style:family="text">
      <style:text-properties officeooo:rsid="001d4cbb"/>
    </style:style>
    <style:style style:name="T60" style:family="text">
      <style:text-properties officeooo:rsid="00628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<text:span text:style-name="T3"> </text:span><text:span text:style-name="T4">Sistema</text:span></text:p>
      <text:p text:style-name="P4">Livello: <text:span text:style-name="T4">Obiettivo Utente</text:span></text:p>
      <text:p text:style-name="P4">Attore primario: <text:span text:style-name="T4">Organizzatore</text:span></text:p>
      <text:p text:style-name="P4">Parti Interessate: <text:span text:style-name="T4">Chef, Personale, Cuoco, </text:span><text:span text:style-name="T5">Cliente</text:span></text:p>
      <text:p text:style-name="P4">Pre-condizioni: <text:span text:style-name="T4">L’</text:span><text:span text:style-name="T6">attore deve essere autenticato come </text:span><text:span text:style-name="T4">Organizzatore </text:span><text:span text:style-name="T6">e</text:span><text:span text:style-name="T4"> deve aver fatto l’accesso alla piattaforma</text:span><text:span text:style-name="T2"><text:line-break/></text:span>Garanzie di successo o post-condizioni: <text:span text:style-name="T4">L’evento o gli eventi sono creati con successo, i compiti sono distribuiti tra tutto il personale, l’evento viene chiuso</text:span></text:p>
      <text:p text:style-name="P5"><text:bookmark text:name="_heading=h.1fob9te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C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7">A</text:span>ccetta la commessa</text:p>
          </table:table-cell>
          <table:table-cell table:style-name="Table1.C2" office:value-type="string">
            <text:p text:style-name="Standard">Registra l'accettazione, genera un ID univoco per il nuovo evento e predispone l'apertura di una nuova scheda evento nello stato "In compilazione".</text:p>
          </table:table-cell>
        </table:table-row>
        <table:table-row table:style-name="Table1.1">
          <table:table-cell table:style-name="Table1.A3" office:value-type="string">
            <text:p text:style-name="P10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11">Valida la correttezza formale e la coerenza di <text:span text:style-name="T8">tutti i</text:span> dati inseriti (es. date, numero di ospiti, tipologia di servizio, <text:span text:style-name="T9">ricorrenza</text:span>).</text:p>
            <text:p text:style-name="Standard">Salva la scheda a database e aggiorna lo stato dell'evento in "<text:span text:style-name="T10">Scheda Salvata</text:span>".</text:p>
          </table:table-cell>
        </table:table-row>
        <table:table-row table:style-name="Table1.1"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2">Associa il profilo dello Chef selezionato alla scheda evento e aggiorna lo stato in "Chef Assegnato".</text:p>
          </table:table-cell>
        </table:table-row>
        <table:table-row table:style-name="Table1.1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3"><text:span text:style-name="T11">Opzionalmente, p</text:span><text:span text:style-name="T12">renota preventivamente</text:span> il personale per <text:span text:style-name="T12">il</text:span><text:span text:style-name="T7"> servizio</text:span></text:p>
          </table:table-cell>
          <table:table-cell table:style-name="Table1.C5" office:value-type="string">
            <text:p text:style-name="P14">Verifica la disponibilità preliminare delle risorse a calendario.</text:p>
            <text:p text:style-name="P14">Riserva temporaneamente le risorse selezionate per le date dell'evento.</text:p>
            <text:p text:style-name="P15">Aggiorna lo stato dell’evento in “Personale prenotato”</text:p>
          </table:table-cell>
        </table:table-row>
        <table:table-row table:style-name="Table1.1">
          <table:table-cell table:style-name="Table1.A6" office:value-type="string">
            <text:p text:style-name="P16">5</text:p>
          </table:table-cell>
          <table:table-cell table:style-name="Table1.B6" office:value-type="string">
            <text:p text:style-name="P13"><text:span text:style-name="T10">Approva</text:span> il menù <text:span text:style-name="T10">ricevuto </text:span>dallo chef</text:p>
          </table:table-cell>
          <table:table-cell table:style-name="Table1.C6" office:value-type="string">
            <text:p text:style-name="Standard">Salva il menù approvato, vincola gli ingredienti/piatti all'evento e cambia lo stato in "<text:span text:style-name="T8">Evento in corso</text:span>".</text:p>
          </table:table-cell>
        </table:table-row>
        <table:table-row table:style-name="Table1.1">
          <table:table-cell table:style-name="Table1.A7" office:value-type="string">
            <text:p text:style-name="P17">6</text:p>
          </table:table-cell>
          <table:table-cell table:style-name="Table1.B7" office:value-type="string">
            <text:p text:style-name="P18"><text:span text:style-name="T13">Assegna</text:span> il personale <text:span text:style-name="T14">in modo definitivo</text:span> <text:span text:style-name="T15">con i loro ruoli</text:span></text:p>
          </table:table-cell>
          <table:table-cell table:style-name="Table1.C7" office:value-type="string">
            <text:p text:style-name="P19">Converte la riserva temporanea del personale confermato in impegno definitivo a calendario, registrando i ruoli operativi specificat<text:span text:style-name="T16">i.</text:span></text:p>
            <text:p text:style-name="P19">Rimuove l'impegno dal calendario per le risorse prenotate in eccesso non confermate, rendendole nuovamente disponibili.</text:p>
            <text:p text:style-name="P20"><text:span text:style-name="T7">L</text:span>ibera il personale in eccesso</text:p>
            <text:p text:style-name="P19">Invia notifica di conferma e dettaglio ruolo allo staff assegnato.</text:p>
            <text:p text:style-name="P21">Aggiorna lo stato dell’evento in “Personale assegnato”</text:p>
          </table:table-cell>
        </table:table-row>
        <text:soft-page-break/>
        <table:table-row table:style-name="Table1.1">
          <table:table-cell table:style-name="Table1.A7" office:value-type="string">
            <text:p text:style-name="P22"/>
          </table:table-cell>
          <table:table-cell table:style-name="Table1.B7" office:value-type="string">
            <text:p text:style-name="P23">Opzionalmente ripete dal punto <text:span text:style-name="T7">4</text:span> <text:span text:style-name="T17">per ogni servizio dell’evento che ne necessita</text:span></text:p>
          </table:table-cell>
          <table:table-cell table:style-name="Table1.C7" office:value-type="string">
            <text:p text:style-name="P24"/>
          </table:table-cell>
        </table:table-row>
        <table:table-row table:style-name="Table1.1">
          <table:table-cell table:style-name="Table1.A9" office:value-type="string">
            <text:p text:style-name="P17">7</text:p>
          </table:table-cell>
          <table:table-cell table:style-name="Table1.B9" office:value-type="string">
            <text:p text:style-name="P25"><text:span text:style-name="T18"><text:s text:c="2"/>S</text:span>ceglie la location e allestisce la sala</text:p>
          </table:table-cell>
          <table:table-cell table:style-name="Table1.C9" office:value-type="string">
            <text:p text:style-name="P14">Registra l'indirizzo e i dettagli logistici della location definitiva sulla scheda evento.</text:p>
            <text:p text:style-name="P14">Genera l'elenco delle attrezzature necessarie per l'allestimento sala.</text:p>
          </table:table-cell>
        </table:table-row>
        <table:table-row table:style-name="Table1.1">
          <table:table-cell table:style-name="Table1.A10" office:value-type="string">
            <text:p text:style-name="P26">8</text:p>
          </table:table-cell>
          <table:table-cell table:style-name="Table1.B10" office:value-type="string">
            <text:p text:style-name="P27"><text:span text:style-name="T19">Opzionalmente,</text:span> <text:span text:style-name="T18">si </text:span>segna alcune note <text:span text:style-name="T18">e</text:span> salv<text:span text:style-name="T18">a</text:span> i menù usati</text:p>
          </table:table-cell>
          <table:table-cell table:style-name="Table1.C10" office:value-type="string">
            <text:p text:style-name="P14">Salva e archivia in modo permanente le note conclusive di fine servizio a storico.</text:p>
            <text:p text:style-name="P12"><text:span text:style-name="T20">Storicizza definitivamente il menù effettivamente servito.</text:span></text:p>
          </table:table-cell>
        </table:table-row>
        <table:table-row table:style-name="Table1.1">
          <table:table-cell table:style-name="Table1.A10" office:value-type="string">
            <text:p text:style-name="P28">9</text:p>
          </table:table-cell>
          <table:table-cell table:style-name="Table1.B10" office:value-type="string">
            <text:p text:style-name="P29">Termina l’evento</text:p>
          </table:table-cell>
          <table:table-cell table:style-name="Table1.C10" office:value-type="string">
            <text:p text:style-name="P30">Aggiorna lo stato della commessa in "Evento Chiuso", segna i compiti come completati e libera definitivamente lo staff.</text:p>
          </table:table-cell>
        </table:table-row>
        <table:table-row table:style-name="Table1.1">
          <table:table-cell table:style-name="Table1.A12" office:value-type="string">
            <text:p text:style-name="P26"/>
          </table:table-cell>
          <table:table-cell table:style-name="Table1.B12" office:value-type="string">
            <text:p text:style-name="P31">Termina il Caso d’Uso</text:p>
          </table:table-cell>
          <table:table-cell table:style-name="Table1.C12" office:value-type="string">
            <text:p text:style-name="P32"/>
          </table:table-cell>
        </table:table-row>
      </table:table>
      <text:p text:style-name="P33"/>
      <text:p text:style-name="P34"/>
      <text:p text:style-name="P35"/>
      <text:p text:style-name="P35"/>
      <text:p text:style-name="P36"><text:span text:style-name="T21">E</text:span>stensione <text:span text:style-name="T22">2</text:span><text:span text:style-name="T23">a</text:span><text:span text:style-name="T22">: </text:span><text:span text:style-name="T24">modifica </text:span><text:span text:style-name="T25">evento</text:span><text:span text:style-name="T24"> prima dell’inizio dei lavori </text:span><text:span text:style-name="T26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><text:bookmark text:name="_heading=h.1t3h5sf Copy 1 Copy 1"/># </text:p>
          </table:table-cell>
          <table:table-cell table:style-name="Table4.B1" office:value-type="string">
            <text:p text:style-name="P38"><text:bookmark text:name="_heading=h.4d34og8 Copy 1 Copy 1"/>Attore</text:p>
          </table:table-cell>
          <table:table-cell table:style-name="Table4.B1" office:value-type="string">
            <text:p text:style-name="P38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39">2a.1</text:p>
          </table:table-cell>
          <table:table-cell table:style-name="Table4.B2" office:value-type="string">
            <text:p text:style-name="P40">Modifica un<text:span text:style-name="T27"> </text:span><text:span text:style-name="T25">evento</text:span> già esistente</text:p>
          </table:table-cell>
          <table:table-cell table:style-name="Table4.C2" office:value-type="string">
            <text:p text:style-name="P41"><text:span text:style-name="T28">Valida la correttezza formale e la coerenza di </text:span><text:span text:style-name="T8">tutti i</text:span><text:span text:style-name="T28"> dati inseriti (es. date, numero di ospiti, tipologia di servizio).</text:span></text:p>
            <text:p text:style-name="P41">Salva a database le modiche effettuate sull’evento esistente</text:p>
          </table:table-cell>
        </table:table-row>
        <table:table-row table:style-name="Table4.1">
          <table:table-cell table:style-name="Table4.A3" office:value-type="string">
            <text:p text:style-name="P39"/>
          </table:table-cell>
          <table:table-cell table:style-name="Table4.B3" office:value-type="string">
            <text:p text:style-name="P42">Riprende da dove si era interrotto</text:p>
          </table:table-cell>
          <table:table-cell table:style-name="Table4.C3" office:value-type="string">
            <text:p text:style-name="P41"/>
          </table:table-cell>
        </table:table-row>
      </table:table>
      <text:p text:style-name="P43"><text:bookmark text:name="Copia _heading=h.3dy6vkm Copy 1 Copy 1 1"/><text:soft-page-break/>Estensione <text:span text:style-name="T22">2</text:span><text:span text:style-name="T29">a</text:span><text:span text:style-name="T23">.</text:span><text:span text:style-name="T30">1a</text:span><text:span text:style-name="T22">: </text:span><text:span text:style-name="T24">modifica </text:span><text:span text:style-name="T25">evento </text:span><text:span text:style-name="T29">ricorrente</text:span><text:span text:style-name="T24"> prima dell’inizio dei lavori </text:span><text:span text:style-name="T26">(fino a punto 4 incluso)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4"><text:bookmark text:name="Copia _heading=h.1t3h5sf Copy 1 Copy 1 1"/># </text:p>
          </table:table-cell>
          <table:table-cell table:style-name="Tabella1.B1" office:value-type="string">
            <text:p text:style-name="P45"><text:bookmark text:name="Copia _heading=h.4d34og8 Copy 1 Copy 1 1"/>Attore</text:p>
          </table:table-cell>
          <table:table-cell table:style-name="Tabella1.B1" office:value-type="string">
            <text:p text:style-name="P45"><text:bookmark text:name="Copia _heading=h.2s8eyo1 Copy 1 Copy 1 1"/>Sistema</text:p>
          </table:table-cell>
        </table:table-row>
        <table:table-row table:style-name="Tabella1.1">
          <table:table-cell table:style-name="Tabella1.A2" office:value-type="string">
            <text:p text:style-name="P46">2a.1<text:span text:style-name="T29">a.1</text:span></text:p>
          </table:table-cell>
          <table:table-cell table:style-name="Tabella1.B2" office:value-type="string">
            <text:p text:style-name="P47">Modifica un<text:span text:style-name="T27"> </text:span><text:span text:style-name="T25">evento</text:span> già esistente</text:p>
          </table:table-cell>
          <table:table-cell table:style-name="Tabella1.C2" office:value-type="string">
            <text:p text:style-name="P48"><text:span text:style-name="T31">C</text:span>hiede se si vuole <text:span text:style-name="T29">modificare</text:span> una sola o tutte le istanze.</text:p>
          </table:table-cell>
        </table:table-row>
        <table:table-row table:style-name="Tabella1.1">
          <table:table-cell table:style-name="Tabella1.A2" office:value-type="string">
            <text:p text:style-name="P49">2a.1a.2</text:p>
          </table:table-cell>
          <table:table-cell table:style-name="Tabella1.B2" office:value-type="string">
            <text:p text:style-name="P50">Sceglie se <text:span text:style-name="T29">modificare</text:span> un solo evento o tutt<text:span text:style-name="T32">e le instanze.</text:span></text:p>
          </table:table-cell>
          <table:table-cell table:style-name="Tabella1.C2" office:value-type="string">
            <text:p text:style-name="P51"><text:span text:style-name="T28">Valida la correttezza formale e la coerenza di </text:span><text:span text:style-name="T8">tutti i</text:span><text:span text:style-name="T28"> dati inseriti (es. date, numero di ospiti, tipologia di servizio).</text:span></text:p>
            <text:p text:style-name="P51">Salva a database le modiche effettuate sull’evento esistente</text:p>
          </table:table-cell>
        </table:table-row>
        <table:table-row table:style-name="Tabella1.1">
          <table:table-cell table:style-name="Tabella1.A4" office:value-type="string">
            <text:p text:style-name="P46"/>
          </table:table-cell>
          <table:table-cell table:style-name="Tabella1.B4" office:value-type="string">
            <text:p text:style-name="P52">Riprende da dove si era interrotto</text:p>
          </table:table-cell>
          <table:table-cell table:style-name="Tabella1.C4" office:value-type="string">
            <text:p text:style-name="P51"/>
          </table:table-cell>
        </table:table-row>
      </table:table>
      <text:p text:style-name="P36"><text:bookmark text:name="_heading=h.3dy6vkm Copy 1 Copy 1 Copy 1"/>Estensione 2<text:span text:style-name="T22">b: </text:span><text:span text:style-name="T27">eliminazione di un </text:span><text:span text:style-name="T25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7"><text:bookmark text:name="_heading=h.1t3h5sf Copy 1 Copy 1 Copy 2"/># </text:p>
          </table:table-cell>
          <table:table-cell table:style-name="Table2.B1" office:value-type="string">
            <text:p text:style-name="P38"><text:bookmark text:name="_heading=h.4d34og8 Copy 1 Copy 1 Copy 2"/>Attore</text:p>
          </table:table-cell>
          <table:table-cell table:style-name="Table2.B1" office:value-type="string">
            <text:p text:style-name="P38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39">2b.<text:span text:style-name="T33">1</text:span></text:p>
          </table:table-cell>
          <table:table-cell table:style-name="Table2.B2" office:value-type="string">
            <text:p text:style-name="P40"><text:span text:style-name="T33">Elimina</text:span> un<text:span text:style-name="T27"> </text:span><text:span text:style-name="T25">evento</text:span> già esistente</text:p>
          </table:table-cell>
          <table:table-cell table:style-name="Table2.C2" office:value-type="string">
            <text:p text:style-name="P53">Rimuove l’evento dal database.</text:p>
          </table:table-cell>
        </table:table-row>
      </table:table>
      <text:p text:style-name="P54"><text:bookmark text:name="_heading=h.3dy6vkm Copy 1 Copy 1 Copy 1 Copy 4"/>Estensione 2<text:span text:style-name="T22">b.</text:span><text:span text:style-name="T34">1a</text:span><text:span text:style-name="T22">: </text:span><text:span text:style-name="T27">eliminazione di un </text:span><text:span text:style-name="T25">evento </text:span><text:span text:style-name="T35">ricorrent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55"><text:bookmark text:name="_heading=h.1t3h5sf Copy 1 Copy 1 Copy 2 Copy 5"/># </text:p>
          </table:table-cell>
          <table:table-cell table:style-name="Table16.B1" office:value-type="string">
            <text:p text:style-name="P56"><text:bookmark text:name="_heading=h.4d34og8 Copy 1 Copy 1 Copy 2 Copy 5"/>Attore</text:p>
          </table:table-cell>
          <table:table-cell table:style-name="Table16.B1" office:value-type="string">
            <text:p text:style-name="P56"><text:bookmark text:name="_heading=h.2s8eyo1 Copy 1 Copy 1 Copy 2 Copy 5"/>Sistema</text:p>
          </table:table-cell>
        </table:table-row>
        <table:table-row table:style-name="Table16.1">
          <table:table-cell table:style-name="Table16.A2" office:value-type="string">
            <text:p text:style-name="P57">2b.<text:span text:style-name="T33">1</text:span><text:span text:style-name="T34">a.</text:span><text:span text:style-name="T35">1</text:span></text:p>
          </table:table-cell>
          <table:table-cell table:style-name="Table16.B2" office:value-type="string">
            <text:p text:style-name="P58"><text:span text:style-name="T33">Elimina</text:span> un<text:span text:style-name="T27"> </text:span><text:span text:style-name="T25">evento</text:span> <text:span text:style-name="T36">ricorrente </text:span>già esistente</text:p>
          </table:table-cell>
          <table:table-cell table:style-name="Table16.C2" office:value-type="string">
            <text:p text:style-name="P59"><text:span text:style-name="T31">C</text:span>hiede se si vuole eliminare una sola o tutte le istanze.</text:p>
          </table:table-cell>
        </table:table-row>
        <table:table-row table:style-name="Table16.1">
          <table:table-cell table:style-name="Table16.A3" office:value-type="string">
            <text:p text:style-name="P60">2b.<text:span text:style-name="T33">1</text:span><text:span text:style-name="T34">a.</text:span><text:span text:style-name="T37">2</text:span></text:p>
          </table:table-cell>
          <table:table-cell table:style-name="Table16.B3" office:value-type="string">
            <text:p text:style-name="P61">Sceglie se eliminare un solo evento o tutt<text:span text:style-name="T32">e le instanze.</text:span></text:p>
          </table:table-cell>
          <table:table-cell table:style-name="Table16.C3" office:value-type="string">
            <text:p text:style-name="P62">Elimina <text:span text:style-name="T38">l’</text:span>/gli event<text:span text:style-name="T39">o/</text:span>i in base alla scelta.</text:p>
          </table:table-cell>
        </table:table-row>
      </table:table>
      <text:p text:style-name="P63">Estensione 2c: anullamento di un evento esistent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4"><text:bookmark text:name="_heading=h.1t3h5sf Copy 1 Copy 1 Copy 2 Copy 4"/># </text:p>
          </table:table-cell>
          <table:table-cell table:style-name="Table7.B1" office:value-type="string">
            <text:p text:style-name="P65"><text:bookmark text:name="_heading=h.4d34og8 Copy 1 Copy 1 Copy 2 Copy 4"/>Attore</text:p>
          </table:table-cell>
          <table:table-cell table:style-name="Table7.B1" office:value-type="string">
            <text:p text:style-name="P65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66">2<text:span text:style-name="T25">c.</text:span><text:span text:style-name="T33">1</text:span></text:p>
          </table:table-cell>
          <table:table-cell table:style-name="Table7.B2" office:value-type="string">
            <text:p text:style-name="P40"><text:span text:style-name="T25">Anulla</text:span> un<text:span text:style-name="T27"> </text:span><text:span text:style-name="T25">evento</text:span> già esistente</text:p>
          </table:table-cell>
          <table:table-cell table:style-name="Table7.C2" office:value-type="string">
            <text:p text:style-name="P67"><text:span text:style-name="T40">Modifica</text:span> la scheda a database aggiorna<text:span text:style-name="T40">ndo</text:span> lo stato dell'evento in "<text:span text:style-name="T40">Annullato</text:span>".</text:p>
          </table:table-cell>
        </table:table-row>
        <table:table-row table:style-name="Table7.1">
          <table:table-cell table:style-name="Table7.A3" office:value-type="string">
            <text:p text:style-name="P66"/>
          </table:table-cell>
          <table:table-cell table:style-name="Table7.B3" office:value-type="string">
            <text:p text:style-name="P68">Termina il caso d’uso</text:p>
          </table:table-cell>
          <table:table-cell table:style-name="Table7.C3" office:value-type="string">
            <text:p text:style-name="P67"/>
          </table:table-cell>
        </table:table-row>
      </table:table>
      <text:p text:style-name="P69"/>
      <text:p text:style-name="P69"><text:soft-page-break/></text:p>
      <text:p text:style-name="P69"/>
      <text:p text:style-name="P69">Estensione 2c.<text:span text:style-name="T41">1a</text:span>: anullamento di un evento <text:span text:style-name="T41">ricorrente</text:span> esistent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70"><text:bookmark text:name="Copia _heading=h.1t3h5sf Copy 1 Copy 1 Copy 2 Copy 4 1"/># </text:p>
          </table:table-cell>
          <table:table-cell table:style-name="Tabella2.B1" office:value-type="string">
            <text:p text:style-name="P71"><text:bookmark text:name="Copia _heading=h.4d34og8 Copy 1 Copy 1 Copy 2 Copy 4 1"/>Attore</text:p>
          </table:table-cell>
          <table:table-cell table:style-name="Tabella2.B1" office:value-type="string">
            <text:p text:style-name="P71"><text:bookmark text:name="Copia _heading=h.2s8eyo1 Copy 1 Copy 1 Copy 2 Copy 4 1"/>Sistema</text:p>
          </table:table-cell>
        </table:table-row>
        <table:table-row table:style-name="Tabella2.1">
          <table:table-cell table:style-name="Tabella2.A2" office:value-type="string">
            <text:p text:style-name="P72">2<text:span text:style-name="T25">c.</text:span><text:span text:style-name="T33">1</text:span><text:span text:style-name="T41">a.1</text:span></text:p>
          </table:table-cell>
          <table:table-cell table:style-name="Tabella2.B2" office:value-type="string">
            <text:p text:style-name="P73"><text:span text:style-name="T25">Anulla</text:span> un<text:span text:style-name="T27"> </text:span><text:span text:style-name="T25">evento</text:span> già esistente</text:p>
          </table:table-cell>
          <table:table-cell table:style-name="Tabella2.C2" office:value-type="string">
            <text:p text:style-name="P74">Chiede se si vuole <text:span text:style-name="T41">annullare</text:span> una sola o tutte le istanze.</text:p>
          </table:table-cell>
        </table:table-row>
        <table:table-row table:style-name="Tabella2.1">
          <table:table-cell table:style-name="Tabella2.A2" office:value-type="string">
            <text:p text:style-name="P75">2c.1a.2</text:p>
          </table:table-cell>
          <table:table-cell table:style-name="Tabella2.B2" office:value-type="string">
            <text:p text:style-name="P76">Sceglie se <text:span text:style-name="T41">annullare</text:span> un solo evento o tutte le instanze.</text:p>
          </table:table-cell>
          <table:table-cell table:style-name="Tabella2.C2" office:value-type="string">
            <text:p text:style-name="P77"><text:span text:style-name="T40">Modifica</text:span> la scheda a database aggiorna<text:span text:style-name="T40">ndo</text:span> lo stato dell'evento in "<text:span text:style-name="T40">Annullato</text:span>".</text:p>
          </table:table-cell>
        </table:table-row>
        <table:table-row table:style-name="Tabella2.1">
          <table:table-cell table:style-name="Tabella2.A4" office:value-type="string">
            <text:p text:style-name="P72"/>
          </table:table-cell>
          <table:table-cell table:style-name="Tabella2.B4" office:value-type="string">
            <text:p text:style-name="P78">Termina il caso d’uso</text:p>
          </table:table-cell>
          <table:table-cell table:style-name="Tabella2.C4" office:value-type="string">
            <text:p text:style-name="P77"/>
          </table:table-cell>
        </table:table-row>
      </table:table>
      <text:p text:style-name="P79"><text:span text:style-name="T25">Estensione 2</text:span><text:span text:style-name="T42">d</text:span><text:span text:style-name="T25">: </text:span><text:span text:style-name="T42">creazione di un evento ricorr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0"><text:bookmark text:name="_heading=h.1t3h5sf Copy 1 Copy 1 Copy 2 Copy 4 Copy 1"/># </text:p>
          </table:table-cell>
          <table:table-cell table:style-name="Table12.B1" office:value-type="string">
            <text:p text:style-name="P81"><text:bookmark text:name="_heading=h.4d34og8 Copy 1 Copy 1 Copy 2 Copy 4 Copy 1"/>Attore</text:p>
          </table:table-cell>
          <table:table-cell table:style-name="Table12.B1" office:value-type="string">
            <text:p text:style-name="P81"><text:bookmark text:name="_heading=h.2s8eyo1 Copy 1 Copy 1 Copy 2 Copy 4 Copy 1"/>Sistema</text:p>
          </table:table-cell>
        </table:table-row>
        <table:table-row table:style-name="Table12.1">
          <table:table-cell table:style-name="Table12.A2" office:value-type="string">
            <text:p text:style-name="P82">2<text:span text:style-name="T42">d</text:span><text:span text:style-name="T25">.</text:span><text:span text:style-name="T33">1</text:span></text:p>
          </table:table-cell>
          <table:table-cell table:style-name="Table12.B2" office:value-type="string">
            <text:p text:style-name="P83">Crea un evento ricorrente indicando o il numero di ricorrenze o la data dell’ultima ricorrenza, e la frequenza.</text:p>
          </table:table-cell>
          <table:table-cell table:style-name="Table12.C2" office:value-type="string">
            <text:p text:style-name="P84">Salva nel database tutte le occorrenze identiche di un evento.</text:p>
          </table:table-cell>
        </table:table-row>
      </table:table>
      <text:p text:style-name="P85"><text:bookmark text:name="_heading=h.3dy6vkm Copy 1 Copy 1 Copy 1 Copy 3"/>Estensione <text:span text:style-name="T43">5</text:span><text:span text:style-name="T44">a</text:span><text:span text:style-name="T43">: </text:span><text:span text:style-name="T45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6"><text:bookmark text:name="_heading=h.1t3h5sf Copy 1 Copy 1 Copy 2 Copy 3"/># </text:p>
          </table:table-cell>
          <table:table-cell table:style-name="Table6.B1" office:value-type="string">
            <text:p text:style-name="P87"><text:bookmark text:name="_heading=h.4d34og8 Copy 1 Copy 1 Copy 2 Copy 3"/>Attore</text:p>
          </table:table-cell>
          <table:table-cell table:style-name="Table6.B1" office:value-type="string">
            <text:p text:style-name="P87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88">5a.1</text:p>
          </table:table-cell>
          <table:table-cell table:style-name="Table6.B2" office:value-type="string">
            <text:p text:style-name="P89">Propone delle modifiche al menù</text:p>
          </table:table-cell>
          <table:table-cell table:style-name="Table6.C2" office:value-type="string">
            <text:p text:style-name="P90">Invia una notifica di modifica allo chef.</text:p>
          </table:table-cell>
        </table:table-row>
      </table:table>
      <text:p text:style-name="P91"><text:bookmark text:name="_heading=h.3dy6vkm Copy 1 Copy 1 Copy 1 Copy 3 Copy 1"/><text:soft-page-break/>Estensione <text:span text:style-name="T46">6</text:span><text:span text:style-name="T44">a</text:span><text:span text:style-name="T43">: </text:span><text:span text:style-name="T46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2"><text:bookmark text:name="_heading=h.1t3h5sf Copy 1 Copy 1 Copy 2 Copy 3 Copy 1"/># </text:p>
          </table:table-cell>
          <table:table-cell table:style-name="Table8.B1" office:value-type="string">
            <text:p text:style-name="P93"><text:bookmark text:name="_heading=h.4d34og8 Copy 1 Copy 1 Copy 2 Copy 3 Copy 1"/>Attore</text:p>
          </table:table-cell>
          <table:table-cell table:style-name="Table8.B1" office:value-type="string">
            <text:p text:style-name="P93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94">6a.1</text:p>
          </table:table-cell>
          <table:table-cell table:style-name="Table8.B2" office:value-type="string">
            <text:p text:style-name="P95">Annulla l’evento</text:p>
          </table:table-cell>
          <table:table-cell table:style-name="Table8.C2" office:value-type="string">
            <text:p text:style-name="P96"><text:span text:style-name="T47">Controlla se le politiche dell’organizzatore applicano una penale. In tal caso, </text:span><text:span text:style-name="T48">richiede l’applicazione della penale.</text:span></text:p>
            <text:p text:style-name="P96">Contrassegna l’evento come “Annullato”.</text:p>
          </table:table-cell>
        </table:table-row>
        <table:table-row table:style-name="Table8.1">
          <table:table-cell table:style-name="Table8.A3" office:value-type="string">
            <text:p text:style-name="P97">6a.2</text:p>
          </table:table-cell>
          <table:table-cell table:style-name="Table8.B3" office:value-type="string">
            <text:p text:style-name="P98">Decide se far pagare la penale</text:p>
          </table:table-cell>
          <table:table-cell table:style-name="Table8.C3" office:value-type="string">
            <text:p text:style-name="P98">In caso affermativo, invia una notifica di pagamento al cliente.</text:p>
          </table:table-cell>
        </table:table-row>
        <table:table-row table:style-name="Table8.1">
          <table:table-cell table:style-name="Table8.A4" office:value-type="string">
            <text:p text:style-name="P99"/>
          </table:table-cell>
          <table:table-cell table:style-name="Table8.B4" office:value-type="string">
            <text:p text:style-name="P100">Termina il caso d’uso</text:p>
          </table:table-cell>
          <table:table-cell table:style-name="Table8.C4" office:value-type="string">
            <text:p text:style-name="P101"/>
          </table:table-cell>
        </table:table-row>
      </table:table>
      <text:p text:style-name="P102"><text:bookmark text:name="Copia _heading=h.3dy6vkm Copy 1 Copy 1 Copy 1 Copy 3 Copy 1 1"/>Estensione <text:span text:style-name="T46">6</text:span><text:span text:style-name="T41">a</text:span><text:span text:style-name="T44">.</text:span><text:span text:style-name="T49">1a</text:span><text:span text:style-name="T43">: </text:span><text:span text:style-name="T46">annullamento evento </text:span><text:span text:style-name="T41">ricorrente</text:span><text:span text:style-name="T46"> con penale (incluso il punto 7)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70"><text:bookmark text:name="Copia _heading=h.1t3h5sf Copy 1 Copy 1 Copy 2 Copy 3 Copy 1 1"/># </text:p>
          </table:table-cell>
          <table:table-cell table:style-name="Tabella3.B1" office:value-type="string">
            <text:p text:style-name="P71"><text:bookmark text:name="Copia _heading=h.4d34og8 Copy 1 Copy 1 Copy 2 Copy 3 Copy 1 1"/>Attore</text:p>
          </table:table-cell>
          <table:table-cell table:style-name="Tabella3.B1" office:value-type="string">
            <text:p text:style-name="P71"><text:bookmark text:name="Copia _heading=h.2s8eyo1 Copy 1 Copy 1 Copy 2 Copy 3 Copy 1 1"/>Sistema</text:p>
          </table:table-cell>
        </table:table-row>
        <table:table-row table:style-name="Tabella3.1">
          <table:table-cell table:style-name="Tabella3.A2" office:value-type="string">
            <text:p text:style-name="P103">6a.1<text:span text:style-name="T41">a.1</text:span></text:p>
          </table:table-cell>
          <table:table-cell table:style-name="Tabella3.B2" office:value-type="string">
            <text:p text:style-name="P104">Annulla l’evento</text:p>
          </table:table-cell>
          <table:table-cell table:style-name="Tabella3.C2" office:value-type="string">
            <text:p text:style-name="P105">Chiede se si vuole <text:span text:style-name="T41">annullare</text:span> una sola o tutte le istanze.</text:p>
            <text:p text:style-name="P106"/>
          </table:table-cell>
        </table:table-row>
        <table:table-row table:style-name="Tabella3.1">
          <table:table-cell table:style-name="Tabella3.A3" office:value-type="string">
            <text:p text:style-name="P107">6a.<text:span text:style-name="T41">1a.2</text:span></text:p>
          </table:table-cell>
          <table:table-cell table:style-name="Tabella3.B3" office:value-type="string">
            <text:p text:style-name="P108">Sceglie se <text:span text:style-name="T41">annullare</text:span> un solo evento o tutte le instanze.</text:p>
            <text:p text:style-name="P108"/>
          </table:table-cell>
          <table:table-cell table:style-name="Tabella3.C3" office:value-type="string">
            <text:p text:style-name="P106"><text:span text:style-name="T47">Controlla se le politiche dell’organizzatore applicano una penale. In tal caso, </text:span><text:span text:style-name="T48">richiede l’applicazione della penale.</text:span></text:p>
            <text:p text:style-name="P106">Contrassegna l’evento come “Annullato”.</text:p>
          </table:table-cell>
        </table:table-row>
        <table:table-row table:style-name="Tabella3.1">
          <table:table-cell table:style-name="Tabella3.A4" office:value-type="string">
            <text:p text:style-name="P72"/>
          </table:table-cell>
          <table:table-cell table:style-name="Tabella3.B4" office:value-type="string">
            <text:p text:style-name="P104">Termina il caso d’uso</text:p>
          </table:table-cell>
          <table:table-cell table:style-name="Tabella3.C4" office:value-type="string">
            <text:p text:style-name="P109"/>
          </table:table-cell>
        </table:table-row>
      </table:table>
      <text:p text:style-name="P110"><text:bookmark text:name="_heading=h.3dy6vkm Copy 1 Copy 1 Copy 1 Copy 3 Copy 1 Copy 2"/><text:soft-page-break/>Estensione <text:span text:style-name="T46">6</text:span><text:span text:style-name="T50">b</text:span><text:span text:style-name="T43">: </text:span><text:span text:style-name="T40">modifica</text:span><text:span text:style-name="T46"> evento con penale (incluso il punto 7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1"><text:bookmark text:name="_heading=h.1t3h5sf Copy 1 Copy 1 Copy 2 Copy 3 Copy 1 Copy 2"/># </text:p>
          </table:table-cell>
          <table:table-cell table:style-name="Table11.B1" office:value-type="string">
            <text:p text:style-name="P112"><text:bookmark text:name="_heading=h.4d34og8 Copy 1 Copy 1 Copy 2 Copy 3 Copy 1 Copy 2"/>Attore</text:p>
          </table:table-cell>
          <table:table-cell table:style-name="Table11.B1" office:value-type="string">
            <text:p text:style-name="P112"><text:bookmark text:name="_heading=h.2s8eyo1 Copy 1 Copy 1 Copy 2 Copy 3 Copy 1 Copy 2"/>Sistema</text:p>
          </table:table-cell>
        </table:table-row>
        <table:table-row table:style-name="Table11.1">
          <table:table-cell table:style-name="Table11.A2" office:value-type="string">
            <text:p text:style-name="P113">6<text:span text:style-name="T51">b</text:span>.1</text:p>
          </table:table-cell>
          <table:table-cell table:style-name="Table11.B2" office:value-type="string">
            <text:p text:style-name="P114"><text:span text:style-name="T40">Modifica</text:span> l’event<text:span text:style-name="T48">o</text:span></text:p>
          </table:table-cell>
          <table:table-cell table:style-name="Table11.C2" office:value-type="string">
            <text:p text:style-name="P115"><text:span text:style-name="T47">Controlla se le politiche dell’organizzatore applicano una penale. In tal caso, </text:span><text:span text:style-name="T48">richiede l’applicazione della penale.</text:span></text:p>
            <text:p text:style-name="P96">Salva le modifiche dell’evento nel database.</text:p>
          </table:table-cell>
        </table:table-row>
        <table:table-row table:style-name="Table11.1">
          <table:table-cell table:style-name="Table11.A3" office:value-type="string">
            <text:p text:style-name="P97">6b.2</text:p>
          </table:table-cell>
          <table:table-cell table:style-name="Table11.B3" office:value-type="string">
            <text:p text:style-name="P98">Decide se far pagare la penale</text:p>
          </table:table-cell>
          <table:table-cell table:style-name="Table11.C3" office:value-type="string">
            <text:p text:style-name="P115">Invia una richiesta di pagamento della penale al cliente.</text:p>
          </table:table-cell>
        </table:table-row>
        <table:table-row table:style-name="Table11.1">
          <table:table-cell table:style-name="Table11.A4" office:value-type="string">
            <text:p text:style-name="P116"/>
          </table:table-cell>
          <table:table-cell table:style-name="Table11.B4" office:value-type="string">
            <text:p text:style-name="P117">Riprende da dove si era interrotto</text:p>
          </table:table-cell>
          <table:table-cell table:style-name="Table11.C4" office:value-type="string">
            <text:p text:style-name="P115"/>
          </table:table-cell>
        </table:table-row>
      </table:table>
      <text:p text:style-name="P110"><text:bookmark text:name="Copia _heading=h.3dy6vkm Copy 1 Copy 1 Copy 1 Copy 3 Copy 1 Copy 2 1"/>Estensione <text:span text:style-name="T46">6</text:span><text:span text:style-name="T50">b.</text:span><text:span text:style-name="T49">1a</text:span><text:span text:style-name="T43">: </text:span><text:span text:style-name="T40">modifica</text:span><text:span text:style-name="T46"> evento </text:span><text:span text:style-name="T41">ricorrente </text:span><text:span text:style-name="T46">con penale (incluso il punto 7)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70"><text:bookmark text:name="Copia _heading=h.1t3h5sf Copy 1 Copy 1 Copy 2 Copy 3 Copy 1 Copy 2 1"/># </text:p>
          </table:table-cell>
          <table:table-cell table:style-name="Tabella4.B1" office:value-type="string">
            <text:p text:style-name="P71"><text:bookmark text:name="Copia _heading=h.4d34og8 Copy 1 Copy 1 Copy 2 Copy 3 Copy 1 Copy 2 1"/>Attore</text:p>
          </table:table-cell>
          <table:table-cell table:style-name="Tabella4.B1" office:value-type="string">
            <text:p text:style-name="P71"><text:bookmark text:name="Copia _heading=h.2s8eyo1 Copy 1 Copy 1 Copy 2 Copy 3 Copy 1 Copy 2 1"/>Sistema</text:p>
          </table:table-cell>
        </table:table-row>
        <table:table-row table:style-name="Tabella4.1">
          <table:table-cell table:style-name="Tabella4.A2" office:value-type="string">
            <text:p text:style-name="P103">6<text:span text:style-name="T51">b</text:span>.1</text:p>
          </table:table-cell>
          <table:table-cell table:style-name="Tabella4.B2" office:value-type="string">
            <text:p text:style-name="P104"><text:span text:style-name="T40">Modifica</text:span> l’event<text:span text:style-name="T48">o</text:span></text:p>
          </table:table-cell>
          <table:table-cell table:style-name="Tabella4.C2" office:value-type="string">
            <text:p text:style-name="P105">Chiede se si vuole <text:span text:style-name="T41">modificare</text:span> una sola o tutte le istanze.</text:p>
            <text:p text:style-name="P106"/>
          </table:table-cell>
        </table:table-row>
        <table:table-row table:style-name="Tabella4.1">
          <table:table-cell table:style-name="Tabella4.A3" office:value-type="string">
            <text:p text:style-name="P107">6b.2</text:p>
          </table:table-cell>
          <table:table-cell table:style-name="Tabella4.B3" office:value-type="string">
            <text:p text:style-name="P108">Sceglie se <text:span text:style-name="T41">modificare</text:span> un solo evento o tutte le instanze.</text:p>
            <text:p text:style-name="P108"/>
          </table:table-cell>
          <table:table-cell table:style-name="Tabella4.C3" office:value-type="string">
            <text:p text:style-name="P106"><text:span text:style-name="T47">Controlla se le politiche dell’organizzatore applicano una penale. In tal caso, </text:span><text:span text:style-name="T48">richiede l’applicazione della penale.</text:span></text:p>
            <text:p text:style-name="P106">Salva le modifiche dell’evento nel database.</text:p>
          </table:table-cell>
        </table:table-row>
        <table:table-row table:style-name="Tabella4.1">
          <table:table-cell table:style-name="Tabella4.A4" office:value-type="string">
            <text:p text:style-name="P72"/>
          </table:table-cell>
          <table:table-cell table:style-name="Tabella4.B4" office:value-type="string">
            <text:p text:style-name="P118">Riprende da dove si era interrotto</text:p>
          </table:table-cell>
          <table:table-cell table:style-name="Tabella4.C4" office:value-type="string">
            <text:p text:style-name="P106"/>
          </table:table-cell>
        </table:table-row>
      </table:table>
      <text:p text:style-name="P110"><text:soft-page-break/></text:p>
      <text:p text:style-name="P119"><text:span text:style-name="T52">Eccezione</text:span><text:span text:style-name="T53"> </text:span><text:span text:style-name="T54">1a</text:span>: <text:span text:style-name="T55">mancanza di dati obbligatori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0"><text:bookmark text:name="_heading=h.1t3h5sf Copy 1 Copy 2"/># </text:p>
          </table:table-cell>
          <table:table-cell table:style-name="Table10.B1" office:value-type="string">
            <text:p text:style-name="P121"><text:bookmark text:name="_heading=h.4d34og8 Copy 1 Copy 2"/>Attore</text:p>
          </table:table-cell>
          <table:table-cell table:style-name="Table10.B1" office:value-type="string">
            <text:p text:style-name="P121"><text:bookmark text:name="_heading=h.2s8eyo1 Copy 1 Copy 2"/>Sistema</text:p>
          </table:table-cell>
        </table:table-row>
        <table:table-row table:style-name="Table10.1">
          <table:table-cell table:style-name="Table10.A2" office:value-type="string">
            <text:p text:style-name="P122"><text:bookmark text:name="_heading=h.17dp8vu Copy 1 Copy 1"/>1a.1</text:p>
          </table:table-cell>
          <table:table-cell table:style-name="Table10.B2" office:value-type="string">
            <text:p text:style-name="P123">Accetta la commessa</text:p>
          </table:table-cell>
          <table:table-cell table:style-name="Table10.C2" office:value-type="string">
            <text:p text:style-name="P124">Dati mancanti nella commessa.</text:p>
            <text:p text:style-name="P125">Notifica il cliente.</text:p>
            <text:p text:style-name="P125"><text:span text:style-name="T55">Viene rifiutata la commessa.</text:span></text:p>
          </table:table-cell>
        </table:table-row>
        <table:table-row table:style-name="Table10.1">
          <table:table-cell table:style-name="Table10.A3" office:value-type="string">
            <text:p text:style-name="P126"/>
          </table:table-cell>
          <table:table-cell table:style-name="Table10.B3" office:value-type="string">
            <text:p text:style-name="P127">Termina il Caso d’Uso</text:p>
          </table:table-cell>
          <table:table-cell table:style-name="Table10.C3" office:value-type="string">
            <text:p text:style-name="P128"/>
          </table:table-cell>
        </table:table-row>
      </table:table>
      <text:p text:style-name="P129"><text:span text:style-name="T52">Eccezione</text:span><text:span text:style-name="T53"> </text:span><text:span text:style-name="T54">3a</text:span>: <text:span text:style-name="T56">mancanza di uno chef idoneo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0"><text:bookmark text:name="_heading=h.1t3h5sf Copy 1 Copy 2 Copy 1 Copy 2"/># </text:p>
          </table:table-cell>
          <table:table-cell table:style-name="Table13.B1" office:value-type="string">
            <text:p text:style-name="P131"><text:bookmark text:name="_heading=h.4d34og8 Copy 1 Copy 2 Copy 1 Copy 2"/>Attore</text:p>
          </table:table-cell>
          <table:table-cell table:style-name="Table13.B1" office:value-type="string">
            <text:p text:style-name="P131"><text:bookmark text:name="_heading=h.2s8eyo1 Copy 1 Copy 2 Copy 1 Copy 2"/>Sistema</text:p>
          </table:table-cell>
        </table:table-row>
        <table:table-row table:style-name="Table13.1">
          <table:table-cell table:style-name="Table13.A2" office:value-type="string">
            <text:p text:style-name="P132"><text:span text:style-name="T57">3</text:span>a.1</text:p>
          </table:table-cell>
          <table:table-cell table:style-name="Table13.B2" office:value-type="string">
            <text:p text:style-name="P133">Assegna uno chef all’evento</text:p>
          </table:table-cell>
          <table:table-cell table:style-name="Table13.C2" office:value-type="string">
            <text:p text:style-name="P134">Non trova uno chef idoneo.</text:p>
            <text:p text:style-name="P135">Notifica l’organizzatore che non sono disponibili Chef per l’evento.</text:p>
          </table:table-cell>
        </table:table-row>
        <table:table-row table:style-name="Table13.1">
          <table:table-cell table:style-name="Table13.A3" office:value-type="string">
            <text:p text:style-name="P136"/>
          </table:table-cell>
          <table:table-cell table:style-name="Table13.B3" office:value-type="string">
            <text:p text:style-name="P137">Termina il Caso d’Uso</text:p>
          </table:table-cell>
          <table:table-cell table:style-name="Table13.C3" office:value-type="string">
            <text:p text:style-name="P138"/>
          </table:table-cell>
        </table:table-row>
      </table:table>
      <text:p text:style-name="P139"/>
      <text:p text:style-name="P140"><text:span text:style-name="T52">Eccezione</text:span><text:span text:style-name="T53"> </text:span><text:span text:style-name="T58">4a</text:span>: <text:span text:style-name="T56">mancanza di </text:span><text:span text:style-name="T59">personal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1"><text:bookmark text:name="_heading=h.1t3h5sf Copy 1 Copy 2 Copy 1 Copy 2 Copy 1"/># </text:p>
          </table:table-cell>
          <table:table-cell table:style-name="Table14.B1" office:value-type="string">
            <text:p text:style-name="P142"><text:bookmark text:name="_heading=h.4d34og8 Copy 1 Copy 2 Copy 1 Copy 2 Copy 1"/>Attore</text:p>
          </table:table-cell>
          <table:table-cell table:style-name="Table14.B1" office:value-type="string">
            <text:p text:style-name="P142"><text:bookmark text:name="_heading=h.2s8eyo1 Copy 1 Copy 2 Copy 1 Copy 2 Copy 1"/>Sistema</text:p>
          </table:table-cell>
        </table:table-row>
        <table:table-row table:style-name="Table14.1">
          <table:table-cell table:style-name="Table14.A2" office:value-type="string">
            <text:p text:style-name="P143"><text:span text:style-name="T57">4</text:span>a.1</text:p>
          </table:table-cell>
          <table:table-cell table:style-name="Table14.B2" office:value-type="string">
            <text:p text:style-name="P144">Prenota il personale per il servizio</text:p>
          </table:table-cell>
          <table:table-cell table:style-name="Table14.C2" office:value-type="string">
            <text:p text:style-name="P145"><text:span text:style-name="T60">Non trova il personale sufficiente</text:span>.</text:p>
            <text:p text:style-name="P145">Notifica l’organizzatore che non c’è abbastanza personale disponibile per il dato evento/servizio.</text:p>
          </table:table-cell>
        </table:table-row>
        <table:table-row table:style-name="Table14.1">
          <table:table-cell table:style-name="Table14.A3" office:value-type="string">
            <text:p text:style-name="P146"/>
          </table:table-cell>
          <table:table-cell table:style-name="Table14.B3" office:value-type="string">
            <text:p text:style-name="P147">Termina il Caso d’Uso</text:p>
          </table:table-cell>
          <table:table-cell table:style-name="Table14.C3" office:value-type="string">
            <text:p text:style-name="P148"/>
          </table:table-cell>
        </table:table-row>
      </table:table>
      <text:p text:style-name="P140"><text:soft-page-break/><text:span text:style-name="T52">Eccezione</text:span><text:span text:style-name="T53"> </text:span><text:span text:style-name="T58">5a</text:span>: <text:span text:style-name="T59">mancanza di ricezione del menù nei tempi previsti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1"><text:bookmark text:name="_heading=h.1t3h5sf Copy 1 Copy 2 Copy 1 Copy 2 Copy 1 Copy 1"/># </text:p>
          </table:table-cell>
          <table:table-cell table:style-name="Table15.B1" office:value-type="string">
            <text:p text:style-name="P142"><text:bookmark text:name="_heading=h.4d34og8 Copy 1 Copy 2 Copy 1 Copy 2 Copy 1 Copy 1"/>Attore</text:p>
          </table:table-cell>
          <table:table-cell table:style-name="Table15.B1" office:value-type="string">
            <text:p text:style-name="P142"><text:bookmark text:name="_heading=h.2s8eyo1 Copy 1 Copy 2 Copy 1 Copy 2 Copy 1 Copy 1"/>Sistema</text:p>
          </table:table-cell>
        </table:table-row>
        <table:table-row table:style-name="Table15.1">
          <table:table-cell table:style-name="Table15.A2" office:value-type="string">
            <text:p text:style-name="P143"><text:span text:style-name="T57">5</text:span>a.1</text:p>
          </table:table-cell>
          <table:table-cell table:style-name="Table15.B2" office:value-type="string">
            <text:p text:style-name="P149">Approva il menù ricevuto dallo chef</text:p>
          </table:table-cell>
          <table:table-cell table:style-name="Table15.C2" office:value-type="string">
            <text:p text:style-name="P150">Lo chef non invia il menù entro la data limite.</text:p>
            <text:p text:style-name="P135">Notifica l’organizzatore della mancata ricezione del menù.</text:p>
          </table:table-cell>
        </table:table-row>
        <table:table-row table:style-name="Table15.1">
          <table:table-cell table:style-name="Table15.A3" office:value-type="string">
            <text:p text:style-name="P146"/>
          </table:table-cell>
          <table:table-cell table:style-name="Table15.B3" office:value-type="string">
            <text:p text:style-name="P147">Termina il Caso d’Uso</text:p>
          </table:table-cell>
          <table:table-cell table:style-name="Table15.C3" office:value-type="string">
            <text:p text:style-name="P148"/>
          </table:table-cell>
        </table:table-row>
      </table:table>
      <text:p text:style-name="P1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18T17:21:37.227700456</dc:date>
    <meta:editing-duration>PT7H13M43S</meta:editing-duration>
    <meta:editing-cycles>74</meta:editing-cycles>
    <meta:document-statistic meta:table-count="17" meta:image-count="0" meta:object-count="0" meta:page-count="9" meta:paragraph-count="206" meta:word-count="1103" meta:character-count="7169" meta:non-whitespace-character-count="6253"/>
  </office:meta>
</office:document-meta>
</file>