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text-properties fo:font-size="10pt" fo:font-weight="bold" officeooo:rsid="000292f3" officeooo:paragraph-rsid="002bcc91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10pt" style:text-underline-style="none" officeooo:rsid="0003693d" officeooo:paragraph-rsid="002bcc91" style:font-size-asian="10pt" style:font-size-complex="10pt"/>
    </style:style>
    <style:style style:name="P3" style:family="paragraph" style:parent-style-name="Standard">
      <style:text-properties fo:font-size="10pt" style:text-underline-style="none" fo:font-weight="bold" officeooo:rsid="000669bb" officeooo:paragraph-rsid="002bcc91" style:font-size-asian="10pt" style:font-weight-asian="bold" style:font-size-complex="10pt" style:font-weight-complex="bold"/>
    </style:style>
    <style:style style:name="P4" style:family="paragraph" style:parent-style-name="Standard" style:list-style-name="L1">
      <style:text-properties style:use-window-font-color="true" loext:opacity="0%" fo:font-size="10pt" style:text-underline-style="none" fo:font-weight="normal" officeooo:rsid="0026a191" officeooo:paragraph-rsid="002bcc91" fo:background-color="transparent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text-properties style:use-window-font-color="true" loext:opacity="0%" fo:font-size="10pt" style:text-underline-style="none" fo:font-weight="normal" officeooo:rsid="00112863" officeooo:paragraph-rsid="002bcc91" fo:background-color="transparent" style:font-size-asian="10pt" style:font-weight-asian="normal" style:font-size-complex="10pt" style:font-weight-complex="normal"/>
    </style:style>
    <style:style style:name="P6" style:family="paragraph" style:parent-style-name="Standard" style:list-style-name="L1">
      <style:text-properties style:use-window-font-color="true" loext:opacity="0%" fo:font-size="10pt" fo:font-style="normal" style:text-underline-style="none" fo:font-weight="normal" officeooo:rsid="002d9d3b" officeooo:paragraph-rsid="002d9d3b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text-properties fo:font-size="10pt" style:text-underline-style="none" fo:font-weight="bold" officeooo:rsid="0007f9ae" officeooo:paragraph-rsid="002bcc91" style:font-size-asian="10pt" style:font-weight-asian="bold" style:font-size-complex="10pt" style:font-weight-complex="bold"/>
    </style:style>
    <style:style style:name="P8" style:family="paragraph" style:parent-style-name="Standard" style:list-style-name="L2">
      <style:text-properties style:use-window-font-color="true" loext:opacity="0%" fo:font-size="10pt" fo:font-style="normal" style:text-underline-style="none" fo:font-weight="normal" officeooo:rsid="00112863" officeooo:paragraph-rsid="002d9d3b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 style:list-style-name="L2">
      <style:text-properties style:use-window-font-color="true" loext:opacity="0%" fo:font-size="10pt" style:text-underline-style="none" fo:font-weight="normal" officeooo:rsid="00107d1c" officeooo:paragraph-rsid="002d9d3b" fo:background-color="transparent" style:font-size-asian="10pt" style:font-weight-asian="normal" style:font-size-complex="10pt" style:font-weight-complex="normal"/>
    </style:style>
    <style:style style:name="P10" style:family="paragraph" style:parent-style-name="Standard" style:list-style-name="L2">
      <style:text-properties style:use-window-font-color="true" loext:opacity="0%" fo:font-size="10pt" fo:font-style="normal" style:text-underline-style="none" fo:font-weight="normal" officeooo:rsid="0012f3bc" officeooo:paragraph-rsid="002d9d3b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 style:list-style-name="L2">
      <style:text-properties style:use-window-font-color="true" loext:opacity="0%" fo:font-size="10pt" fo:font-style="normal" style:text-underline-style="none" fo:font-weight="normal" officeooo:rsid="0012f3bc" officeooo:paragraph-rsid="0032a021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text-properties fo:font-size="10pt" fo:font-weight="bold" officeooo:rsid="000292f3" officeooo:paragraph-rsid="002e0fa9" style:font-size-asian="10pt" style:font-weight-asian="bold" style:font-size-complex="10pt" style:font-weight-complex="bold"/>
    </style:style>
    <style:style style:name="P13" style:family="paragraph" style:parent-style-name="Standard">
      <style:text-properties fo:font-size="10pt" fo:font-weight="bold" officeooo:rsid="000292f3" officeooo:paragraph-rsid="0030c69d" style:font-size-asian="10pt" style:font-weight-asian="bold" style:font-size-complex="10pt" style:font-weight-complex="bold"/>
    </style:style>
    <style:style style:name="P14" style:family="paragraph" style:parent-style-name="Standard">
      <style:text-properties fo:font-size="10pt" style:text-underline-style="none" officeooo:rsid="0003693d" officeooo:paragraph-rsid="002e0fa9" style:font-size-asian="10pt" style:font-size-complex="10pt"/>
    </style:style>
    <style:style style:name="P15" style:family="paragraph" style:parent-style-name="Standard">
      <style:text-properties fo:font-size="10pt" style:text-underline-style="none" fo:font-weight="bold" officeooo:rsid="000669bb" officeooo:paragraph-rsid="002e0fa9" style:font-size-asian="10pt" style:font-weight-asian="bold" style:font-size-complex="10pt" style:font-weight-complex="bold"/>
    </style:style>
    <style:style style:name="P16" style:family="paragraph" style:parent-style-name="Standard" style:list-style-name="L1">
      <style:text-properties style:use-window-font-color="true" loext:opacity="0%" fo:font-size="10pt" style:text-underline-style="none" fo:font-weight="normal" officeooo:rsid="0026a191" officeooo:paragraph-rsid="0030c69d" fo:background-color="transparent" style:font-size-asian="10pt" style:font-weight-asian="normal" style:font-size-complex="10pt" style:font-weight-complex="normal"/>
    </style:style>
    <style:style style:name="P17" style:family="paragraph" style:parent-style-name="Standard" style:list-style-name="L1">
      <style:text-properties officeooo:paragraph-rsid="0030c69d"/>
    </style:style>
    <style:style style:name="P18" style:family="paragraph" style:parent-style-name="Standard">
      <style:text-properties fo:font-size="10pt" style:text-underline-style="none" fo:font-weight="bold" officeooo:rsid="0007f9ae" officeooo:paragraph-rsid="002e0fa9" style:font-size-asian="10pt" style:font-weight-asian="bold" style:font-size-complex="10pt" style:font-weight-complex="bold"/>
    </style:style>
    <style:style style:name="P19" style:family="paragraph" style:parent-style-name="Standard" style:list-style-name="L3">
      <style:text-properties officeooo:paragraph-rsid="0030c69d"/>
    </style:style>
    <style:style style:name="P20" style:family="paragraph" style:parent-style-name="Standard" style:list-style-name="L3">
      <style:text-properties style:use-window-font-color="true" loext:opacity="0%" fo:font-size="10pt" fo:font-style="normal" style:text-underline-style="none" fo:font-weight="normal" officeooo:rsid="0012f3bc" officeooo:paragraph-rsid="0030c69d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text-properties fo:font-size="10pt" fo:font-weight="bold" officeooo:rsid="000292f3" officeooo:paragraph-rsid="0032a021" style:font-size-asian="10pt" style:font-weight-asian="bold" style:font-size-complex="10pt" style:font-weight-complex="bold"/>
    </style:style>
    <style:style style:name="P22" style:family="paragraph" style:parent-style-name="Standard">
      <style:text-properties fo:font-size="10pt" style:text-underline-style="none" officeooo:rsid="0003693d" officeooo:paragraph-rsid="0032a021" style:font-size-asian="10pt" style:font-size-complex="10pt"/>
    </style:style>
    <style:style style:name="P23" style:family="paragraph" style:parent-style-name="Standard">
      <style:text-properties fo:font-size="10pt" style:text-underline-style="none" fo:font-weight="bold" officeooo:rsid="000669bb" officeooo:paragraph-rsid="0032a021" style:font-size-asian="10pt" style:font-weight-asian="bold" style:font-size-complex="10pt" style:font-weight-complex="bold"/>
    </style:style>
    <style:style style:name="P24" style:family="paragraph" style:parent-style-name="Standard" style:list-style-name="L1">
      <style:text-properties style:use-window-font-color="true" loext:opacity="0%" fo:font-size="10pt" style:text-underline-style="none" fo:font-weight="normal" officeooo:rsid="0026a191" officeooo:paragraph-rsid="0038d241" fo:background-color="transparent" style:font-size-asian="10pt" style:font-weight-asian="normal" style:font-size-complex="10pt" style:font-weight-complex="normal"/>
    </style:style>
    <style:style style:name="P25" style:family="paragraph" style:parent-style-name="Standard" style:list-style-name="L1">
      <style:text-properties style:use-window-font-color="true" loext:opacity="0%" fo:font-size="10pt" style:text-underline-style="none" fo:font-weight="normal" officeooo:rsid="00112863" officeooo:paragraph-rsid="0038d241" fo:background-color="transparent" style:font-size-asian="10pt" style:font-weight-asian="normal" style:font-size-complex="10pt" style:font-weight-complex="normal"/>
    </style:style>
    <style:style style:name="P26" style:family="paragraph" style:parent-style-name="Standard">
      <style:text-properties style:use-window-font-color="true" loext:opacity="0%" fo:font-size="10pt" style:text-underline-style="none" fo:font-weight="bold" officeooo:rsid="0007f9ae" officeooo:paragraph-rsid="0032a021" style:font-size-asian="10pt" style:font-weight-asian="bold" style:font-size-complex="10pt" style:font-weight-complex="bold"/>
    </style:style>
    <style:style style:name="P27" style:family="paragraph" style:parent-style-name="Standard">
      <style:text-properties fo:font-size="10pt" style:text-underline-style="none" fo:font-weight="bold" officeooo:rsid="0007f9ae" officeooo:paragraph-rsid="0032a021" style:font-size-asian="10pt" style:font-weight-asian="bold" style:font-size-complex="10pt" style:font-weight-complex="bold"/>
    </style:style>
    <style:style style:name="P28" style:family="paragraph" style:parent-style-name="Standard" style:list-style-name="L4">
      <style:text-properties style:use-window-font-color="true" loext:opacity="0%" fo:font-size="10pt" fo:font-style="normal" style:text-underline-style="none" fo:font-weight="normal" officeooo:rsid="0038d241" officeooo:paragraph-rsid="0038d241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 style:list-style-name="L4">
      <style:text-properties style:use-window-font-color="true" loext:opacity="0%" fo:font-size="10pt" fo:font-style="normal" style:text-underline-style="none" fo:font-weight="normal" officeooo:rsid="00112863" officeooo:paragraph-rsid="0038d241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 style:list-style-name="L4">
      <style:text-properties style:use-window-font-color="true" loext:opacity="0%" fo:font-size="10pt" style:text-underline-style="none" fo:font-weight="normal" officeooo:rsid="00107d1c" officeooo:paragraph-rsid="0038d241" fo:background-color="transparent" style:font-size-asian="10pt" style:font-weight-asian="normal" style:font-size-complex="10pt" style:font-weight-complex="normal"/>
    </style:style>
    <style:style style:name="P31" style:family="paragraph" style:parent-style-name="Standard" style:list-style-name="L4">
      <style:text-properties style:use-window-font-color="true" loext:opacity="0%" fo:font-size="10pt" fo:font-style="normal" style:text-underline-style="none" fo:font-weight="normal" officeooo:rsid="0012f3bc" officeooo:paragraph-rsid="0038d241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style:text-properties fo:font-size="10pt" fo:font-style="normal" style:text-underline-style="none" fo:font-weight="normal" officeooo:rsid="001a38ce" officeooo:paragraph-rsid="0032a021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>
      <style:text-properties fo:font-size="10pt" fo:font-style="normal" style:text-underline-style="none" fo:font-weight="bold" officeooo:rsid="001a38ce" officeooo:paragraph-rsid="0032a021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Standard" style:list-style-name="L5">
      <style:text-properties fo:font-size="10pt" fo:font-style="normal" style:text-underline-style="none" fo:font-weight="normal" officeooo:rsid="001a38ce" officeooo:paragraph-rsid="0032a021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 style:list-style-name="L5">
      <style:text-properties fo:font-size="10pt" fo:font-style="normal" style:text-underline-style="none" fo:font-weight="normal" officeooo:rsid="0037b2d3" officeooo:paragraph-rsid="0037b2d3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 style:list-style-name="L6">
      <style:text-properties fo:font-size="10pt" fo:font-style="normal" style:text-underline-style="none" fo:font-weight="normal" officeooo:rsid="001a38ce" officeooo:paragraph-rsid="0032a021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 style:list-style-name="L6">
      <style:text-properties fo:font-size="10pt" fo:font-style="normal" style:text-underline-style="none" fo:font-weight="normal" officeooo:rsid="0037b2d3" officeooo:paragraph-rsid="0037b2d3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 style:list-style-name="L7">
      <style:text-properties fo:font-size="10pt" fo:font-style="normal" style:text-underline-style="none" fo:font-weight="normal" officeooo:rsid="001a38ce" officeooo:paragraph-rsid="0032a021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Standard" style:list-style-name="L7">
      <style:text-properties fo:font-size="10pt" fo:font-style="normal" style:text-underline-style="none" fo:font-weight="normal" officeooo:rsid="001a38ce" officeooo:paragraph-rsid="0037b2d3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Standard" style:list-style-name="L8">
      <style:text-properties fo:font-size="10pt" fo:font-style="normal" style:text-underline-style="none" fo:font-weight="normal" officeooo:rsid="001a38ce" officeooo:paragraph-rsid="0032a021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 style:list-style-name="L8">
      <style:text-properties fo:font-size="10pt" fo:font-style="normal" style:text-underline-style="none" fo:font-weight="normal" officeooo:rsid="001a38ce" officeooo:paragraph-rsid="0037b2d3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Standard" style:list-style-name="L8">
      <style:text-properties fo:font-size="10pt" fo:font-style="normal" style:text-underline-style="none" fo:font-weight="normal" officeooo:rsid="001a38ce" officeooo:paragraph-rsid="0038d241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02bcc91"/>
    </style:style>
    <style:style style:name="T2" style:family="text">
      <style:text-properties style:text-position="0% 100%" officeooo:rsid="002bcc91"/>
    </style:style>
    <style:style style:name="T3" style:family="text">
      <style:text-properties officeooo:rsid="0032a021"/>
    </style:style>
    <style:style style:name="T4" style:family="text">
      <style:text-properties officeooo:rsid="0007f9ae"/>
    </style:style>
    <style:style style:name="T5" style:family="text">
      <style:text-properties style:text-underline-style="solid" style:text-underline-width="auto" style:text-underline-color="font-color" officeooo:rsid="002d9d3b"/>
    </style:style>
    <style:style style:name="T6" style:family="text">
      <style:text-properties style:text-underline-style="none" officeooo:rsid="002d9d3b"/>
    </style:style>
    <style:style style:name="T7" style:family="text">
      <style:text-properties style:text-underline-style="none" officeooo:rsid="002e0fa9"/>
    </style:style>
    <style:style style:name="T8" style:family="text">
      <style:text-properties style:use-window-font-color="true" loext:opacity="0%"/>
    </style:style>
    <style:style style:name="T9" style:family="text">
      <style:text-properties officeooo:rsid="00289099"/>
    </style:style>
    <style:style style:name="T10" style:family="text">
      <style:text-properties officeooo:rsid="002d9d3b"/>
    </style:style>
    <style:style style:name="T11" style:family="text">
      <style:text-properties fo:font-style="italic" officeooo:rsid="002bcc91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italic" officeooo:rsid="0012f3bc" style:font-style-asian="italic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012f3bc"/>
    </style:style>
    <style:style style:name="T17" style:family="text">
      <style:text-properties style:text-underline-style="solid" style:text-underline-width="auto" style:text-underline-color="font-color" fo:font-weight="bold" officeooo:rsid="002d9d3b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officeooo:rsid="0012f3bc"/>
    </style:style>
    <style:style style:name="T19" style:family="text">
      <style:text-properties officeooo:rsid="00112863"/>
    </style:style>
    <style:style style:name="T20" style:family="text">
      <style:text-properties fo:font-style="italic" officeooo:rsid="00112863" style:font-style-asian="italic" style:font-style-complex="italic"/>
    </style:style>
    <style:style style:name="T21" style:family="text">
      <style:text-properties fo:font-style="normal" style:text-underline-style="solid" style:text-underline-width="auto" style:text-underline-color="font-color" fo:font-weight="bold" officeooo:rsid="002d9d3b" style:font-style-asian="normal" style:font-weight-asian="bold" style:font-style-complex="normal" style:font-weight-complex="bold"/>
    </style:style>
    <style:style style:name="T22" style:family="text">
      <style:text-properties officeooo:rsid="002e0fa9"/>
    </style:style>
    <style:style style:name="T23" style:family="text">
      <style:text-properties fo:font-weight="bold" officeooo:rsid="002e0fa9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officeooo:rsid="002e0fa9" style:font-weight-asian="bold" style:font-weight-complex="bold"/>
    </style:style>
    <style:style style:name="T25" style:family="text">
      <style:text-properties officeooo:rsid="003046da"/>
    </style:style>
    <style:style style:name="T26" style:family="text">
      <style:text-properties officeooo:rsid="002f8690"/>
    </style:style>
    <style:style style:name="T27" style:family="text">
      <style:text-properties style:text-underline-style="solid" style:text-underline-width="auto" style:text-underline-color="font-color" officeooo:rsid="0030c69d"/>
    </style:style>
    <style:style style:name="T28" style:family="text">
      <style:text-properties style:text-underline-style="none" officeooo:rsid="0030c69d"/>
    </style:style>
    <style:style style:name="T29" style:family="text">
      <style:text-properties style:use-window-font-color="true" loext:opacity="0%" fo:font-size="10pt" style:text-underline-style="none" fo:font-weight="normal" officeooo:rsid="0030c69d" fo:background-color="transparent" loext:char-shading-value="0" style:font-size-asian="10pt" style:font-weight-asian="normal" style:font-size-complex="10pt" style:font-weight-complex="normal"/>
    </style:style>
    <style:style style:name="T30" style:family="text">
      <style:text-properties style:use-window-font-color="true" loext:opacity="0%" fo:font-size="10pt" style:text-underline-style="solid" style:text-underline-width="auto" style:text-underline-color="font-color" fo:font-weight="normal" officeooo:rsid="0030c69d" fo:background-color="transparent" loext:char-shading-value="0" style:font-size-asian="10pt" style:font-weight-asian="normal" style:font-size-complex="10pt" style:font-weight-complex="normal"/>
    </style:style>
    <style:style style:name="T31" style:family="text">
      <style:text-properties style:use-window-font-color="true" loext:opacity="0%" fo:font-size="10pt" style:text-underline-style="none" fo:font-weight="normal" officeooo:rsid="00112863" fo:background-color="transparent" loext:char-shading-value="0" style:font-size-asian="10pt" style:font-weight-asian="normal" style:font-size-complex="10pt" style:font-weight-complex="normal"/>
    </style:style>
    <style:style style:name="T32" style:family="text">
      <style:text-properties style:use-window-font-color="true" loext:opacity="0%" fo:font-size="10pt" fo:font-style="italic" style:text-underline-style="none" fo:font-weight="normal" officeooo:rsid="002bcc91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33" style:family="text">
      <style:text-properties style:use-window-font-color="true" loext:opacity="0%" fo:font-size="10pt" fo:font-style="normal" style:text-underline-style="none" fo:font-weight="normal" officeooo:rsid="00112863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style:use-window-font-color="true" loext:opacity="0%" fo:font-size="10pt" fo:font-style="normal" style:text-underline-style="none" fo:font-weight="normal" officeooo:rsid="0030c69d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5" style:family="text">
      <style:text-properties style:use-window-font-color="true" loext:opacity="0%" fo:font-size="10pt" fo:font-style="normal" style:text-underline-style="none" fo:font-weight="normal" officeooo:rsid="002d9d3b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6" style:family="text">
      <style:text-properties style:use-window-font-color="true" loext:opacity="0%" fo:font-size="10pt" fo:font-style="italic" style:text-underline-style="none" fo:font-weight="normal" officeooo:rsid="0012f3bc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37" style:family="text">
      <style:text-properties style:use-window-font-color="true" loext:opacity="0%" fo:font-size="10pt" fo:font-style="normal" style:text-underline-style="none" fo:font-weight="bold" officeooo:rsid="002d9d3b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38" style:family="text">
      <style:text-properties style:use-window-font-color="true" loext:opacity="0%" fo:font-size="10pt" fo:font-style="italic" style:text-underline-style="none" fo:font-weight="normal" officeooo:rsid="002d9d3b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39" style:family="text">
      <style:text-properties style:use-window-font-color="true" loext:opacity="0%" fo:font-size="10pt" fo:font-style="italic" style:text-underline-style="none" fo:font-weight="normal" officeooo:rsid="0031474b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40" style:family="text">
      <style:text-properties style:use-window-font-color="true" loext:opacity="0%" style:font-name="Liberation Serif" fo:font-size="10pt" fo:font-style="normal" style:text-underline-style="none" fo:font-weight="normal" officeooo:rsid="0030c69d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1" style:family="text">
      <style:text-properties style:use-window-font-color="true" loext:opacity="0%" style:font-name="Liberation Serif" fo:font-size="10pt" fo:font-style="normal" style:text-underline-style="none" fo:font-weight="normal" officeooo:rsid="002d9d3b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2" style:family="text">
      <style:text-properties style:use-window-font-color="true" loext:opacity="0%" style:font-name="Liberation Serif" fo:font-size="10pt" fo:font-style="italic" style:text-underline-style="none" fo:font-weight="normal" officeooo:rsid="002d9d3b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43" style:family="text">
      <style:text-properties style:use-window-font-color="true" loext:opacity="0%" style:font-name="Liberation Serif" fo:font-size="10pt" fo:font-style="normal" style:text-underline-style="none" fo:font-weight="bold" officeooo:rsid="002d9d3b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44" style:family="text">
      <style:text-properties style:use-window-font-color="true" loext:opacity="0%" style:font-name="Liberation Serif" fo:font-size="10pt" fo:font-style="italic" style:text-underline-style="none" fo:font-weight="normal" officeooo:rsid="0030c69d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45" style:family="text">
      <style:text-properties style:use-window-font-color="true" loext:opacity="0%" fo:font-size="10pt" fo:font-style="normal" style:text-underline-style="none" fo:font-weight="normal" officeooo:rsid="0012f3bc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6" style:family="text">
      <style:text-properties style:use-window-font-color="true" loext:opacity="0%" fo:font-size="10pt" fo:font-style="normal" style:text-underline-style="solid" style:text-underline-width="auto" style:text-underline-color="font-color" fo:font-weight="normal" officeooo:rsid="0012f3bc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7" style:family="text">
      <style:text-properties style:use-window-font-color="true" loext:opacity="0%" fo:font-size="10pt" style:text-underline-style="none" fo:font-weight="normal" officeooo:rsid="00107d1c" fo:background-color="transparent" loext:char-shading-value="0" style:font-size-asian="10pt" style:font-weight-asian="normal" style:font-size-complex="10pt" style:font-weight-complex="normal"/>
    </style:style>
    <style:style style:name="T48" style:family="text">
      <style:text-properties style:use-window-font-color="true" loext:opacity="0%" fo:font-size="10pt" style:text-underline-style="none" fo:font-weight="normal" officeooo:rsid="002d9d3b" fo:background-color="transparent" loext:char-shading-value="0" style:font-size-asian="10pt" style:font-weight-asian="normal" style:font-size-complex="10pt" style:font-weight-complex="normal"/>
    </style:style>
    <style:style style:name="T49" style:family="text">
      <style:text-properties style:use-window-font-color="true" loext:opacity="0%" fo:font-size="10pt" fo:font-style="italic" style:text-underline-style="none" fo:font-weight="normal" officeooo:rsid="00112863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50" style:family="text">
      <style:text-properties style:use-window-font-color="true" loext:opacity="0%" fo:font-size="10pt" fo:font-style="normal" style:text-underline-style="solid" style:text-underline-width="auto" style:text-underline-color="font-color" fo:font-weight="normal" officeooo:rsid="0030c69d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style:use-window-font-color="true" loext:opacity="0%" fo:font-size="10pt" fo:font-style="normal" style:text-underline-style="none" fo:font-weight="normal" officeooo:rsid="002e0fa9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style:use-window-font-color="true" loext:opacity="0%" fo:font-size="10pt" fo:font-style="normal" style:text-underline-style="none" fo:font-weight="bold" officeooo:rsid="002e0fa9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53" style:family="text">
      <style:text-properties style:use-window-font-color="true" loext:opacity="0%" fo:font-size="10pt" style:text-underline-style="none" fo:font-weight="normal" officeooo:rsid="0031474b" fo:background-color="transparent" loext:char-shading-value="0" style:font-size-asian="10pt" style:font-weight-asian="normal" style:font-size-complex="10pt" style:font-weight-complex="normal"/>
    </style:style>
    <style:style style:name="T54" style:family="text">
      <style:text-properties officeooo:rsid="0031474b"/>
    </style:style>
    <style:style style:name="T55" style:family="text">
      <style:text-properties style:text-underline-style="solid" style:text-underline-width="auto" style:text-underline-color="font-color"/>
    </style:style>
    <style:style style:name="T56" style:family="text">
      <style:text-properties fo:font-style="italic" officeooo:rsid="0031474b" style:font-style-asian="italic" style:font-style-complex="italic"/>
    </style:style>
    <style:style style:name="T57" style:family="text">
      <style:text-properties officeooo:rsid="0038d241"/>
    </style:style>
    <style:style style:name="T58" style:family="text">
      <style:text-properties style:text-underline-style="solid" style:text-underline-width="auto" style:text-underline-color="font-color" officeooo:rsid="0038d241"/>
    </style:style>
    <style:style style:name="T59" style:family="text">
      <style:text-properties fo:font-style="italic" officeooo:rsid="0038d241" style:font-style-asian="italic" style:font-style-complex="italic"/>
    </style:style>
    <style:style style:name="T60" style:family="text">
      <style:text-properties officeooo:rsid="0012f3f4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officeooo:rsid="0037b2d3"/>
    </style:style>
    <style:style style:name="T63" style:family="text">
      <style:text-properties officeooo:rsid="003442e8"/>
    </style:style>
    <style:style style:name="T64" style:family="text">
      <style:text-properties officeooo:rsid="00360a59"/>
    </style:style>
    <style:style style:name="T65" style:family="text">
      <style:text-properties fo:font-weight="bold" officeooo:rsid="0037b2d3" style:font-weight-asian="bold" style:font-weight-complex="bold"/>
    </style:style>
    <style:style style:name="T66" style:family="text">
      <style:text-properties fo:font-style="italic" officeooo:rsid="0037b2d3" style:font-style-asian="italic" style:font-style-complex="italic"/>
    </style:style>
    <style:style style:name="T67" style:family="text">
      <style:text-properties fo:font-weight="bold" officeooo:rsid="0038d241" style:font-weight-asian="bold" style:font-weight-complex="bold"/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2</text:span><text:span text:style-name="T2">a</text:span><text:span text:style-name="T1">.1</text:span>./<text:span text:style-name="T3">6b.1</text:span> <text:span text:style-name="T1">modificaEvento</text:span><text:span text:style-name="T4">(</text:span><text:span text:style-name="T5">eventoModificato</text:span><text:span text:style-name="T6">: SchedaEvento</text:span><text:span text:style-name="T7">)</text:span></text:p>
      <text:p text:style-name="P2"/>
      <text:p text:style-name="P3">Pre-condizioni:<text:span text:style-name="T8"/></text:p>
      <text:list xml:id="list2246134369" text:style-name="L1">
        <text:list-item>
          <text:p text:style-name="P4">lo stato dell’evento è “In <text:span text:style-name="T9">compilazione</text:span>” <text:span text:style-name="T1">oppure “</text:span><text:span text:style-name="T10">Scheda salvata” oppure “Chef assegnato”</text:span>.</text:p>
        </text:list-item>
        <text:list-item>
          <text:p text:style-name="P5">esiste un’istanza <text:span text:style-name="T11">schedaEvento</text:span><text:span text:style-name="T12">.</text:span></text:p>
        </text:list-item>
        <text:list-item>
          <text:p text:style-name="P6">Esistono le istanze Servizio <text:s/><text:span text:style-name="T13">servizio1..servizioN </text:span><text:span text:style-name="T14">previste</text:span><text:span text:style-name="T15"> per schedaEvento.</text:span></text:p>
        </text:list-item>
      </text:list>
      <text:p text:style-name="P7"/>
      <text:p text:style-name="P7">Post-condizioni:<text:span text:style-name="T8"/></text:p>
      <text:list text:style-name="L2">
        <text:list-item>
          <text:p text:style-name="P8">è <text:span text:style-name="T16">stata verificata la correttezza dei</text:span><text:span text:style-name="T10"> dati di </text:span><text:span text:style-name="T17">eventoModificato</text:span><text:span text:style-name="T18"> </text:span><text:span text:style-name="T13">.</text:span></text:p>
        </text:list-item>
        <text:list-item>
          <text:p text:style-name="P9">è <text:span text:style-name="T19">stata </text:span><text:span text:style-name="T10">modificata</text:span><text:span text:style-name="T19"> la s</text:span><text:span text:style-name="T20">chedaEvento</text:span><text:span text:style-name="T19"> inserendo i </text:span><text:span text:style-name="T10">dati di </text:span><text:span text:style-name="T21">eventoModificato</text:span><text:span text:style-name="T20">.</text:span></text:p>
        </text:list-item>
        <text:list-item>
          <text:p text:style-name="P10">sono stati <text:span text:style-name="T22">modificati</text:span> i vari <text:span text:style-name="T22">s</text:span>ervizi richiesti dal cliente <text:span text:style-name="T22">con i dati presenti nei servizi </text:span><text:span text:style-name="T23">previsti</text:span><text:span text:style-name="T22"> d</text:span><text:span text:style-name="T3">a </text:span><text:span text:style-name="T24">eventoModificato</text:span><text:span text:style-name="T23"> </text:span><text:span text:style-name="T15">.</text:span></text:p>
        </text:list-item>
        <text:list-item>
          <text:p text:style-name="P11">[se lo stato dell’evento è “In corso”] è stata richiesta l’applicazione di una penale.</text:p>
        </text:list-item>
      </text:list>
      <text:p text:style-name="P12"/>
      <text:p text:style-name="P12"/>
      <text:p text:style-name="P13"><text:span text:style-name="T22">2a.1a.</text:span><text:span text:style-name="T25">1</text:span>./<text:span text:style-name="T3">6b.1a.1</text:span> <text:span text:style-name="T26">modificaEventoRicorrente</text:span><text:span text:style-name="T4">(</text:span><text:span text:style-name="T5">eventoModificato</text:span><text:span text:style-name="T6">: SchedaEvento, </text:span><text:span text:style-name="T27">singoloEvento</text:span><text:span text:style-name="T28">: sì/no</text:span><text:span text:style-name="T4">)</text:span></text:p>
      <text:p text:style-name="P14"/>
      <text:p text:style-name="P15">Pre-condizioni:</text:p>
      <text:list xml:id="list173846268635424" text:continue-list="list2246134369" text:style-name="L1">
        <text:list-item>
          <text:p text:style-name="P16">lo stato dell’evento è “In <text:span text:style-name="T9">compilazione</text:span>” <text:span text:style-name="T1">oppure “</text:span><text:span text:style-name="T10">Scheda salvata” oppure “Chef assegnato”</text:span>.</text:p>
        </text:list-item>
        <text:list-item>
          <text:p text:style-name="P17"><text:span text:style-name="T29">[se </text:span><text:span text:style-name="T30">singoloEvento</text:span><text:span text:style-name="T29">] </text:span><text:span text:style-name="T31">esiste un’istanza </text:span><text:span text:style-name="T32">schedaEvento</text:span><text:span text:style-name="T33">.</text:span></text:p>
        </text:list-item>
        <text:list-item>
          <text:p text:style-name="P17"><text:span text:style-name="T34">[se </text:span><text:span text:style-name="T30">singoloEvento</text:span><text:span text:style-name="T34">] </text:span><text:span text:style-name="T35">Esistono le istanze Servizio <text:s/></text:span><text:span text:style-name="T36">servizio1..servizioN </text:span><text:span text:style-name="T37">previste</text:span><text:span text:style-name="T38"> per schedaEvento.</text:span></text:p>
        </text:list-item>
        <text:list-item>
          <text:p text:style-name="P17"><text:span text:style-name="T29">[se non </text:span><text:span text:style-name="T30">singoloEvento</text:span><text:span text:style-name="T29">] </text:span><text:span text:style-name="T31">esist</text:span><text:span text:style-name="T29">ono tutte le i</text:span><text:span text:style-name="T31">stanz</text:span><text:span text:style-name="T29">e</text:span><text:span text:style-name="T31"> </text:span><text:span text:style-name="T32">schedaEvento </text:span><text:span text:style-name="T39">ricorrente</text:span><text:span text:style-name="T31">.</text:span></text:p>
        </text:list-item>
        <text:list-item>
          <text:p text:style-name="P17"><text:span text:style-name="T40">[se non </text:span><text:span text:style-name="T30">singoloEvento</text:span><text:span text:style-name="T40">]</text:span><text:span text:style-name="T41">Esistono </text:span><text:span text:style-name="T40">tutte</text:span><text:span text:style-name="T41"> le istanze Servizio <text:s/></text:span><text:span text:style-name="T42">servizio1..servizioN </text:span><text:span text:style-name="T43">previste</text:span><text:span text:style-name="T42"> </text:span><text:span text:style-name="T41">per </text:span><text:span text:style-name="T40">tutte</text:span><text:span text:style-name="T44"> </text:span><text:span text:style-name="T42">schedaEvento.</text:span></text:p>
        </text:list-item>
      </text:list>
      <text:p text:style-name="P18"/>
      <text:p text:style-name="P18">Post-condizioni:</text:p>
      <text:list text:style-name="L3">
        <text:list-item>
          <text:p text:style-name="P19"><text:span text:style-name="T33">è </text:span><text:span text:style-name="T45">stata verificata la correttezza dei</text:span><text:span text:style-name="T35"> dati di </text:span><text:span text:style-name="T30">eventoModificato</text:span><text:span text:style-name="T46"> </text:span><text:span text:style-name="T36">.</text:span></text:p>
        </text:list-item>
        <text:list-item>
          <text:p text:style-name="P19"><text:span text:style-name="T29">[se </text:span><text:span text:style-name="T30">singoloEvento</text:span><text:span text:style-name="T29">] </text:span><text:span text:style-name="T47">è </text:span><text:span text:style-name="T31">stata </text:span><text:span text:style-name="T48">modificata</text:span><text:span text:style-name="T31"> la s</text:span><text:span text:style-name="T49">chedaEvento</text:span><text:span text:style-name="T31"> inserendo i </text:span><text:span text:style-name="T48">dati di </text:span><text:span text:style-name="T30">eventoModificato</text:span><text:span text:style-name="T49">.</text:span></text:p>
        </text:list-item>
        <text:list-item>
          <text:p text:style-name="P19"><text:span text:style-name="T34">[se </text:span><text:span text:style-name="T50">singoloEvento</text:span><text:span text:style-name="T34">] </text:span><text:span text:style-name="T45">sono stati </text:span><text:span text:style-name="T51">modificati</text:span><text:span text:style-name="T45"> i vari </text:span><text:span text:style-name="T51">s</text:span><text:span text:style-name="T45">ervizi </text:span><text:span text:style-name="T51">con i dati presenti nei servizi </text:span><text:span text:style-name="T52">previsti</text:span><text:span text:style-name="T51"> da</text:span><text:span text:style-name="T52"> </text:span><text:span text:style-name="T30">eventoModificato</text:span><text:span text:style-name="T52"> </text:span><text:span text:style-name="T36">.</text:span></text:p>
        </text:list-item>
        <text:list-item>
          <text:p text:style-name="P19"><text:span text:style-name="T29">[se </text:span><text:span text:style-name="T53">non </text:span><text:span text:style-name="T30">singoloEvento</text:span><text:span text:style-name="T29">] </text:span><text:span text:style-name="T53">sono state modificate</text:span><text:span text:style-name="T48"> </text:span><text:span text:style-name="T53">tutte</text:span><text:span text:style-name="T31"> l</text:span><text:span text:style-name="T53">e</text:span><text:span text:style-name="T31"> s</text:span><text:span text:style-name="T49">chedaEvento</text:span><text:span text:style-name="T31"> inserendo i </text:span><text:span text:style-name="T48">dati di </text:span><text:span text:style-name="T30">eventoModificato</text:span><text:span text:style-name="T49">.</text:span></text:p>
        </text:list-item>
        <text:list-item>
          <text:p text:style-name="P20">[se <text:span text:style-name="T54">non </text:span><text:span text:style-name="T55">singoloEvento</text:span>] sono stati modificati <text:span text:style-name="T54">tutti </text:span>i vari servizi <text:span text:style-name="T54">di tutte le istanze </text:span><text:span text:style-name="T56">schedaEvento</text:span> con i dati presenti nei servizi previsti da eventoModificato .</text:p>
        </text:list-item>
        <text:list-item>
          <text:p text:style-name="P20">[se lo stato dell’evento è “In corso”] è stata richiesta l’applicazione di una penale.</text:p>
        </text:list-item>
      </text:list>
      <text:p text:style-name="P21"/>
      <text:p text:style-name="P21"/>
      <text:p text:style-name="P21"><text:span text:style-name="T3">2</text:span><text:span text:style-name="T57">d</text:span><text:span text:style-name="T3">.1</text:span>. <text:span text:style-name="T3">creaEventoRicorrente</text:span><text:span text:style-name="T4">(</text:span><text:span text:style-name="T58">frequenza</text:span><text:span text:style-name="T57">: numero, </text:span><text:span text:style-name="T58">dataFinale</text:span><text:span text:style-name="T57">: data</text:span><text:span text:style-name="T4">)</text:span></text:p>
      <text:p text:style-name="P22"/>
      <text:p text:style-name="P23">Pre-condizioni:<text:span text:style-name="T8"/></text:p>
      <text:list text:continue-list="list173846268635424" text:style-name="L1">
        <text:list-item>
          <text:p text:style-name="P24">lo stato dell’evento è “In <text:span text:style-name="T9">compilazione</text:span>”.</text:p>
        </text:list-item>
        <text:list-item>
          <text:p text:style-name="P25">esiste un’istanza <text:span text:style-name="T15">commessa</text:span><text:span text:style-name="T12">.</text:span></text:p>
        </text:list-item>
      </text:list>
      <text:p text:style-name="P26"/>
      <text:p text:style-name="P27">Post-condizioni:</text:p>
      <text:list text:style-name="L4">
        <text:list-item>
          <text:p text:style-name="P28">sono state create istanze di schedaEvento per ogni ricorrenza dell’evento </text:p>
        </text:list-item>
        <text:list-item>
          <text:p text:style-name="P28">è stata creata l’istanza <text:span text:style-name="T14">SchedaEventoRicorrente</text:span> <text:span text:style-name="T15">schedaEventoRicorrente </text:span>con i valori di<text:span text:style-name="T15"> </text:span><text:span text:style-name="T14">frequenza</text:span><text:span text:style-name="T15"> </text:span>e<text:span text:style-name="T15"> </text:span><text:span text:style-name="T14">dataFinale</text:span></text:p>
        </text:list-item>
        <text:list-item>
          <text:p text:style-name="P29">è <text:span text:style-name="T16">stata verificata la correttezza dei dati di </text:span><text:span text:style-name="T13">commessa.</text:span></text:p>
        </text:list-item>
        <text:list-item>
          <text:p text:style-name="P30"><text:span text:style-name="T57">sono</text:span> <text:span text:style-name="T19">stat</text:span><text:span text:style-name="T57">e</text:span><text:span text:style-name="T19"> compilat</text:span><text:span text:style-name="T57">e</text:span><text:span text:style-name="T19"> l</text:span><text:span text:style-name="T57">e</text:span><text:span text:style-name="T19"> s</text:span><text:span text:style-name="T20">chedaEvento</text:span><text:span text:style-name="T19"> inserendo i dati d</text:span><text:span text:style-name="T16">i</text:span><text:span text:style-name="T19"> </text:span><text:span text:style-name="T20">commessa.</text:span></text:p>
        </text:list-item>
        <text:list-item>
          <text:p text:style-name="P31">sono stati compilati i vari servizi richiesti dal cliente nelle nuove istanze di Servizio <text:span text:style-name="T15">servizio1..servizioN </text:span><text:span text:style-name="T57">per ogni </text:span><text:span text:style-name="T59">schedaEvento</text:span><text:span text:style-name="T57"> ricorrente</text:span><text:span text:style-name="T15">.</text:span></text:p>
        </text:list-item>
        <text:list-item>
          <text:p text:style-name="P31"><text:span text:style-name="T57">Sono </text:span><text:span text:style-name="T60">stat</text:span><text:span text:style-name="T57">i</text:span><text:span text:style-name="T60"> impostat</text:span><text:span text:style-name="T57">i</text:span><text:span text:style-name="T60"> </text:span><text:span text:style-name="T57">gli</text:span><text:span text:style-name="T60"> stat</text:span><text:span text:style-name="T57">i</text:span><text:span text:style-name="T60"> de</text:span><text:span text:style-name="T57">gli eventi </text:span><text:span text:style-name="T60">a “Scheda salvata”.</text:span></text:p>
        </text:list-item>
      </text:list>
      <text:p text:style-name="P32"><text:span text:style-name="T61"/></text:p>
      <text:p text:style-name="P33">2<text:span text:style-name="T62">b.1. </text:span><text:span text:style-name="T63">elimina</text:span>Evento(evento: SchedaEvento)</text:p>
      <text:p text:style-name="P32"/>
      <text:p text:style-name="P33">Pre-condizioni:</text:p>
      <text:list text:style-name="L5">
        <text:list-item>
          <text:p text:style-name="P34">esiste l’istanza <text:span text:style-name="T14">evento</text:span>.</text:p>
        </text:list-item>
        <text:list-item>
          <text:p text:style-name="P35">Esiste l’istanza <text:span text:style-name="T15">commessa.</text:span></text:p>
        </text:list-item>
        <text:list-item>
          <text:p text:style-name="P34">lo stato dell’evento è diverso da “Annullato”</text:p>
        </text:list-item>
      </text:list>
      <text:p text:style-name="P32"/>
      <text:p text:style-name="P33">Post-condizioni:</text:p>
      <text:list text:style-name="L6">
        <text:list-item>
          <text:p text:style-name="P36">è <text:span text:style-name="T64">stata rimossa l’istanza </text:span><text:span text:style-name="T65">evento</text:span></text:p>
        </text:list-item>
        <text:list-item>
          <text:p text:style-name="P37">sono state rimosse tutte le istanze di Servizio <text:span text:style-name="T14">previste </text:span>per<text:span text:style-name="T14"> evento</text:span></text:p>
        </text:list-item>
        <text:list-item>
          <text:p text:style-name="P37">è stata rimossa l’istanza <text:span text:style-name="T15">commessa</text:span></text:p>
        </text:list-item>
      </text:list>
      <text:p text:style-name="P32"><text:soft-page-break/></text:p>
      <text:p text:style-name="P32"/>
      <text:p text:style-name="P33">2<text:span text:style-name="T62">b.1a.1. </text:span>annullaEventoRicorrente(evento: SchedaEventoRicorrente, singoloEvento: sì/no)</text:p>
      <text:p text:style-name="P32"/>
      <text:p text:style-name="P33">Pre-condizioni:</text:p>
      <text:list text:style-name="L7">
        <text:list-item>
          <text:p text:style-name="P38">[se singoloEvento] esiste l’istanza <text:span text:style-name="T14">evento</text:span>.</text:p>
        </text:list-item>
        <text:list-item>
          <text:p text:style-name="P39">[se singoloEvento] esiste l’istanza <text:span text:style-name="T66">commessa</text:span>.</text:p>
        </text:list-item>
        <text:list-item>
          <text:p text:style-name="P38">[se non singoloEvento] esistono tutte le istanze dell’<text:span text:style-name="T14">evento</text:span> ricorrente.</text:p>
        </text:list-item>
        <text:list-item>
          <text:p text:style-name="P39">[se non singoloEvento] esistono tutte le istanze <text:span text:style-name="T62">di </text:span><text:span text:style-name="T66">commessa</text:span>.</text:p>
        </text:list-item>
      </text:list>
      <text:p text:style-name="P32"/>
      <text:p text:style-name="P33">Post-condizioni:</text:p>
      <text:list text:style-name="L8">
        <text:list-item>
          <text:p text:style-name="P40">[se singoloEvento] è stat<text:span text:style-name="T62">a rimossa</text:span> <text:span text:style-name="T62">l’istanza </text:span><text:span text:style-name="T65">evento</text:span>.</text:p>
        </text:list-item>
        <text:list-item>
          <text:p text:style-name="P41">[se singoloEvento] è stat<text:span text:style-name="T62">a rimossa</text:span> <text:span text:style-name="T62">l’istanza </text:span><text:span text:style-name="T66">commessa</text:span>.</text:p>
        </text:list-item>
        <text:list-item>
          <text:p text:style-name="P41">[se singoloEvento] <text:span text:style-name="T57">sono state rimosse tutte le istanze di Servizio </text:span><text:span text:style-name="T67">previste</text:span><text:span text:style-name="T57"> per </text:span><text:span text:style-name="T67">evento</text:span>.</text:p>
        </text:list-item>
        <text:list-item>
          <text:p text:style-name="P40">[se non singoloEvento] sono stat<text:span text:style-name="T62">e rimosse tutte le isatnze di </text:span><text:span text:style-name="T65">evento</text:span>.</text:p>
        </text:list-item>
        <text:list-item>
          <text:p text:style-name="P41">[se non singoloEvento] sono stat<text:span text:style-name="T62">e rimosse tutte le isatnze di </text:span><text:span text:style-name="T66">commessa</text:span>.</text:p>
        </text:list-item>
        <text:list-item>
          <text:p text:style-name="P42">[se singoloEvento] <text:span text:style-name="T57">sono state rimosse tutte le istanze di Servizio </text:span><text:span text:style-name="T67">previste</text:span><text:span text:style-name="T57"> per tutti le istanze di </text:span><text:span text:style-name="T67">evento </text:span><text:span text:style-name="T57">ricorrente</text:span>.</text:p>
        </text:list-item>
        <text:list-item>
          <text:p text:style-name="P40">[se lo stato dell’evento è “In corso”] è stata richiesta l’applicazione di una penale.<text:span text:style-name="T61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–" style:num-suffix="–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" loext:num-list-format="–" style:num-suffix="–" text:bullet-char="–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" loext:num-list-format="–" style:num-suffix="–" text:bullet-char="–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" loext:num-list-format="–" style:num-suffix="–" text:bullet-char="–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5" loext:num-list-format="–" style:num-suffix="–" text:bullet-char="–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" loext:num-list-format="–" style:num-suffix="–" text:bullet-char="–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" loext:num-list-format="–" style:num-suffix="–" text:bullet-char="–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8" loext:num-list-format="–" style:num-suffix="–" text:bullet-char="–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" loext:num-list-format="–" style:num-suffix="–" text:bullet-char="–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20T15:34:56.423416967</meta:creation-date>
    <dc:date>2026-07-21T17:38:42.894006114</dc:date>
    <meta:editing-duration>PT2H32M57S</meta:editing-duration>
    <meta:editing-cycles>39</meta:editing-cycles>
    <meta:generator>LibreOffice/26.2.4.2$Linux_X86_64 LibreOffice_project/620$Build-2</meta:generator>
    <meta:document-statistic meta:table-count="0" meta:image-count="0" meta:object-count="0" meta:page-count="2" meta:paragraph-count="58" meta:word-count="514" meta:character-count="3688" meta:non-whitespace-character-count="3271"/>
  </office:meta>
</office:document-meta>
</file>