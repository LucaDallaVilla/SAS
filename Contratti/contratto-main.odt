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normal" officeooo:rsid="000669bb" officeooo:paragraph-rsid="000669bb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0pt" fo:font-weight="normal" officeooo:rsid="000669bb" officeooo:paragraph-rsid="000ef9c9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officeooo:paragraph-rsid="000ef9c9"/>
    </style:style>
    <style:style style:name="P4" style:family="paragraph" style:parent-style-name="Standard">
      <style:text-properties fo:font-size="10pt" fo:font-style="normal" fo:font-weight="normal" officeooo:rsid="000669bb" officeooo:paragraph-rsid="000669bb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officeooo:paragraph-rsid="000292f3"/>
    </style:style>
    <style:style style:name="P6" style:family="paragraph" style:parent-style-name="Standard">
      <style:text-properties fo:font-size="10pt" style:text-underline-style="none" officeooo:rsid="0003693d" officeooo:paragraph-rsid="000292f3" style:font-size-asian="10pt" style:font-size-complex="10pt"/>
    </style:style>
    <style:style style:name="P7" style:family="paragraph" style:parent-style-name="Standard">
      <style:text-properties fo:font-size="10pt" style:text-underline-style="none" fo:font-weight="bold" officeooo:rsid="000669bb" officeooo:paragraph-rsid="000669bb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style:text-underline-style="none" fo:font-weight="bold" officeooo:rsid="0007f9ae" officeooo:paragraph-rsid="0007f9ae" style:font-size-asian="10pt" style:font-weight-asian="bold" style:font-size-complex="10pt" style:font-weight-complex="bold"/>
    </style:style>
    <style:style style:name="P9" style:family="paragraph" style:parent-style-name="Standard" style:list-style-name="L2">
      <style:text-properties fo:font-size="10pt" fo:font-style="normal" style:text-underline-style="none" fo:font-weight="normal" officeooo:rsid="0008f18e" officeooo:paragraph-rsid="00107d1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text-properties fo:font-size="10pt" fo:font-style="italic" style:text-underline-style="none" fo:font-weight="normal" officeooo:rsid="0007f9ae" officeooo:paragraph-rsid="00107d1c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2">
      <style:text-properties fo:font-size="10pt" style:text-underline-style="none" fo:font-weight="bold" officeooo:rsid="0007f9ae" officeooo:paragraph-rsid="0007f9ae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paragraph-properties fo:text-align="left" style:justify-single-word="false"/>
      <style:text-properties fo:font-size="10pt" fo:font-style="normal" style:text-underline-style="none" fo:font-weight="normal" officeooo:rsid="0008f18e" officeooo:paragraph-rsid="0007f9a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left" style:justify-single-word="false"/>
      <style:text-properties fo:font-size="10pt" fo:font-style="italic" style:text-underline-style="none" fo:font-weight="normal" officeooo:rsid="00107d1c" officeooo:paragraph-rsid="00107d1c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fo:font-size="10pt" fo:font-style="italic" style:text-underline-style="none" fo:font-weight="normal" officeooo:rsid="0007f9ae" officeooo:paragraph-rsid="0007f9ae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L3">
      <style:text-properties fo:font-size="10pt" fo:font-weight="bold" officeooo:rsid="00107d1c" officeooo:paragraph-rsid="000ef9c9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paragraph-rsid="000ef9c9"/>
    </style:style>
    <style:style style:name="P17" style:family="paragraph" style:parent-style-name="Standard">
      <style:text-properties fo:font-size="10pt" style:text-underline-style="none" officeooo:rsid="0003693d" officeooo:paragraph-rsid="0007f9ae" style:font-size-asian="10pt" style:font-size-complex="10pt"/>
    </style:style>
    <style:style style:name="P18" style:family="paragraph" style:parent-style-name="Standard">
      <style:text-properties fo:font-size="10pt" style:text-underline-style="none" fo:font-weight="bold" officeooo:rsid="000669bb" officeooo:paragraph-rsid="0007f9ae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text-properties fo:font-size="10pt" style:text-underline-style="none" fo:font-weight="normal" officeooo:rsid="0026a191" officeooo:paragraph-rsid="00289099" style:font-size-asian="10pt" style:font-weight-asian="normal" style:font-size-complex="10pt" style:font-weight-complex="normal"/>
    </style:style>
    <style:style style:name="P20" style:family="paragraph" style:parent-style-name="Standard" style:list-style-name="L5">
      <style:text-properties fo:font-size="10pt" style:text-underline-style="none" fo:font-weight="normal" officeooo:rsid="00112863" officeooo:paragraph-rsid="00112863" style:font-size-asian="10pt" style:font-weight-asian="normal" style:font-size-complex="10pt" style:font-weight-complex="normal"/>
    </style:style>
    <style:style style:name="P21" style:family="paragraph" style:parent-style-name="Standard" style:list-style-name="L6">
      <style:text-properties fo:font-size="10pt" fo:font-style="normal" style:text-underline-style="none" fo:font-weight="normal" officeooo:rsid="00112863" officeooo:paragraph-rsid="0012f3b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6">
      <style:text-properties fo:font-size="10pt" style:text-underline-style="none" fo:font-weight="normal" officeooo:rsid="00107d1c" officeooo:paragraph-rsid="00107d1c" style:font-size-asian="10pt" style:font-weight-asian="normal" style:font-size-complex="10pt" style:font-weight-complex="normal"/>
    </style:style>
    <style:style style:name="P23" style:family="paragraph" style:parent-style-name="Standard" style:list-style-name="L6">
      <style:text-properties fo:font-size="10pt" fo:font-style="normal" style:text-underline-style="none" fo:font-weight="normal" officeooo:rsid="0012f3bc" officeooo:paragraph-rsid="0012f3b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size="10pt" fo:font-style="italic" style:text-underline-style="none" fo:font-weight="normal" officeooo:rsid="0012f3bc" officeooo:paragraph-rsid="0012f3bc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text-properties fo:font-size="10pt" fo:font-weight="bold" officeooo:rsid="0014d80e" officeooo:paragraph-rsid="0014d80e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style:text-underline-style="none" officeooo:rsid="0003693d" officeooo:paragraph-rsid="0014d80e" style:font-size-asian="10pt" style:font-size-complex="10pt"/>
    </style:style>
    <style:style style:name="P27" style:family="paragraph" style:parent-style-name="Standard">
      <style:text-properties fo:font-size="10pt" style:text-underline-style="none" fo:font-weight="bold" officeooo:rsid="000669bb" officeooo:paragraph-rsid="0014d80e" style:font-size-asian="10pt" style:font-weight-asian="bold" style:font-size-complex="10pt" style:font-weight-complex="bold"/>
    </style:style>
    <style:style style:name="P28" style:family="paragraph" style:parent-style-name="Standard" style:list-style-name="L5">
      <style:text-properties fo:font-size="10pt" style:text-underline-style="none" fo:font-weight="normal" officeooo:rsid="0026a191" officeooo:paragraph-rsid="00289099" style:font-size-asian="10pt" style:font-weight-asian="normal" style:font-size-complex="10pt" style:font-weight-complex="normal"/>
    </style:style>
    <style:style style:name="P29" style:family="paragraph" style:parent-style-name="Standard" style:list-style-name="L5">
      <style:text-properties fo:font-size="10pt" style:text-underline-style="none" fo:font-weight="normal" officeooo:rsid="000669bb" officeooo:paragraph-rsid="0014d80e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text-properties fo:font-size="10pt" fo:font-style="normal" style:text-underline-style="none" fo:font-weight="normal" officeooo:rsid="0014d80e" officeooo:paragraph-rsid="0014d80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2" style:family="paragraph" style:parent-style-name="Standard" style:list-style-name="L7">
      <style:text-properties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33" style:family="paragraph" style:parent-style-name="Standard" style:list-style-name="L7">
      <style:text-properties fo:font-size="10pt" fo:font-style="normal" style:text-underline-style="none" fo:font-weight="normal" officeooo:rsid="0014d80e" officeooo:paragraph-rsid="0014d80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font-size="10pt" fo:font-style="normal" style:text-underline-style="none" fo:font-weight="bold" officeooo:rsid="0007f9ae" officeooo:paragraph-rsid="0014d80e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font-size="10pt" fo:font-weight="normal" officeooo:rsid="0014d80e" officeooo:paragraph-rsid="0014d80e" style:font-size-asian="10pt" style:font-weight-asian="normal" style:font-size-complex="10pt" style:font-weight-complex="normal"/>
    </style:style>
    <style:style style:name="P36" style:family="paragraph" style:parent-style-name="Standard" style:list-style-name="L5">
      <style:text-properties fo:font-size="10pt" style:text-underline-style="none" fo:font-weight="normal" officeooo:rsid="0026a191" officeooo:paragraph-rsid="002983f2" style:font-size-asian="10pt" style:font-weight-asian="normal" style:font-size-complex="10pt" style:font-weight-complex="normal"/>
    </style:style>
    <style:style style:name="P37" style:family="paragraph" style:parent-style-name="Standard" style:list-style-name="L5">
      <style:text-properties fo:font-size="10pt" style:text-underline-style="none" fo:font-weight="normal" officeooo:rsid="001a38ce" officeooo:paragraph-rsid="001a38ce" style:font-size-asian="10pt" style:font-weight-asian="normal" style:font-size-complex="10pt" style:font-weight-complex="normal"/>
    </style:style>
    <style:style style:name="P38" style:family="paragraph" style:parent-style-name="Standard" style:list-style-name="L5">
      <style:text-properties fo:font-size="10pt" style:text-underline-style="none" fo:font-weight="normal" officeooo:rsid="001e601d" officeooo:paragraph-rsid="001e601d" style:font-size-asian="10pt" style:font-weight-asian="normal" style:font-size-complex="10pt" style:font-weight-complex="normal"/>
    </style:style>
    <style:style style:name="P39" style:family="paragraph" style:parent-style-name="Standard" style:list-style-name="L8">
      <style:text-properties fo:font-size="10pt" style:text-underline-style="none" fo:font-weight="bold" officeooo:rsid="0007f9ae" officeooo:paragraph-rsid="0014d80e" style:font-size-asian="10pt" style:font-weight-asian="bold" style:font-size-complex="10pt" style:font-weight-complex="bold"/>
    </style:style>
    <style:style style:name="P40" style:family="paragraph" style:parent-style-name="Standard" style:list-style-name="L8">
      <style:text-properties fo:font-size="10pt" fo:font-style="normal" style:text-underline-style="none" fo:font-weight="normal" officeooo:rsid="001a38ce" officeooo:paragraph-rsid="001a38c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font-size="10pt" fo:font-weight="bold" officeooo:rsid="000292f3" officeooo:paragraph-rsid="001ae768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1ae768" officeooo:paragraph-rsid="001ae768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style:text-underline-style="none" officeooo:rsid="0003693d" officeooo:paragraph-rsid="001ae768" style:font-size-asian="10pt" style:font-size-complex="10pt"/>
    </style:style>
    <style:style style:name="P44" style:family="paragraph" style:parent-style-name="Standard">
      <style:text-properties fo:font-size="10pt" style:text-underline-style="none" fo:font-weight="bold" officeooo:rsid="000669bb" officeooo:paragraph-rsid="001ae768" style:font-size-asian="10pt" style:font-weight-asian="bold" style:font-size-complex="10pt" style:font-weight-complex="bold"/>
    </style:style>
    <style:style style:name="P45" style:family="paragraph" style:parent-style-name="Standard" style:list-style-name="L9">
      <style:text-properties officeooo:paragraph-rsid="0029d67f"/>
    </style:style>
    <style:style style:name="P46" style:family="paragraph" style:parent-style-name="Standard" style:list-style-name="L5">
      <style:text-properties fo:font-size="10pt" fo:font-style="normal" style:text-underline-style="none" fo:font-weight="normal" officeooo:rsid="001ae768" officeooo:paragraph-rsid="001ae76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5">
      <style:text-properties fo:font-size="10pt" style:text-underline-style="none" fo:font-weight="normal" officeooo:rsid="001e601d" officeooo:paragraph-rsid="001fb4d6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style:text-underline-style="none" fo:font-weight="bold" officeooo:rsid="0007f9ae" officeooo:paragraph-rsid="001ae768" style:font-size-asian="10pt" style:font-weight-asian="bold" style:font-size-complex="10pt" style:font-weight-complex="bold"/>
    </style:style>
    <style:style style:name="P49" style:family="paragraph" style:parent-style-name="Standard" style:list-style-name="L10">
      <style:text-properties fo:font-size="10pt" style:text-underline-style="none" fo:font-weight="bold" officeooo:rsid="0007f9ae" officeooo:paragraph-rsid="001ae768" style:font-size-asian="10pt" style:font-weight-asian="bold" style:font-size-complex="10pt" style:font-weight-complex="bold"/>
    </style:style>
    <style:style style:name="P50" style:family="paragraph" style:parent-style-name="Standard" style:list-style-name="L10">
      <style:text-properties fo:font-size="10pt" fo:font-style="italic" style:text-underline-style="none" fo:font-weight="normal" officeooo:rsid="001fb4d6" officeooo:paragraph-rsid="001fb4d6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 style:list-style-name="L10">
      <style:text-properties fo:font-size="10pt" fo:font-style="normal" style:text-underline-style="none" fo:font-weight="normal" officeooo:rsid="001b425f" officeooo:paragraph-rsid="001ae76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fo:font-size="10pt" fo:font-weight="bold" officeooo:rsid="001cca33" officeooo:paragraph-rsid="001cca33" style:font-size-asian="10pt" style:font-weight-asian="bold" style:font-size-complex="10pt" style:font-weight-complex="bold"/>
    </style:style>
    <style:style style:name="P53" style:family="paragraph" style:parent-style-name="Standard">
      <style:text-properties fo:font-size="10pt" fo:font-weight="bold" officeooo:rsid="001cca33" officeooo:paragraph-rsid="001fb4d6" style:font-size-asian="10pt" style:font-weight-asian="bold" style:font-size-complex="10pt" style:font-weight-complex="bold"/>
    </style:style>
    <style:style style:name="P54" style:family="paragraph" style:parent-style-name="Standard">
      <style:text-properties fo:font-size="10pt" style:text-underline-style="none" officeooo:rsid="0003693d" officeooo:paragraph-rsid="000e5477" style:font-size-asian="10pt" style:font-size-complex="10pt"/>
    </style:style>
    <style:style style:name="P55" style:family="paragraph" style:parent-style-name="Standard">
      <style:text-properties fo:font-size="10pt" style:text-underline-style="none" fo:font-weight="bold" officeooo:rsid="000669bb" officeooo:paragraph-rsid="000e5477" style:font-size-asian="10pt" style:font-weight-asian="bold" style:font-size-complex="10pt" style:font-weight-complex="bold"/>
    </style:style>
    <style:style style:name="P56" style:family="paragraph" style:parent-style-name="Standard" style:list-style-name="L5">
      <style:text-properties fo:font-size="10pt" style:text-underline-style="none" fo:font-weight="normal" officeooo:rsid="0026a191" officeooo:paragraph-rsid="0026a191" style:font-size-asian="10pt" style:font-weight-asian="normal" style:font-size-complex="10pt" style:font-weight-complex="normal"/>
    </style:style>
    <style:style style:name="P57" style:family="paragraph" style:parent-style-name="Standard" style:list-style-name="L5">
      <style:text-properties fo:font-size="10pt" style:text-underline-style="none" fo:font-weight="normal" officeooo:rsid="001a38ce" officeooo:paragraph-rsid="001fb4d6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style:text-underline-style="none" fo:font-weight="bold" officeooo:rsid="0007f9ae" officeooo:paragraph-rsid="000e5477" style:font-size-asian="10pt" style:font-weight-asian="bold" style:font-size-complex="10pt" style:font-weight-complex="bold"/>
    </style:style>
    <style:style style:name="P59" style:family="paragraph" style:parent-style-name="Standard" style:list-style-name="L8">
      <style:text-properties fo:font-size="10pt" style:text-underline-style="none" fo:font-weight="bold" officeooo:rsid="0007f9ae" officeooo:paragraph-rsid="001fb4d6" style:font-size-asian="10pt" style:font-weight-asian="bold" style:font-size-complex="10pt" style:font-weight-complex="bold"/>
    </style:style>
    <style:style style:name="P60" style:family="paragraph" style:parent-style-name="Standard" style:list-style-name="L8">
      <style:text-properties fo:font-size="10pt" fo:font-style="normal" style:text-underline-style="none" fo:font-weight="normal" officeooo:rsid="0021c48a" officeooo:paragraph-rsid="0021c48a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1">
      <style:text-properties fo:font-size="10pt" fo:font-style="normal" style:text-underline-style="none" fo:font-weight="normal" officeooo:rsid="001a38ce" officeooo:paragraph-rsid="001fb4d6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11">
      <style:text-properties fo:font-size="10pt" fo:font-style="italic" style:text-underline-style="none" fo:font-weight="normal" officeooo:rsid="0020fc9c" officeooo:paragraph-rsid="0020fc9c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text-properties fo:font-size="10pt" fo:font-weight="bold" officeooo:rsid="000292f3" officeooo:paragraph-rsid="0021c48a" style:font-size-asian="10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rsid="0021c48a" officeooo:paragraph-rsid="0021c48a" style:font-size-asian="10pt" style:font-weight-asian="bold" style:font-size-complex="10pt" style:font-weight-complex="bold"/>
    </style:style>
    <style:style style:name="P65" style:family="paragraph" style:parent-style-name="Standard">
      <style:text-properties fo:font-size="10pt" style:text-underline-style="none" officeooo:rsid="0003693d" officeooo:paragraph-rsid="0021c48a" style:font-size-asian="10pt" style:font-size-complex="10pt"/>
    </style:style>
    <style:style style:name="P66" style:family="paragraph" style:parent-style-name="Standard">
      <style:text-properties fo:font-size="10pt" style:text-underline-style="none" fo:font-weight="bold" officeooo:rsid="000669bb" officeooo:paragraph-rsid="0021c48a" style:font-size-asian="10pt" style:font-weight-asian="bold" style:font-size-complex="10pt" style:font-weight-complex="bold"/>
    </style:style>
    <style:style style:name="P67" style:family="paragraph" style:parent-style-name="Standard" style:list-style-name="L5">
      <style:text-properties fo:font-size="10pt" style:text-underline-style="none" fo:font-weight="normal" officeooo:rsid="001e601d" officeooo:paragraph-rsid="0022c2c0" style:font-size-asian="10pt" style:font-weight-asian="normal" style:font-size-complex="10pt" style:font-weight-complex="normal"/>
    </style:style>
    <style:style style:name="P68" style:family="paragraph" style:parent-style-name="Standard" style:list-style-name="L5">
      <style:text-properties fo:font-size="10pt" fo:font-style="italic" style:text-underline-style="none" fo:font-weight="normal" officeooo:rsid="0022c2c0" officeooo:paragraph-rsid="0022c2c0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>
      <style:text-properties fo:font-size="10pt" style:text-underline-style="none" fo:font-weight="bold" officeooo:rsid="0007f9ae" officeooo:paragraph-rsid="0021c48a" style:font-size-asian="10pt" style:font-weight-asian="bold" style:font-size-complex="10pt" style:font-weight-complex="bold"/>
    </style:style>
    <style:style style:name="P70" style:family="paragraph" style:parent-style-name="Standard" style:list-style-name="L12">
      <style:text-properties fo:font-size="10pt" style:text-underline-style="none" fo:font-weight="normal" officeooo:rsid="0022c2c0" officeooo:paragraph-rsid="0023e7f7" style:font-size-asian="10pt" style:font-weight-asian="normal" style:font-size-complex="10pt" style:font-weight-complex="normal"/>
    </style:style>
    <style:style style:name="P71" style:family="paragraph" style:parent-style-name="Standard" style:list-style-name="L12">
      <style:text-properties fo:font-size="10pt" fo:font-style="normal" style:text-underline-style="none" fo:font-weight="normal" officeooo:rsid="0023e7f7" officeooo:paragraph-rsid="0023e7f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 style:list-style-name="L12">
      <style:text-properties fo:font-size="10pt" fo:font-weight="normal" officeooo:rsid="0023e7f7" officeooo:paragraph-rsid="0023e7f7" style:font-size-asian="10pt" style:font-weight-asian="normal" style:font-size-complex="10pt" style:font-weight-complex="normal"/>
    </style:style>
    <style:style style:name="P73" style:family="paragraph" style:parent-style-name="Standard">
      <style:text-properties fo:font-size="10pt" fo:font-style="italic" style:text-underline-style="none" fo:font-weight="normal" officeooo:rsid="0023e7f7" officeooo:paragraph-rsid="0023e7f7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Standard">
      <style:text-properties fo:font-size="10pt" fo:font-weight="bold" officeooo:rsid="000292f3" officeooo:paragraph-rsid="0023e7f7" style:font-size-asian="10pt" style:font-weight-asian="bold" style:font-size-complex="10pt" style:font-weight-complex="bold"/>
    </style:style>
    <style:style style:name="P75" style:family="paragraph" style:parent-style-name="Standard">
      <style:text-properties fo:font-size="10pt" fo:font-weight="bold" officeooo:rsid="0023e7f7" officeooo:paragraph-rsid="0023e7f7" style:font-size-asian="10pt" style:font-weight-asian="bold" style:font-size-complex="10pt" style:font-weight-complex="bold"/>
    </style:style>
    <style:style style:name="P76" style:family="paragraph" style:parent-style-name="Standard">
      <style:text-properties fo:font-size="10pt" style:text-underline-style="none" officeooo:rsid="0003693d" officeooo:paragraph-rsid="0023e7f7" style:font-size-asian="10pt" style:font-size-complex="10pt"/>
    </style:style>
    <style:style style:name="P77" style:family="paragraph" style:parent-style-name="Standard">
      <style:text-properties fo:font-size="10pt" style:text-underline-style="none" fo:font-weight="bold" officeooo:rsid="000669bb" officeooo:paragraph-rsid="0023e7f7" style:font-size-asian="10pt" style:font-weight-asian="bold" style:font-size-complex="10pt" style:font-weight-complex="bold"/>
    </style:style>
    <style:style style:name="P78" style:family="paragraph" style:parent-style-name="Standard">
      <style:text-properties fo:font-size="10pt" style:text-underline-style="none" fo:font-weight="bold" officeooo:rsid="0007f9ae" officeooo:paragraph-rsid="0023e7f7" style:font-size-asian="10pt" style:font-weight-asian="bold" style:font-size-complex="10pt" style:font-weight-complex="bold"/>
    </style:style>
    <style:style style:name="P79" style:family="paragraph" style:parent-style-name="Standard" style:list-style-name="L13">
      <style:text-properties officeooo:paragraph-rsid="0023e7f7"/>
    </style:style>
    <style:style style:name="P80" style:family="paragraph" style:parent-style-name="Standard" style:list-style-name="L14">
      <style:text-properties fo:font-size="10pt" style:text-underline-style="none" fo:font-weight="bold" officeooo:rsid="0007f9ae" officeooo:paragraph-rsid="0023e7f7" style:font-size-asian="10pt" style:font-weight-asian="bold" style:font-size-complex="10pt" style:font-weight-complex="bold"/>
    </style:style>
    <style:style style:name="P81" style:family="paragraph" style:parent-style-name="Standard">
      <style:text-properties fo:font-size="10pt" fo:font-style="italic" style:text-underline-style="none" fo:font-weight="normal" officeooo:rsid="0026a191" officeooo:paragraph-rsid="0023e7f7" style:font-size-asian="10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>
      <style:text-properties fo:font-size="10pt" fo:font-weight="bold" officeooo:rsid="0026a191" officeooo:paragraph-rsid="0026a191" style:font-size-asian="10pt" style:font-weight-asian="bold" style:font-size-complex="10pt" style:font-weight-complex="bold"/>
    </style:style>
    <style:style style:name="P83" style:family="paragraph" style:parent-style-name="Standard">
      <style:text-properties fo:font-size="10pt" style:text-underline-style="none" officeooo:rsid="0003693d" officeooo:paragraph-rsid="0026a191" style:font-size-asian="10pt" style:font-size-complex="10pt"/>
    </style:style>
    <style:style style:name="P84" style:family="paragraph" style:parent-style-name="Standard">
      <style:text-properties fo:font-size="10pt" style:text-underline-style="none" fo:font-weight="bold" officeooo:rsid="000669bb" officeooo:paragraph-rsid="0026a191" style:font-size-asian="10pt" style:font-weight-asian="bold" style:font-size-complex="10pt" style:font-weight-complex="bold"/>
    </style:style>
    <style:style style:name="P85" style:family="paragraph" style:parent-style-name="Standard">
      <style:text-properties fo:font-size="10pt" style:text-underline-style="none" fo:font-weight="bold" officeooo:rsid="0007f9ae" officeooo:paragraph-rsid="0026a191" style:font-size-asian="10pt" style:font-weight-asian="bold" style:font-size-complex="10pt" style:font-weight-complex="bold"/>
    </style:style>
    <style:style style:name="P86" style:family="paragraph" style:parent-style-name="Standard" style:list-style-name="L15">
      <style:text-properties fo:font-size="10pt" fo:font-style="normal" style:text-underline-style="none" fo:font-weight="normal" officeooo:rsid="001a38ce" officeooo:paragraph-rsid="00289099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break-before="page"/>
      <style:text-properties fo:font-size="10pt" fo:font-weight="bold" officeooo:rsid="000292f3" officeooo:paragraph-rsid="001cca33" style:font-size-asian="10pt" style:font-weight-asian="bold" style:font-size-complex="10pt" style:font-weight-complex="bold"/>
    </style:style>
    <style:style style:name="P88" style:family="paragraph" style:parent-style-name="Standard">
      <style:text-properties fo:font-size="10pt" style:text-underline-style="none" officeooo:rsid="0003693d" officeooo:paragraph-rsid="001cca33" style:font-size-asian="10pt" style:font-size-complex="10pt"/>
    </style:style>
    <style:style style:name="P89" style:family="paragraph" style:parent-style-name="Standard">
      <style:text-properties fo:font-size="10pt" style:text-underline-style="none" fo:font-weight="bold" officeooo:rsid="000669bb" officeooo:paragraph-rsid="001cca33" style:font-size-asian="10pt" style:font-weight-asian="bold" style:font-size-complex="10pt" style:font-weight-complex="bold"/>
    </style:style>
    <style:style style:name="P90" style:family="paragraph" style:parent-style-name="Standard" style:list-style-name="L5">
      <style:text-properties fo:font-size="10pt" style:text-underline-style="none" fo:font-weight="normal" officeooo:rsid="000669bb" officeooo:paragraph-rsid="001cca33" style:font-size-asian="10pt" style:font-weight-asian="normal" style:font-size-complex="10pt" style:font-weight-complex="normal"/>
    </style:style>
    <style:style style:name="P91" style:family="paragraph" style:parent-style-name="Standard">
      <style:text-properties fo:font-size="10pt" style:text-underline-style="none" fo:font-weight="bold" officeooo:rsid="0007f9ae" officeooo:paragraph-rsid="001cca33" style:font-size-asian="10pt" style:font-weight-asian="bold" style:font-size-complex="10pt" style:font-weight-complex="bold"/>
    </style:style>
    <style:style style:name="P92" style:family="paragraph" style:parent-style-name="Standard" style:list-style-name="L16">
      <style:text-properties fo:font-size="10pt" style:text-underline-style="none" fo:font-weight="bold" officeooo:rsid="0007f9ae" officeooo:paragraph-rsid="001cca33" style:font-size-asian="10pt" style:font-weight-asian="bold" style:font-size-complex="10pt" style:font-weight-complex="bold"/>
    </style:style>
    <style:style style:name="P93" style:family="paragraph" style:parent-style-name="Standard" style:list-style-name="L17">
      <style:text-properties fo:font-size="10pt" fo:font-style="normal" style:text-underline-style="none" fo:font-weight="normal" officeooo:rsid="001a38ce" officeooo:paragraph-rsid="0028909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weight="normal" officeooo:rsid="000669bb" style:font-size-asian="8.75pt" style:font-weight-asian="normal" style:font-size-complex="10pt" style:font-weight-complex="normal"/>
    </style:style>
    <style:style style:name="T2" style:family="text">
      <style:text-properties fo:font-size="10pt" fo:font-style="normal" fo:font-weight="normal" officeooo:rsid="000669bb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officeooo:rsid="0007f9ae" style:font-size-asian="8.75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bold" officeooo:rsid="00112863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292f3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ef9c9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officeooo:rsid="000ef9c9" style:font-size-asian="10pt" style:font-weight-asian="bold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fo:font-weight="bold" officeooo:rsid="0022c2c0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22c2c0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03693d" style:font-size-asian="10pt" style:font-weight-asian="bold" style:font-size-complex="10pt" style:font-weight-complex="bold"/>
    </style:style>
    <style:style style:name="T11" style:family="text">
      <style:text-properties fo:font-style="normal" officeooo:rsid="00107d1c" style:font-style-asian="normal" style:font-style-complex="normal"/>
    </style:style>
    <style:style style:name="T12" style:family="text">
      <style:text-properties fo:font-style="normal" officeooo:rsid="0008f18e" style:font-style-asian="normal" style:font-style-complex="normal"/>
    </style:style>
    <style:style style:name="T13" style:family="text">
      <style:text-properties officeooo:rsid="0008f18e"/>
    </style:style>
    <style:style style:name="T14" style:family="text">
      <style:text-properties officeooo:rsid="000bb3c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7d1c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0825c5" style:font-style-asian="normal" style:font-weight-asian="normal" style:font-style-complex="normal" style:font-weight-complex="normal"/>
    </style:style>
    <style:style style:name="T19" style:family="text">
      <style:text-properties officeooo:rsid="00107d1c"/>
    </style:style>
    <style:style style:name="T20" style:family="text">
      <style:text-properties fo:font-weight="bold" officeooo:rsid="00107d1c" style:font-weight-asian="bold" style:font-weight-complex="bold"/>
    </style:style>
    <style:style style:name="T21" style:family="text">
      <style:text-properties fo:font-style="normal" fo:font-weight="bold" officeooo:rsid="00107d1c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bb3c6" style:font-style-asian="italic" style:font-style-complex="italic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fo:font-weight="bold" officeooo:rsid="00107d1c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0ef9c9" style:font-size-asian="10pt" style:font-weight-asian="bold" style:font-size-complex="10pt" style:font-weight-complex="bold"/>
    </style:style>
    <style:style style:name="T28" style:family="text">
      <style:text-properties fo:font-size="10pt" style:text-underline-style="none" fo:font-weight="bold" officeooo:rsid="00112863" style:font-size-asian="10pt" style:font-weight-asian="bold" style:font-size-complex="10pt" style:font-weight-complex="bold"/>
    </style:style>
    <style:style style:name="T29" style:family="text">
      <style:text-properties officeooo:rsid="00289099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2f3bc"/>
    </style:style>
    <style:style style:name="T32" style:family="text">
      <style:text-properties fo:font-style="italic" officeooo:rsid="0012f3bc" style:font-style-asian="italic" style:font-style-complex="italic"/>
    </style:style>
    <style:style style:name="T33" style:family="text">
      <style:text-properties officeooo:rsid="00112863"/>
    </style:style>
    <style:style style:name="T34" style:family="text">
      <style:text-properties fo:font-style="italic" officeooo:rsid="00112863" style:font-style-asian="italic" style:font-style-complex="italic"/>
    </style:style>
    <style:style style:name="T35" style:family="text">
      <style:text-properties officeooo:rsid="0012f3f4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14d80e"/>
    </style:style>
    <style:style style:name="T39" style:family="text">
      <style:text-properties fo:font-style="italic" officeooo:rsid="0014d80e" style:font-style-asian="italic" style:font-style-complex="italic"/>
    </style:style>
    <style:style style:name="T40" style:family="text">
      <style:text-properties fo:font-weight="normal" officeooo:rsid="0014d80e" style:font-weight-asian="normal" style:font-weight-complex="normal"/>
    </style:style>
    <style:style style:name="T41" style:family="text">
      <style:text-properties fo:font-style="italic" fo:font-weight="normal" officeooo:rsid="0014d80e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14d80e" style:font-style-asian="normal" style:font-weight-asian="normal" style:font-style-complex="normal" style:font-weight-complex="normal"/>
    </style:style>
    <style:style style:name="T43" style:family="text">
      <style:text-properties fo:font-weight="bold" officeooo:rsid="0007f9ae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8643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97c30" style:font-weight-asian="bold" style:font-weight-complex="bold"/>
    </style:style>
    <style:style style:name="T46" style:family="text">
      <style:text-properties style:text-underline-style="none" fo:font-weight="bold" officeooo:rsid="0018643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1cca33" style:font-weight-asian="bold" style:font-weight-complex="bold"/>
    </style:style>
    <style:style style:name="T48" style:family="text">
      <style:text-properties style:text-underline-style="none" fo:font-weight="bold" officeooo:rsid="001cca33" style:font-weight-asian="bold" style:font-weight-complex="bold"/>
    </style:style>
    <style:style style:name="T49" style:family="text">
      <style:text-properties officeooo:rsid="002983f2"/>
    </style:style>
    <style:style style:name="T50" style:family="text">
      <style:text-properties fo:font-weight="normal" officeooo:rsid="001a38ce" style:font-weight-asian="normal" style:font-weight-complex="normal"/>
    </style:style>
    <style:style style:name="T51" style:family="text">
      <style:text-properties fo:font-style="italic" fo:font-weight="normal" officeooo:rsid="001a38ce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normal" officeooo:rsid="001a38ce" style:font-style-asian="normal" style:font-weight-asian="normal" style:font-style-complex="normal" style:font-weight-complex="normal"/>
    </style:style>
    <style:style style:name="T53" style:family="text">
      <style:text-properties officeooo:rsid="001fb4d6"/>
    </style:style>
    <style:style style:name="T54" style:family="text">
      <style:text-properties fo:font-style="italic" officeooo:rsid="001fb4d6" style:font-style-asian="italic" style:font-style-complex="italic"/>
    </style:style>
    <style:style style:name="T55" style:family="text">
      <style:text-properties style:text-underline-style="solid" style:text-underline-width="auto" style:text-underline-color="font-color" officeooo:rsid="001e601d"/>
    </style:style>
    <style:style style:name="T56" style:family="text">
      <style:text-properties style:text-underline-style="none" officeooo:rsid="001e601d"/>
    </style:style>
    <style:style style:name="T57" style:family="text">
      <style:text-properties fo:font-size="10pt" style:text-underline-style="none" fo:font-weight="normal" officeooo:rsid="0026a191" style:font-size-asian="10pt" style:font-weight-asian="normal" style:font-size-complex="10pt" style:font-weight-complex="normal"/>
    </style:style>
    <style:style style:name="T58" style:family="text">
      <style:text-properties fo:font-size="10pt" style:text-underline-style="none" fo:font-weight="normal" officeooo:rsid="0029d67f" style:font-size-asian="10pt" style:font-weight-asian="normal" style:font-size-complex="10pt" style:font-weight-complex="normal"/>
    </style:style>
    <style:style style:name="T59" style:family="text">
      <style:text-properties fo:font-weight="normal" officeooo:rsid="001b425f" style:font-weight-asian="normal" style:font-weight-complex="normal"/>
    </style:style>
    <style:style style:name="T60" style:family="text">
      <style:text-properties fo:font-style="italic" fo:font-weight="normal" officeooo:rsid="001b425f" style:font-style-asian="italic" style:font-weight-asian="normal" style:font-style-complex="italic" style:font-weight-complex="normal"/>
    </style:style>
    <style:style style:name="T61" style:family="text">
      <style:text-properties style:text-underline-style="solid" style:text-underline-width="auto" style:text-underline-color="font-color" officeooo:rsid="00186435"/>
    </style:style>
    <style:style style:name="T62" style:family="text">
      <style:text-properties style:text-underline-style="solid" style:text-underline-width="auto" style:text-underline-color="font-color" officeooo:rsid="00197c30"/>
    </style:style>
    <style:style style:name="T63" style:family="text">
      <style:text-properties style:text-underline-style="none" officeooo:rsid="00186435"/>
    </style:style>
    <style:style style:name="T64" style:family="text">
      <style:text-properties officeooo:rsid="0021c48a"/>
    </style:style>
    <style:style style:name="T65" style:family="text">
      <style:text-properties officeooo:rsid="00223bf0"/>
    </style:style>
    <style:style style:name="T66" style:family="text">
      <style:text-properties style:text-underline-style="solid" style:text-underline-width="auto" style:text-underline-color="font-color" officeooo:rsid="00223bf0"/>
    </style:style>
    <style:style style:name="T67" style:family="text">
      <style:text-properties style:text-underline-style="none" officeooo:rsid="00223bf0"/>
    </style:style>
    <style:style style:name="T68" style:family="text">
      <style:text-properties fo:font-style="normal" officeooo:rsid="0014d80e" style:font-style-asian="normal" style:font-style-complex="normal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fo:font-style="normal" officeooo:rsid="0023e7f7" style:font-style-asian="normal" style:font-style-complex="normal"/>
    </style:style>
    <style:style style:name="T71" style:family="text">
      <style:text-properties fo:font-style="italic" officeooo:rsid="0023e7f7" style:font-style-asian="italic" style:font-style-complex="italic"/>
    </style:style>
    <style:style style:name="T72" style:family="text">
      <style:text-properties fo:font-style="italic" style:text-underline-style="none" style:font-style-asian="italic" style:font-style-complex="italic"/>
    </style:style>
    <style:style style:name="T7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4" style:family="text">
      <style:text-properties fo:font-size="10pt" style:text-underline-style="none" fo:font-weight="normal" officeooo:rsid="0007f9ae" style:font-size-asian="10pt" style:font-weight-asian="normal" style:font-size-complex="10pt" style:font-weight-complex="normal"/>
    </style:style>
    <style:style style:name="T75" style:family="text">
      <style:text-properties fo:font-size="10pt" fo:font-style="italic" style:text-underline-style="none" fo:font-weight="normal" officeooo:rsid="0026a191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font-weight="normal" officeooo:rsid="0026a191" style:font-weight-asian="normal" style:font-weight-complex="normal"/>
    </style:style>
    <style:style style:name="T77" style:family="text">
      <style:text-properties fo:font-style="italic" fo:font-weight="normal" officeooo:rsid="0026a191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26a191" style:font-style-asian="normal" style:font-weight-asian="normal" style:font-style-complex="normal" style:font-weight-complex="normal"/>
    </style:style>
    <style:style style:name="T79" style:family="text">
      <style:text-properties officeooo:rsid="0007f9a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</text:p>
      <text:p text:style-name="P2">Pre-condizioni generali:</text:p>
      <text:list text:style-name="L1">
        <text:list-item>
          <text:p text:style-name="P3"><text:span text:style-name="T1">attore identificato come un’istanza</text:span><text:span text:style-name="T2"> Organizzatore </text:span><text:span text:style-name="T3">organizzatore.</text:span></text:p>
        </text:list-item>
      </text:list>
      <text:p text:style-name="P4"/>
      <text:p text:style-name="P4"/>
      <text:p text:style-name="P5"><text:span text:style-name="T4">1. </text:span><text:span text:style-name="T5">accettaCommessa(</text:span><text:span text:style-name="T6">nome</text:span><text:span text:style-name="T7">: testo, </text:span><text:span text:style-name="T6">cognome</text:span><text:span text:style-name="T7">: testo, </text:span><text:span text:style-name="T6">numTelefono</text:span><text:span text:style-name="T7">: testo, </text:span><text:span text:style-name="T6">data</text:span><text:span text:style-name="T7">: data, </text:span><text:span text:style-name="T6">luogo?</text:span><text:span text:style-name="T7">: testo, </text:span><text:span text:style-name="T6">numPartecipanti</text:span><text:span text:style-name="T7">: numero, </text:span><text:span text:style-name="T8">servizi</text:span><text:span text:style-name="T9">: testo</text:span><text:span text:style-name="T10">)</text:span></text:p>
      <text:p text:style-name="P6"/>
      <text:p text:style-name="P7">Pre-condizioni:</text:p>
      <text:p text:style-name="P8"/>
      <text:p text:style-name="P8">Post-condizioni:</text:p>
      <text:list text:style-name="L2">
        <text:list-item>
          <text:p text:style-name="P9">le condizioni di accettazione della commessa sono verificate.</text:p>
        </text:list-item>
        <text:list-item>
          <text:p text:style-name="P10"><text:span text:style-name="T11">[</text:span><text:span text:style-name="T12">se il cliente è nuovo</text:span><text:span text:style-name="T11">]</text:span><text:span text:style-name="T12"> è </text:span><text:span text:style-name="T11">stata</text:span><text:span text:style-name="T12"> creata una nuova istanza Cliente </text:span><text:span text:style-name="T13">cliente</text:span><text:span text:style-name="T14">.</text:span></text:p>
        </text:list-item>
        <text:list-item>
          <text:p text:style-name="P11"><text:span text:style-name="T15">è </text:span><text:span text:style-name="T16">stata</text:span><text:span text:style-name="T15"> creata una nuova istanza Commessa </text:span><text:span text:style-name="T17">commessa </text:span><text:span text:style-name="T18">con i dati forniti dal cliente</text:span><text:span text:style-name="T17">.</text:span></text:p>
        </text:list-item>
        <text:list-item>
          <text:p text:style-name="P10"><text:span text:style-name="T19">cliente</text:span><text:span text:style-name="T20"> </text:span><text:span text:style-name="T21">commissiona</text:span><text:span text:style-name="T12"> </text:span><text:span text:style-name="T11">c</text:span><text:span text:style-name="T14">ommessa.</text:span></text:p>
        </text:list-item>
        <text:list-item>
          <text:p text:style-name="P12">è <text:span text:style-name="T19">stata</text:span> creata una nuova istanza SchedaEvento <text:span text:style-name="T22">schedaEvento</text:span><text:span text:style-name="T23"> </text:span>con stato impostato a “In compilazione”.</text:p>
        </text:list-item>
        <text:list-item>
          <text:p text:style-name="P13">commessa <text:span text:style-name="T24">compila</text:span><text:span text:style-name="T25"> </text:span>SchedaEvento.</text:p>
        </text:list-item>
      </text:list>
      <text:p text:style-name="P14"/>
      <text:list text:style-name="L3">
        <text:list-header>
          <text:p text:style-name="P15"/>
        </text:list-header>
      </text:list>
      <text:p text:style-name="P16"><text:span text:style-name="T26">2. </text:span><text:span text:style-name="T27">compilaSchedaEvento(</text:span><text:span text:style-name="T28">)</text:span></text:p>
      <text:p text:style-name="P17"/>
      <text:p text:style-name="P18">Pre-condizioni:</text:p>
      <text:list text:style-name="L4">
        <text:list-item>
          <text:p text:style-name="P19">lo stato dell’evento è “In <text:span text:style-name="T29">compilazione</text:span>”.</text:p>
        </text:list-item>
      </text:list>
      <text:list xml:id="list222076003" text:style-name="L5">
        <text:list-item>
          <text:p text:style-name="P20">esiste un’istanza <text:span text:style-name="T22">commessa</text:span><text:span text:style-name="T30">.</text:span></text:p>
        </text:list-item>
      </text:list>
      <text:p text:style-name="P8"/>
      <text:p text:style-name="P8">Post-condizioni:</text:p>
      <text:list text:style-name="L6">
        <text:list-item>
          <text:p text:style-name="P21">è <text:span text:style-name="T31">stata verificata la correttezza dei dati di </text:span><text:span text:style-name="T32">commessa.</text:span></text:p>
        </text:list-item>
        <text:list-item>
          <text:p text:style-name="P22">è <text:span text:style-name="T33">stata compilata la s</text:span><text:span text:style-name="T34">chedaEvento</text:span><text:span text:style-name="T33"> inserendo i dati d</text:span><text:span text:style-name="T31">i</text:span><text:span text:style-name="T33"> </text:span><text:span text:style-name="T34">commessa.</text:span></text:p>
        </text:list-item>
        <text:list-item>
          <text:p text:style-name="P23">sono stati compilati i vari servizi richiesti dal cliente nelle nuove istanze di Servizio <text:span text:style-name="T22">servizio1..servizioN.</text:span></text:p>
        </text:list-item>
        <text:list-item>
          <text:p text:style-name="P23">è <text:span text:style-name="T35">stato impostato lo stato dell’evento a “Scheda salvata”.</text:span></text:p>
        </text:list-item>
      </text:list>
      <text:p text:style-name="P24"/>
      <text:p text:style-name="P24"/>
      <text:p text:style-name="P25">3. assegnaChef(<text:span text:style-name="T36">chef</text:span><text:span text:style-name="T37">: Chef)</text:span></text:p>
      <text:p text:style-name="P26"/>
      <text:p text:style-name="P27">Pre-condizioni:</text:p>
      <text:list xml:id="list184659082941900" text:continue-list="list222076003" text:style-name="L5">
        <text:list-item>
          <text:p text:style-name="P28">lo stato dell’evento è “<text:span text:style-name="T29">Scheda salvata</text:span>”.</text:p>
        </text:list-item>
        <text:list-item>
          <text:p text:style-name="P29">è <text:span text:style-name="T38">in corso la definizione di </text:span><text:span text:style-name="T39">schedaEvento.</text:span></text:p>
        </text:list-item>
        <text:list-item>
          <text:p text:style-name="P30">esiste l’istanza <text:span text:style-name="T22">chef.</text:span></text:p>
        </text:list-item>
      </text:list>
      <text:p text:style-name="P31"/>
      <text:p text:style-name="P31">Post-condizioni:</text:p>
      <text:list text:style-name="L7">
        <text:list-item>
          <text:p text:style-name="P32"><text:span text:style-name="T40">è stato </text:span><text:span text:style-name="T38">assegnato </text:span><text:span text:style-name="T41">chef</text:span><text:span text:style-name="T42"> a </text:span><text:span text:style-name="T41">schedaEvento.</text:span></text:p>
        </text:list-item>
        <text:list-item>
          <text:p text:style-name="P33">è stato impostato lo stato dell’evento a “Chef assegnato”.</text:p>
        </text:list-item>
      </text:list>
      <text:p text:style-name="P34"/>
      <text:p text:style-name="P34"/>
      <text:p text:style-name="P35"><text:span text:style-name="T43">4. </text:span><text:span text:style-name="T25">prenotaPersonale(</text:span><text:span text:style-name="T44">insieme P di </text:span><text:span text:style-name="T45">P</text:span><text:span text:style-name="T44">ersonale</text:span><text:span text:style-name="T46">, </text:span><text:span text:style-name="T47">servizio</text:span><text:span text:style-name="T48">: Servizio</text:span><text:span text:style-name="T25">)</text:span></text:p>
      <text:p text:style-name="P26"/>
      <text:p text:style-name="P27">Pre-condizioni:</text:p>
      <text:list xml:id="list184658957284100" text:continue-list="list184659082941900" text:style-name="L5">
        <text:list-item>
          <text:p text:style-name="P36">lo stato dell’evento è “In corso” <text:span text:style-name="T49">oppure “Chef assegnato”</text:span>.</text:p>
        </text:list-item>
        <text:list-item>
          <text:p text:style-name="P37">esistono tutte le istanze<text:span text:style-name="T22"> personale </text:span>dell’insieme P.</text:p>
        </text:list-item>
        <text:list-item>
          <text:p text:style-name="P38">esiste l’istanza <text:span text:style-name="T22">servizio.</text:span></text:p>
        </text:list-item>
      </text:list>
      <text:p text:style-name="P31"/>
      <text:p text:style-name="P31">Post-condizioni:</text:p>
      <text:list xml:id="list2018632038" text:style-name="L8">
        <text:list-item>
          <text:p text:style-name="P39"><text:span text:style-name="T15">è</text:span><text:span text:style-name="T50"> stata verificata la disponibilità di ciascun </text:span><text:span text:style-name="T51">personale</text:span><text:span text:style-name="T52">.</text:span></text:p>
        </text:list-item>
        <text:list-item>
          <text:p text:style-name="P40">il <text:span text:style-name="T22">personale</text:span> coinvolto è stato riservato preventivamente.</text:p>
        </text:list-item>
        <text:list-item>
          <text:p text:style-name="P40">è <text:span text:style-name="T53">stato impostato lo stato del </text:span><text:span text:style-name="T54">personale </text:span><text:span text:style-name="T53">coinvolto a “prenotato”.</text:span></text:p>
        </text:list-item>
        <text:list-item>
          <text:p text:style-name="P40">è stato impostato lo stato dell’evento a “Personale prenotato”.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5. approvaMenu(<text:span text:style-name="T36">menu</text:span><text:span text:style-name="T37">: Menu, </text:span><text:span text:style-name="T55">servizio</text:span><text:span text:style-name="T56">: Servizio</text:span><text:span text:style-name="T37">)</text:span></text:p>
      <text:p text:style-name="P43"/>
      <text:p text:style-name="P44">Pre-condizioni:</text:p>
      <text:list text:style-name="L9">
        <text:list-item>
          <text:p text:style-name="P45"><text:span text:style-name="T57">lo stato dell’evento è “</text:span><text:span text:style-name="T58">Personale prenotato</text:span><text:span text:style-name="T57">”.</text:span></text:p>
        </text:list-item>
      </text:list>
      <text:list xml:id="list184657711888166" text:continue-list="list184658957284100" text:style-name="L5">
        <text:list-item>
          <text:p text:style-name="P46">esiste un’istanza Menu <text:span text:style-name="T22">menu </text:span>creata da <text:span text:style-name="T22">chef.</text:span></text:p>
        </text:list-item>
        <text:list-item>
          <text:p text:style-name="P47">esiste l’istanza servizio.</text:p>
        </text:list-item>
      </text:list>
      <text:p text:style-name="P48"/>
      <text:p text:style-name="P48">Post-condizioni:</text:p>
      <text:list text:style-name="L10">
        <text:list-item>
          <text:p text:style-name="P49"><text:span text:style-name="T15">è </text:span><text:span text:style-name="T59">stato approvato il </text:span><text:span text:style-name="T60">menu.</text:span></text:p>
        </text:list-item>
        <text:list-item>
          <text:p text:style-name="P50">menu <text:span text:style-name="T30">è </text:span><text:span text:style-name="T24">in uso in</text:span><text:span text:style-name="T30"> </text:span>servizio.</text:p>
        </text:list-item>
        <text:list-item>
          <text:p text:style-name="P51">è stato impostato lo stato dell’evento a “Evento in corso”.</text:p>
        </text:list-item>
      </text:list>
      <text:p text:style-name="P52"/>
      <text:p text:style-name="P52"/>
      <text:p text:style-name="P53">6. assegnaPersonale(<text:span text:style-name="T61">insieme P di </text:span><text:span text:style-name="T62">P</text:span><text:span text:style-name="T61">ersonale</text:span><text:span text:style-name="T63">, </text:span><text:span text:style-name="T36">servizio</text:span><text:span text:style-name="T37">: Servizio</text:span>)</text:p>
      <text:p text:style-name="P54"/>
      <text:p text:style-name="P55">Pre-condizioni:</text:p>
      <text:list xml:id="list184658819254922" text:continue-list="list184657711888166" text:style-name="L5">
        <text:list-item>
          <text:p text:style-name="P56">lo stato dell’evento è “In corso”.</text:p>
        </text:list-item>
        <text:list-item>
          <text:p text:style-name="P57">esistono tutte le istanze<text:span text:style-name="T22"> personale </text:span>dell’insieme P.</text:p>
        </text:list-item>
        <text:list-item>
          <text:p text:style-name="P47">esiste l’istanza <text:span text:style-name="T22">servizio.</text:span></text:p>
        </text:list-item>
      </text:list>
      <text:p text:style-name="P58"/>
      <text:p text:style-name="P58">Post-condizioni:</text:p>
      <text:list text:continue-list="list2018632038" text:style-name="L8">
        <text:list-item>
          <text:p text:style-name="P59"><text:span text:style-name="T15">è</text:span><text:span text:style-name="T50"> stata verificata la disponibilità di ciascun </text:span><text:span text:style-name="T51">personale</text:span><text:span text:style-name="T52">.</text:span></text:p>
        </text:list-item>
        <text:list-item>
          <text:p text:style-name="P60">[se c’è <text:span text:style-name="T22">personale</text:span> in eccesso] è stato liberato il <text:span text:style-name="T22">personale</text:span> in eccesso.</text:p>
        </text:list-item>
      </text:list>
      <text:list text:style-name="L11">
        <text:list-item>
          <text:p text:style-name="P61">è <text:span text:style-name="T53">stato impostato lo stato </text:span><text:span text:style-name="T64">di ciascun</text:span><text:span text:style-name="T53"> </text:span><text:span text:style-name="T54">personale </text:span><text:span text:style-name="T53">coinvolto a “assegnato”.</text:span></text:p>
        </text:list-item>
        <text:list-item>
          <text:p text:style-name="P62">personale <text:span text:style-name="T24">lavora</text:span><text:span text:style-name="T30"> </text:span><text:span text:style-name="T24">per</text:span><text:span text:style-name="T30"> </text:span>servizio.</text:p>
        </text:list-item>
      </text:list>
      <text:p text:style-name="P63"/>
      <text:p text:style-name="P63"/>
      <text:p text:style-name="P64">7. <text:span text:style-name="T65">preparaLocation(</text:span><text:span text:style-name="T66">luogo</text:span><text:span text:style-name="T67">: testo, </text:span><text:span text:style-name="T66">servizio</text:span><text:span text:style-name="T67">: Servizio)</text:span></text:p>
      <text:p text:style-name="P65"/>
      <text:p text:style-name="P66">Pre-condizioni:</text:p>
      <text:list xml:id="list184657504157642" text:continue-list="list184658819254922" text:style-name="L5">
        <text:list-item>
          <text:p text:style-name="P56">lo stato dell’evento è “In corso”.</text:p>
        </text:list-item>
        <text:list-item>
          <text:p text:style-name="P67"><text:span text:style-name="T68">esiste l’istanza </text:span><text:span text:style-name="T39">servizio.</text:span></text:p>
        </text:list-item>
        <text:list-item>
          <text:p text:style-name="P68"><text:span text:style-name="T69">luogo</text:span><text:span text:style-name="T30"> è valido</text:span></text:p>
        </text:list-item>
      </text:list>
      <text:p text:style-name="P69"/>
      <text:p text:style-name="P69">Post-condizioni:</text:p>
      <text:list text:style-name="L12">
        <text:list-item>
          <text:p text:style-name="P70"><text:span text:style-name="T30">è </text:span><text:span text:style-name="T70">stata creata un’istanza Location</text:span><text:span text:style-name="T71"> location.</text:span></text:p>
        </text:list-item>
        <text:list-item>
          <text:p text:style-name="P71"><text:span text:style-name="T22">location.luogo</text:span> = <text:span text:style-name="T36">luogo</text:span>.</text:p>
        </text:list-item>
        <text:list-item>
          <text:p text:style-name="P72"><text:span text:style-name="T72">servizio </text:span><text:span text:style-name="T73">si svolge in</text:span><text:span text:style-name="T72"> location.</text:span></text:p>
        </text:list-item>
      </text:list>
      <text:p text:style-name="P73"/>
      <text:p text:style-name="P74"/>
      <text:p text:style-name="P75">8. appuntaEventoEMenu()</text:p>
      <text:p text:style-name="P76"/>
      <text:p text:style-name="P77">Pre-condizioni:</text:p>
      <text:list xml:id="list184657214217883" text:continue-list="list184657504157642" text:style-name="L5">
        <text:list-item>
          <text:p text:style-name="P56">lo stato dell’evento è “In corso”.</text:p>
        </text:list-item>
      </text:list>
      <text:p text:style-name="P78"/>
      <text:p text:style-name="P78">Post-condizioni:</text:p>
      <text:list text:style-name="L13">
        <text:list-item>
          <text:p text:style-name="P79"><text:span text:style-name="T74">è </text:span><text:span text:style-name="T57">stata creata l’istanza Note </text:span><text:span text:style-name="T75">note.</text:span></text:p>
        </text:list-item>
      </text:list>
      <text:list text:style-name="L14">
        <text:list-item>
          <text:p text:style-name="P80"><text:span text:style-name="T15">è </text:span><text:span text:style-name="T76">stato salvato </text:span><text:span text:style-name="T77">evento</text:span><text:span text:style-name="T78"> e tutti i </text:span><text:span text:style-name="T77">menu</text:span><text:span text:style-name="T78"> all’iterno di </text:span><text:span text:style-name="T77">note.</text:span></text:p>
        </text:list-item>
      </text:list>
      <text:p text:style-name="P81"/>
      <text:p text:style-name="P81"/>
      <text:p text:style-name="P82">9. terminaEvento()</text:p>
      <text:p text:style-name="P83"/>
      <text:p text:style-name="P84">Pre-condizioni:</text:p>
      <text:list xml:id="list184659012758375" text:continue-list="list184657214217883" text:style-name="L5">
        <text:list-item>
          <text:p text:style-name="P56">lo stato dell’evento è “In corso”.</text:p>
        </text:list-item>
      </text:list>
      <text:p text:style-name="P85"/>
      <text:p text:style-name="P85">Post-condizioni:</text:p>
      <text:list text:style-name="L15">
        <text:list-item>
          <text:p text:style-name="P86"><text:span text:style-name="T15">è stato impostato lo stato dell’evento a “</text:span><text:span text:style-name="T29">Evento chiuso</text:span><text:span text:style-name="T15">”.</text:span></text:p>
        </text:list-item>
      </text:list>
      <text:p text:style-name="P87"><text:span text:style-name="T79">n</text:span>. <text:span text:style-name="T79">nome()</text:span></text:p>
      <text:p text:style-name="P88"/>
      <text:p text:style-name="P89">Pre-condizioni:</text:p>
      <text:list text:continue-list="list184659012758375" text:style-name="L5">
        <text:list-item>
          <text:p text:style-name="P90"/>
        </text:list-item>
      </text:list>
      <text:p text:style-name="P91"/>
      <text:p text:style-name="P91">Post-condizioni:</text:p>
      <text:list text:style-name="L16">
        <text:list-item>
          <text:p text:style-name="P92"/>
        </text:list-item>
      </text:list>
      <text:list text:style-name="L17">
        <text:list-item>
          <text:p text:style-name="P93"><text:span text:style-name="T1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20T15:34:56.423416967</meta:creation-date>
    <dc:date>2026-07-20T18:46:57.109288638</dc:date>
    <meta:editing-duration>PT2H17M44S</meta:editing-duration>
    <meta:editing-cycles>36</meta:editing-cycles>
    <meta:generator>LibreOffice/26.2.4.2$Linux_X86_64 LibreOffice_project/620$Build-2</meta:generator>
    <meta:document-statistic meta:table-count="0" meta:image-count="0" meta:object-count="0" meta:page-count="3" meta:paragraph-count="84" meta:word-count="474" meta:character-count="3179" meta:non-whitespace-character-count="2838"/>
  </office:meta>
</office:document-meta>
</file>