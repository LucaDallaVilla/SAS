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normal" officeooo:rsid="000669bb" officeooo:paragraph-rsid="000669bb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0pt" fo:font-weight="normal" officeooo:rsid="000669bb" officeooo:paragraph-rsid="000ef9c9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officeooo:paragraph-rsid="000ef9c9"/>
    </style:style>
    <style:style style:name="P4" style:family="paragraph" style:parent-style-name="Standard">
      <style:text-properties fo:font-size="10pt" fo:font-style="normal" fo:font-weight="normal" officeooo:rsid="000669bb" officeooo:paragraph-rsid="000669bb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use-window-font-color="true" loext:opacity="0%" officeooo:paragraph-rsid="002aedc6"/>
    </style:style>
    <style:style style:name="P6" style:family="paragraph" style:parent-style-name="Standard">
      <style:text-properties style:use-window-font-color="true" loext:opacity="0%" fo:font-size="10pt" style:text-underline-style="none" officeooo:rsid="0003693d" officeooo:paragraph-rsid="002aedc6" style:font-size-asian="10pt" style:font-size-complex="10pt"/>
    </style:style>
    <style:style style:name="P7" style:family="paragraph" style:parent-style-name="Standard">
      <style:text-properties style:use-window-font-color="true" loext:opacity="0%" fo:font-size="10pt" style:text-underline-style="none" fo:font-weight="bold" officeooo:rsid="000669bb" officeooo:paragraph-rsid="002aedc6" style:font-size-asian="10pt" style:font-weight-asian="bold" style:font-size-complex="10pt" style:font-weight-complex="bold"/>
    </style:style>
    <style:style style:name="P8" style:family="paragraph" style:parent-style-name="Standard">
      <style:text-properties style:use-window-font-color="true" loext:opacity="0%" fo:font-size="10pt" style:text-underline-style="none" fo:font-weight="bold" officeooo:rsid="0007f9ae" officeooo:paragraph-rsid="002aedc6" style:font-size-asian="10pt" style:font-weight-asian="bold" style:font-size-complex="10pt" style:font-weight-complex="bold"/>
    </style:style>
    <style:style style:name="P9" style:family="paragraph" style:parent-style-name="Standard" style:list-style-name="L2">
      <style:text-properties style:use-window-font-color="true" loext:opacity="0%" fo:font-size="10pt" fo:font-style="normal" style:text-underline-style="none" fo:font-weight="normal" officeooo:rsid="0008f18e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text-properties style:use-window-font-color="true" loext:opacity="0%" fo:font-size="10pt" fo:font-style="italic" style:text-underline-style="none" fo:font-weight="normal" officeooo:rsid="0007f9ae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2">
      <style:text-properties style:use-window-font-color="true" loext:opacity="0%" fo:font-size="10pt" style:text-underline-style="none" fo:font-weight="bold" officeooo:rsid="0007f9ae" officeooo:paragraph-rsid="002aedc6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paragraph-properties fo:text-align="left" style:justify-single-word="false"/>
      <style:text-properties style:use-window-font-color="true" loext:opacity="0%" fo:font-size="10pt" fo:font-style="normal" style:text-underline-style="none" fo:font-weight="normal" officeooo:rsid="0008f18e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text-align="left" style:justify-single-word="false"/>
      <style:text-properties style:use-window-font-color="true" loext:opacity="0%" fo:font-size="10pt" fo:font-style="italic" style:text-underline-style="none" fo:font-weight="normal" officeooo:rsid="00107d1c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style:use-window-font-color="true" loext:opacity="0%" fo:font-size="10pt" fo:font-style="italic" style:text-underline-style="none" fo:font-weight="normal" officeooo:rsid="0007f9ae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 style:list-style-name="L3">
      <style:text-properties style:use-window-font-color="true" loext:opacity="0%" fo:font-size="10pt" fo:font-weight="bold" officeooo:rsid="00107d1c" officeooo:paragraph-rsid="002aedc6" style:font-size-asian="10pt" style:font-weight-asian="bold" style:font-size-complex="10pt" style:font-weight-complex="bold"/>
    </style:style>
    <style:style style:name="P16" style:family="paragraph" style:parent-style-name="Standard" style:list-style-name="L4">
      <style:text-properties style:use-window-font-color="true" loext:opacity="0%" fo:font-size="10pt" style:text-underline-style="none" fo:font-weight="normal" officeooo:rsid="0026a191" officeooo:paragraph-rsid="002aedc6" style:font-size-asian="10pt" style:font-weight-asian="normal" style:font-size-complex="10pt" style:font-weight-complex="normal"/>
    </style:style>
    <style:style style:name="P17" style:family="paragraph" style:parent-style-name="Standard" style:list-style-name="L5">
      <style:text-properties style:use-window-font-color="true" loext:opacity="0%" fo:font-size="10pt" style:text-underline-style="none" fo:font-weight="normal" officeooo:rsid="00112863" officeooo:paragraph-rsid="002aedc6" style:font-size-asian="10pt" style:font-weight-asian="normal" style:font-size-complex="10pt" style:font-weight-complex="normal"/>
    </style:style>
    <style:style style:name="P18" style:family="paragraph" style:parent-style-name="Standard" style:list-style-name="L6">
      <style:text-properties style:use-window-font-color="true" loext:opacity="0%" fo:font-size="10pt" fo:font-style="normal" style:text-underline-style="none" fo:font-weight="normal" officeooo:rsid="00112863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6">
      <style:text-properties style:use-window-font-color="true" loext:opacity="0%" fo:font-size="10pt" style:text-underline-style="none" fo:font-weight="normal" officeooo:rsid="00107d1c" officeooo:paragraph-rsid="002aedc6" style:font-size-asian="10pt" style:font-weight-asian="normal" style:font-size-complex="10pt" style:font-weight-complex="normal"/>
    </style:style>
    <style:style style:name="P20" style:family="paragraph" style:parent-style-name="Standard" style:list-style-name="L6">
      <style:text-properties style:use-window-font-color="true" loext:opacity="0%" fo:font-size="10pt" fo:font-style="normal" style:text-underline-style="none" fo:font-weight="normal" officeooo:rsid="0012f3bc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use-window-font-color="true" loext:opacity="0%" fo:font-size="10pt" fo:font-style="italic" style:text-underline-style="none" fo:font-weight="normal" officeooo:rsid="0012f3bc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style:use-window-font-color="true" loext:opacity="0%" fo:font-size="10pt" fo:font-weight="bold" officeooo:rsid="0014d80e" officeooo:paragraph-rsid="002aedc6" style:font-size-asian="10pt" style:font-weight-asian="bold" style:font-size-complex="10pt" style:font-weight-complex="bold"/>
    </style:style>
    <style:style style:name="P23" style:family="paragraph" style:parent-style-name="Standard" style:list-style-name="L5">
      <style:text-properties style:use-window-font-color="true" loext:opacity="0%" fo:font-size="10pt" style:text-underline-style="none" fo:font-weight="normal" officeooo:rsid="0026a191" officeooo:paragraph-rsid="002aedc6" style:font-size-asian="10pt" style:font-weight-asian="normal" style:font-size-complex="10pt" style:font-weight-complex="normal"/>
    </style:style>
    <style:style style:name="P24" style:family="paragraph" style:parent-style-name="Standard" style:list-style-name="L5">
      <style:text-properties style:use-window-font-color="true" loext:opacity="0%" fo:font-size="10pt" style:text-underline-style="none" fo:font-weight="normal" officeooo:rsid="000669bb" officeooo:paragraph-rsid="002aedc6" style:font-size-asian="10pt" style:font-weight-asian="normal" style:font-size-complex="10pt" style:font-weight-complex="normal"/>
    </style:style>
    <style:style style:name="P25" style:family="paragraph" style:parent-style-name="Standard" style:list-style-name="L5">
      <style:text-properties style:use-window-font-color="true" loext:opacity="0%" fo:font-size="10pt" fo:font-style="normal" style:text-underline-style="none" fo:font-weight="normal" officeooo:rsid="0014d80e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7">
      <style:text-properties style:use-window-font-color="true" loext:opacity="0%" fo:font-size="10pt" style:text-underline-style="none" fo:font-weight="bold" officeooo:rsid="0007f9ae" officeooo:paragraph-rsid="002aedc6" style:font-size-asian="10pt" style:font-weight-asian="bold" style:font-size-complex="10pt" style:font-weight-complex="bold"/>
    </style:style>
    <style:style style:name="P27" style:family="paragraph" style:parent-style-name="Standard" style:list-style-name="L7">
      <style:text-properties style:use-window-font-color="true" loext:opacity="0%" fo:font-size="10pt" fo:font-style="normal" style:text-underline-style="none" fo:font-weight="normal" officeooo:rsid="0014d80e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use-window-font-color="true" loext:opacity="0%" fo:font-size="10pt" fo:font-style="normal" style:text-underline-style="none" fo:font-weight="bold" officeooo:rsid="0007f9ae" officeooo:paragraph-rsid="002aedc6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style:use-window-font-color="true" loext:opacity="0%" fo:font-size="10pt" fo:font-weight="normal" officeooo:rsid="0014d80e" officeooo:paragraph-rsid="002aedc6" style:font-size-asian="10pt" style:font-weight-asian="normal" style:font-size-complex="10pt" style:font-weight-complex="normal"/>
    </style:style>
    <style:style style:name="P30" style:family="paragraph" style:parent-style-name="Standard" style:list-style-name="L5">
      <style:text-properties style:use-window-font-color="true" loext:opacity="0%" fo:font-size="10pt" style:text-underline-style="none" fo:font-weight="normal" officeooo:rsid="001a38ce" officeooo:paragraph-rsid="002aedc6" style:font-size-asian="10pt" style:font-weight-asian="normal" style:font-size-complex="10pt" style:font-weight-complex="normal"/>
    </style:style>
    <style:style style:name="P31" style:family="paragraph" style:parent-style-name="Standard" style:list-style-name="L8">
      <style:text-properties style:use-window-font-color="true" loext:opacity="0%" fo:font-size="10pt" style:text-underline-style="none" fo:font-weight="bold" officeooo:rsid="0007f9ae" officeooo:paragraph-rsid="002aedc6" style:font-size-asian="10pt" style:font-weight-asian="bold" style:font-size-complex="10pt" style:font-weight-complex="bold"/>
    </style:style>
    <style:style style:name="P32" style:family="paragraph" style:parent-style-name="Standard" style:list-style-name="L8">
      <style:text-properties style:use-window-font-color="true" loext:opacity="0%" fo:font-size="10pt" fo:font-style="normal" style:text-underline-style="none" fo:font-weight="normal" officeooo:rsid="001a38ce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use-window-font-color="true" loext:opacity="0%" fo:font-size="10pt" fo:font-weight="bold" officeooo:rsid="000292f3" officeooo:paragraph-rsid="002aedc6" style:font-size-asian="10pt" style:font-weight-asian="bold" style:font-size-complex="10pt" style:font-weight-complex="bold"/>
    </style:style>
    <style:style style:name="P34" style:family="paragraph" style:parent-style-name="Standard">
      <style:text-properties style:use-window-font-color="true" loext:opacity="0%" fo:font-size="10pt" fo:font-weight="bold" officeooo:rsid="001ae768" officeooo:paragraph-rsid="002aedc6" style:font-size-asian="10pt" style:font-weight-asian="bold" style:font-size-complex="10pt" style:font-weight-complex="bold"/>
    </style:style>
    <style:style style:name="P35" style:family="paragraph" style:parent-style-name="Standard" style:list-style-name="L9">
      <style:text-properties style:use-window-font-color="true" loext:opacity="0%" officeooo:paragraph-rsid="002aedc6"/>
    </style:style>
    <style:style style:name="P36" style:family="paragraph" style:parent-style-name="Standard" style:list-style-name="L5">
      <style:text-properties style:use-window-font-color="true" loext:opacity="0%" fo:font-size="10pt" fo:font-style="normal" style:text-underline-style="none" fo:font-weight="normal" officeooo:rsid="001ae768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5">
      <style:text-properties style:use-window-font-color="true" loext:opacity="0%" fo:font-size="10pt" style:text-underline-style="none" fo:font-weight="normal" officeooo:rsid="001e601d" officeooo:paragraph-rsid="002aedc6" style:font-size-asian="10pt" style:font-weight-asian="normal" style:font-size-complex="10pt" style:font-weight-complex="normal"/>
    </style:style>
    <style:style style:name="P38" style:family="paragraph" style:parent-style-name="Standard" style:list-style-name="L10">
      <style:text-properties style:use-window-font-color="true" loext:opacity="0%" fo:font-size="10pt" style:text-underline-style="none" fo:font-weight="bold" officeooo:rsid="0007f9ae" officeooo:paragraph-rsid="002aedc6" style:font-size-asian="10pt" style:font-weight-asian="bold" style:font-size-complex="10pt" style:font-weight-complex="bold"/>
    </style:style>
    <style:style style:name="P39" style:family="paragraph" style:parent-style-name="Standard" style:list-style-name="L10">
      <style:text-properties style:use-window-font-color="true" loext:opacity="0%" fo:font-size="10pt" fo:font-style="italic" style:text-underline-style="none" fo:font-weight="normal" officeooo:rsid="001fb4d6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 style:list-style-name="L10">
      <style:text-properties style:use-window-font-color="true" loext:opacity="0%" fo:font-size="10pt" fo:font-style="normal" style:text-underline-style="none" fo:font-weight="normal" officeooo:rsid="001b425f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style:use-window-font-color="true" loext:opacity="0%" fo:font-size="10pt" fo:font-weight="bold" officeooo:rsid="001cca33" officeooo:paragraph-rsid="002aedc6" style:font-size-asian="10pt" style:font-weight-asian="bold" style:font-size-complex="10pt" style:font-weight-complex="bold"/>
    </style:style>
    <style:style style:name="P42" style:family="paragraph" style:parent-style-name="Standard" style:list-style-name="L8">
      <style:text-properties style:use-window-font-color="true" loext:opacity="0%" fo:font-size="10pt" fo:font-style="normal" style:text-underline-style="none" fo:font-weight="normal" officeooo:rsid="0021c48a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11">
      <style:text-properties style:use-window-font-color="true" loext:opacity="0%" fo:font-size="10pt" fo:font-style="normal" style:text-underline-style="none" fo:font-weight="normal" officeooo:rsid="001a38ce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11">
      <style:text-properties style:use-window-font-color="true" loext:opacity="0%" fo:font-size="10pt" fo:font-style="italic" style:text-underline-style="none" fo:font-weight="normal" officeooo:rsid="0020fc9c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>
      <style:text-properties style:use-window-font-color="true" loext:opacity="0%" fo:font-size="10pt" fo:font-weight="bold" officeooo:rsid="0021c48a" officeooo:paragraph-rsid="002aedc6" style:font-size-asian="10pt" style:font-weight-asian="bold" style:font-size-complex="10pt" style:font-weight-complex="bold"/>
    </style:style>
    <style:style style:name="P46" style:family="paragraph" style:parent-style-name="Standard" style:list-style-name="L5">
      <style:text-properties style:use-window-font-color="true" loext:opacity="0%" fo:font-size="10pt" fo:font-style="italic" style:text-underline-style="none" fo:font-weight="normal" officeooo:rsid="0022c2c0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 style:list-style-name="L12">
      <style:text-properties style:use-window-font-color="true" loext:opacity="0%" fo:font-size="10pt" style:text-underline-style="none" fo:font-weight="normal" officeooo:rsid="0022c2c0" officeooo:paragraph-rsid="002aedc6" style:font-size-asian="10pt" style:font-weight-asian="normal" style:font-size-complex="10pt" style:font-weight-complex="normal"/>
    </style:style>
    <style:style style:name="P48" style:family="paragraph" style:parent-style-name="Standard" style:list-style-name="L12">
      <style:text-properties style:use-window-font-color="true" loext:opacity="0%" fo:font-size="10pt" fo:font-style="normal" style:text-underline-style="none" fo:font-weight="normal" officeooo:rsid="0023e7f7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2">
      <style:text-properties style:use-window-font-color="true" loext:opacity="0%" fo:font-size="10pt" fo:font-weight="normal" officeooo:rsid="0023e7f7" officeooo:paragraph-rsid="002aedc6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use-window-font-color="true" loext:opacity="0%" fo:font-size="10pt" fo:font-style="italic" style:text-underline-style="none" fo:font-weight="normal" officeooo:rsid="0023e7f7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text-properties style:use-window-font-color="true" loext:opacity="0%" fo:font-size="10pt" fo:font-weight="bold" officeooo:rsid="0023e7f7" officeooo:paragraph-rsid="002aedc6" style:font-size-asian="10pt" style:font-weight-asian="bold" style:font-size-complex="10pt" style:font-weight-complex="bold"/>
    </style:style>
    <style:style style:name="P52" style:family="paragraph" style:parent-style-name="Standard" style:list-style-name="L13">
      <style:text-properties style:use-window-font-color="true" loext:opacity="0%" officeooo:paragraph-rsid="002aedc6"/>
    </style:style>
    <style:style style:name="P53" style:family="paragraph" style:parent-style-name="Standard" style:list-style-name="L14">
      <style:text-properties style:use-window-font-color="true" loext:opacity="0%" fo:font-size="10pt" style:text-underline-style="none" fo:font-weight="bold" officeooo:rsid="0007f9ae" officeooo:paragraph-rsid="002aedc6" style:font-size-asian="10pt" style:font-weight-asian="bold" style:font-size-complex="10pt" style:font-weight-complex="bold"/>
    </style:style>
    <style:style style:name="P54" style:family="paragraph" style:parent-style-name="Standard">
      <style:text-properties style:use-window-font-color="true" loext:opacity="0%" fo:font-size="10pt" fo:font-style="italic" style:text-underline-style="none" fo:font-weight="normal" officeooo:rsid="0026a191" officeooo:paragraph-rsid="002aedc6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text-properties style:use-window-font-color="true" loext:opacity="0%" fo:font-size="10pt" fo:font-weight="bold" officeooo:rsid="0026a191" officeooo:paragraph-rsid="002aedc6" style:font-size-asian="10pt" style:font-weight-asian="bold" style:font-size-complex="10pt" style:font-weight-complex="bold"/>
    </style:style>
    <style:style style:name="P56" style:family="paragraph" style:parent-style-name="Standard" style:list-style-name="L15">
      <style:text-properties fo:font-size="10pt" fo:font-style="normal" style:text-underline-style="none" fo:font-weight="normal" officeooo:rsid="001a38ce" officeooo:paragraph-rsid="002aedc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fo:font-weight="normal" officeooo:rsid="000669bb" style:font-size-asian="8.75pt" style:font-weight-asian="normal" style:font-size-complex="10pt" style:font-weight-complex="normal"/>
    </style:style>
    <style:style style:name="T2" style:family="text">
      <style:text-properties fo:font-size="10pt" fo:font-style="normal" fo:font-weight="normal" officeooo:rsid="000669bb" style:font-size-asian="8.75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officeooo:rsid="0007f9ae" style:font-size-asian="8.75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bold" officeooo:rsid="00112863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292f3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ef9c9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bold" officeooo:rsid="000ef9c9" style:font-size-asian="10pt" style:font-weight-asian="bold" style:font-size-complex="10pt" style:font-weight-complex="bold"/>
    </style:style>
    <style:style style:name="T8" style:family="text">
      <style:text-properties fo:font-size="10pt" style:text-underline-style="solid" style:text-underline-width="auto" style:text-underline-color="font-color" fo:font-weight="bold" officeooo:rsid="0022c2c0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fo:font-weight="bold" officeooo:rsid="0022c2c0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bold" officeooo:rsid="0003693d" style:font-size-asian="10pt" style:font-weight-asian="bold" style:font-size-complex="10pt" style:font-weight-complex="bold"/>
    </style:style>
    <style:style style:name="T11" style:family="text">
      <style:text-properties fo:font-style="normal" officeooo:rsid="00107d1c" style:font-style-asian="normal" style:font-style-complex="normal"/>
    </style:style>
    <style:style style:name="T12" style:family="text">
      <style:text-properties fo:font-style="normal" officeooo:rsid="0008f18e" style:font-style-asian="normal" style:font-style-complex="normal"/>
    </style:style>
    <style:style style:name="T13" style:family="text">
      <style:text-properties officeooo:rsid="0008f18e"/>
    </style:style>
    <style:style style:name="T14" style:family="text">
      <style:text-properties officeooo:rsid="000bb3c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7d1c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0825c5" style:font-style-asian="normal" style:font-weight-asian="normal" style:font-style-complex="normal" style:font-weight-complex="normal"/>
    </style:style>
    <style:style style:name="T19" style:family="text">
      <style:text-properties officeooo:rsid="00107d1c"/>
    </style:style>
    <style:style style:name="T20" style:family="text">
      <style:text-properties fo:font-weight="bold" officeooo:rsid="00107d1c" style:font-weight-asian="bold" style:font-weight-complex="bold"/>
    </style:style>
    <style:style style:name="T21" style:family="text">
      <style:text-properties fo:font-style="normal" fo:font-weight="bold" officeooo:rsid="00107d1c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bb3c6" style:font-style-asian="italic" style:font-style-complex="italic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fo:font-weight="bold" officeooo:rsid="00107d1c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0ef9c9" style:font-size-asian="10pt" style:font-weight-asian="bold" style:font-size-complex="10pt" style:font-weight-complex="bold"/>
    </style:style>
    <style:style style:name="T28" style:family="text">
      <style:text-properties fo:font-size="10pt" style:text-underline-style="none" fo:font-weight="bold" officeooo:rsid="00112863" style:font-size-asian="10pt" style:font-weight-asian="bold" style:font-size-complex="10pt" style:font-weight-complex="bold"/>
    </style:style>
    <style:style style:name="T29" style:family="text">
      <style:text-properties officeooo:rsid="00289099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2f3bc"/>
    </style:style>
    <style:style style:name="T32" style:family="text">
      <style:text-properties fo:font-style="italic" officeooo:rsid="0012f3bc" style:font-style-asian="italic" style:font-style-complex="italic"/>
    </style:style>
    <style:style style:name="T33" style:family="text">
      <style:text-properties officeooo:rsid="00112863"/>
    </style:style>
    <style:style style:name="T34" style:family="text">
      <style:text-properties fo:font-style="italic" officeooo:rsid="00112863" style:font-style-asian="italic" style:font-style-complex="italic"/>
    </style:style>
    <style:style style:name="T35" style:family="text">
      <style:text-properties officeooo:rsid="0012f3f4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14d80e"/>
    </style:style>
    <style:style style:name="T39" style:family="text">
      <style:text-properties fo:font-style="italic" officeooo:rsid="0014d80e" style:font-style-asian="italic" style:font-style-complex="italic"/>
    </style:style>
    <style:style style:name="T40" style:family="text">
      <style:text-properties fo:font-weight="normal" officeooo:rsid="0014d80e" style:font-weight-asian="normal" style:font-weight-complex="normal"/>
    </style:style>
    <style:style style:name="T41" style:family="text">
      <style:text-properties fo:font-style="italic" fo:font-weight="normal" officeooo:rsid="0014d80e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14d80e" style:font-style-asian="normal" style:font-weight-asian="normal" style:font-style-complex="normal" style:font-weight-complex="normal"/>
    </style:style>
    <style:style style:name="T43" style:family="text">
      <style:text-properties fo:font-weight="bold" officeooo:rsid="0007f9ae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86435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197c30" style:font-weight-asian="bold" style:font-weight-complex="bold"/>
    </style:style>
    <style:style style:name="T46" style:family="text">
      <style:text-properties officeooo:rsid="002983f2"/>
    </style:style>
    <style:style style:name="T47" style:family="text">
      <style:text-properties fo:font-weight="normal" officeooo:rsid="001a38ce" style:font-weight-asian="normal" style:font-weight-complex="normal"/>
    </style:style>
    <style:style style:name="T48" style:family="text">
      <style:text-properties fo:font-style="italic" fo:font-weight="normal" officeooo:rsid="001a38ce" style:font-style-asian="italic" style:font-weight-asian="normal" style:font-style-complex="italic" style:font-weight-complex="normal"/>
    </style:style>
    <style:style style:name="T49" style:family="text">
      <style:text-properties fo:font-style="normal" fo:font-weight="normal" officeooo:rsid="001a38ce" style:font-style-asian="normal" style:font-weight-asian="normal" style:font-style-complex="normal" style:font-weight-complex="normal"/>
    </style:style>
    <style:style style:name="T50" style:family="text">
      <style:text-properties officeooo:rsid="001fb4d6"/>
    </style:style>
    <style:style style:name="T51" style:family="text">
      <style:text-properties fo:font-style="italic" officeooo:rsid="001fb4d6" style:font-style-asian="italic" style:font-style-complex="italic"/>
    </style:style>
    <style:style style:name="T52" style:family="text">
      <style:text-properties style:text-underline-style="solid" style:text-underline-width="auto" style:text-underline-color="font-color" officeooo:rsid="001e601d"/>
    </style:style>
    <style:style style:name="T53" style:family="text">
      <style:text-properties style:text-underline-style="none" officeooo:rsid="001e601d"/>
    </style:style>
    <style:style style:name="T54" style:family="text">
      <style:text-properties fo:font-size="10pt" style:text-underline-style="none" fo:font-weight="normal" officeooo:rsid="0026a191" style:font-size-asian="10pt" style:font-weight-asian="normal" style:font-size-complex="10pt" style:font-weight-complex="normal"/>
    </style:style>
    <style:style style:name="T55" style:family="text">
      <style:text-properties fo:font-size="10pt" style:text-underline-style="none" fo:font-weight="normal" officeooo:rsid="0029d67f" style:font-size-asian="10pt" style:font-weight-asian="normal" style:font-size-complex="10pt" style:font-weight-complex="normal"/>
    </style:style>
    <style:style style:name="T56" style:family="text">
      <style:text-properties fo:font-weight="normal" officeooo:rsid="001b425f" style:font-weight-asian="normal" style:font-weight-complex="normal"/>
    </style:style>
    <style:style style:name="T57" style:family="text">
      <style:text-properties fo:font-style="italic" fo:font-weight="normal" officeooo:rsid="001b425f" style:font-style-asian="italic" style:font-weight-asian="normal" style:font-style-complex="italic" style:font-weight-complex="normal"/>
    </style:style>
    <style:style style:name="T58" style:family="text">
      <style:text-properties style:text-underline-style="solid" style:text-underline-width="auto" style:text-underline-color="font-color" officeooo:rsid="00186435"/>
    </style:style>
    <style:style style:name="T59" style:family="text">
      <style:text-properties style:text-underline-style="solid" style:text-underline-width="auto" style:text-underline-color="font-color" officeooo:rsid="00197c30"/>
    </style:style>
    <style:style style:name="T60" style:family="text">
      <style:text-properties style:text-underline-style="none" officeooo:rsid="00186435"/>
    </style:style>
    <style:style style:name="T61" style:family="text">
      <style:text-properties officeooo:rsid="0021c48a"/>
    </style:style>
    <style:style style:name="T62" style:family="text">
      <style:text-properties officeooo:rsid="00223bf0"/>
    </style:style>
    <style:style style:name="T63" style:family="text">
      <style:text-properties style:text-underline-style="solid" style:text-underline-width="auto" style:text-underline-color="font-color" officeooo:rsid="00223bf0"/>
    </style:style>
    <style:style style:name="T64" style:family="text">
      <style:text-properties style:text-underline-style="none" officeooo:rsid="00223bf0"/>
    </style:style>
    <style:style style:name="T65" style:family="text">
      <style:text-properties fo:font-style="normal" officeooo:rsid="0014d80e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font-style="normal" officeooo:rsid="0023e7f7" style:font-style-asian="normal" style:font-style-complex="normal"/>
    </style:style>
    <style:style style:name="T68" style:family="text">
      <style:text-properties fo:font-style="italic" officeooo:rsid="0023e7f7" style:font-style-asian="italic" style:font-style-complex="italic"/>
    </style:style>
    <style:style style:name="T69" style:family="text">
      <style:text-properties fo:font-style="italic" style:text-underline-style="none" style:font-style-asian="italic" style:font-style-complex="italic"/>
    </style:style>
    <style:style style:name="T7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1" style:family="text">
      <style:text-properties fo:font-size="10pt" style:text-underline-style="none" fo:font-weight="normal" officeooo:rsid="0007f9ae" style:font-size-asian="10pt" style:font-weight-asian="normal" style:font-size-complex="10pt" style:font-weight-complex="normal"/>
    </style:style>
    <style:style style:name="T72" style:family="text">
      <style:text-properties fo:font-size="10pt" fo:font-style="italic" style:text-underline-style="none" fo:font-weight="normal" officeooo:rsid="0026a191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fo:font-weight="normal" officeooo:rsid="0026a191" style:font-weight-asian="normal" style:font-weight-complex="normal"/>
    </style:style>
    <style:style style:name="T74" style:family="text">
      <style:text-properties fo:font-style="italic" fo:font-weight="normal" officeooo:rsid="0026a191" style:font-style-asian="italic" style:font-weight-asian="normal" style:font-style-complex="italic" style:font-weight-complex="normal"/>
    </style:style>
    <style:style style:name="T75" style:family="text">
      <style:text-properties fo:font-style="normal" fo:font-weight="normal" officeooo:rsid="0026a191" style:font-style-asian="normal" style:font-weight-asian="normal" style:font-style-complex="normal" style:font-weight-complex="normal"/>
    </style:style>
    <style:style style:name="T76" style:family="text">
      <style:text-properties style:use-window-font-color="true" loext:opacity="0%" officeooo:rsid="0003693d"/>
    </style:style>
    <style:style style:name="T77" style:family="text">
      <style:text-properties style:use-window-font-color="true" loext:opacity="0%" officeooo:rsid="00289099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i</text:p>
      <text:p text:style-name="P2">Pre-condizioni generali:</text:p>
      <text:list text:style-name="L1">
        <text:list-item>
          <text:p text:style-name="P3"><text:span text:style-name="T1">attore identificato come un’istanza</text:span><text:span text:style-name="T2"> Organizzatore </text:span><text:span text:style-name="T3">organizzatore.</text:span></text:p>
        </text:list-item>
      </text:list>
      <text:p text:style-name="P4"/>
      <text:p text:style-name="P4"/>
      <text:p text:style-name="P5"><text:span text:style-name="T4">1. </text:span><text:span text:style-name="T5">accettaCommessa(</text:span><text:span text:style-name="T6">nome</text:span><text:span text:style-name="T7">: testo, </text:span><text:span text:style-name="T6">cognome</text:span><text:span text:style-name="T7">: testo, </text:span><text:span text:style-name="T6">numTelefono</text:span><text:span text:style-name="T7">: testo, </text:span><text:span text:style-name="T6">data</text:span><text:span text:style-name="T7">: data, </text:span><text:span text:style-name="T6">luogo?</text:span><text:span text:style-name="T7">: testo, </text:span><text:span text:style-name="T6">numPartecipanti</text:span><text:span text:style-name="T7">: numero, </text:span><text:span text:style-name="T8">servizi</text:span><text:span text:style-name="T9">: testo</text:span><text:span text:style-name="T10">)</text:span></text:p>
      <text:p text:style-name="P6"/>
      <text:p text:style-name="P7">Pre-condizioni:</text:p>
      <text:p text:style-name="P8"/>
      <text:p text:style-name="P8">Post-condizioni:</text:p>
      <text:list text:style-name="L2">
        <text:list-item>
          <text:p text:style-name="P9">le condizioni di accettazione della commessa sono verificate.</text:p>
        </text:list-item>
        <text:list-item>
          <text:p text:style-name="P10"><text:span text:style-name="T11">[</text:span><text:span text:style-name="T12">se il cliente è nuovo</text:span><text:span text:style-name="T11">]</text:span><text:span text:style-name="T12"> è </text:span><text:span text:style-name="T11">stata</text:span><text:span text:style-name="T12"> creata una nuova istanza Cliente </text:span><text:span text:style-name="T13">cliente</text:span><text:span text:style-name="T14">.</text:span></text:p>
        </text:list-item>
        <text:list-item>
          <text:p text:style-name="P11"><text:span text:style-name="T15">è </text:span><text:span text:style-name="T16">stata</text:span><text:span text:style-name="T15"> creata una nuova istanza Commessa </text:span><text:span text:style-name="T17">commessa </text:span><text:span text:style-name="T18">con i dati forniti dal cliente</text:span><text:span text:style-name="T17">.</text:span></text:p>
        </text:list-item>
        <text:list-item>
          <text:p text:style-name="P10"><text:span text:style-name="T19">cliente</text:span><text:span text:style-name="T20"> </text:span><text:span text:style-name="T21">commissiona</text:span><text:span text:style-name="T12"> </text:span><text:span text:style-name="T11">c</text:span><text:span text:style-name="T14">ommessa.</text:span></text:p>
        </text:list-item>
        <text:list-item>
          <text:p text:style-name="P12">è <text:span text:style-name="T19">stata</text:span> creata una nuova istanza SchedaEvento <text:span text:style-name="T22">schedaEvento</text:span><text:span text:style-name="T23"> </text:span>con stato impostato a “In compilazione”.</text:p>
        </text:list-item>
        <text:list-item>
          <text:p text:style-name="P13">commessa <text:span text:style-name="T24">compila</text:span><text:span text:style-name="T25"> </text:span>SchedaEvento.</text:p>
        </text:list-item>
      </text:list>
      <text:p text:style-name="P14"/>
      <text:list text:style-name="L3">
        <text:list-header>
          <text:p text:style-name="P15"/>
        </text:list-header>
      </text:list>
      <text:p text:style-name="P5"><text:span text:style-name="T26">2. </text:span><text:span text:style-name="T27">compilaSchedaEvento(</text:span><text:span text:style-name="T28">)</text:span></text:p>
      <text:p text:style-name="P6"/>
      <text:p text:style-name="P7">Pre-condizioni:</text:p>
      <text:list text:style-name="L4">
        <text:list-item>
          <text:p text:style-name="P16">lo stato dell’evento è “In <text:span text:style-name="T29">compilazione</text:span>”.</text:p>
        </text:list-item>
      </text:list>
      <text:list xml:id="list3354576155" text:style-name="L5">
        <text:list-item>
          <text:p text:style-name="P17">esiste un’istanza <text:span text:style-name="T22">commessa</text:span><text:span text:style-name="T30">.</text:span></text:p>
        </text:list-item>
      </text:list>
      <text:p text:style-name="P8"/>
      <text:p text:style-name="P8">Post-condizioni:</text:p>
      <text:list text:style-name="L6">
        <text:list-item>
          <text:p text:style-name="P18">è <text:span text:style-name="T31">stata verificata la correttezza dei dati di </text:span><text:span text:style-name="T32">commessa.</text:span></text:p>
        </text:list-item>
        <text:list-item>
          <text:p text:style-name="P19">è <text:span text:style-name="T33">stata compilata la s</text:span><text:span text:style-name="T34">chedaEvento</text:span><text:span text:style-name="T33"> inserendo i dati d</text:span><text:span text:style-name="T31">i</text:span><text:span text:style-name="T33"> </text:span><text:span text:style-name="T34">commessa.</text:span></text:p>
        </text:list-item>
        <text:list-item>
          <text:p text:style-name="P20">sono stati compilati i vari servizi richiesti dal cliente nelle nuove istanze di Servizio <text:span text:style-name="T22">servizio1..servizioN.</text:span></text:p>
        </text:list-item>
        <text:list-item>
          <text:p text:style-name="P20">è <text:span text:style-name="T35">stato impostato lo stato dell’evento a “Scheda salvata”.</text:span></text:p>
        </text:list-item>
      </text:list>
      <text:p text:style-name="P21"/>
      <text:p text:style-name="P21"/>
      <text:p text:style-name="P22">3. assegnaChef(<text:span text:style-name="T36">chef</text:span><text:span text:style-name="T37">: Chef)</text:span></text:p>
      <text:p text:style-name="P6"/>
      <text:p text:style-name="P7">Pre-condizioni:</text:p>
      <text:list xml:id="list173845484208453" text:continue-list="list3354576155" text:style-name="L5">
        <text:list-item>
          <text:p text:style-name="P23">lo stato dell’evento è “<text:span text:style-name="T29">Scheda salvata</text:span>”.</text:p>
        </text:list-item>
        <text:list-item>
          <text:p text:style-name="P24">è <text:span text:style-name="T38">in corso la definizione di </text:span><text:span text:style-name="T39">schedaEvento.</text:span></text:p>
        </text:list-item>
        <text:list-item>
          <text:p text:style-name="P25">esiste l’istanza <text:span text:style-name="T22">chef.</text:span></text:p>
        </text:list-item>
      </text:list>
      <text:p text:style-name="P8"/>
      <text:p text:style-name="P8">Post-condizioni:</text:p>
      <text:list text:style-name="L7">
        <text:list-item>
          <text:p text:style-name="P26"><text:span text:style-name="T40">è stato </text:span><text:span text:style-name="T38">assegnato </text:span><text:span text:style-name="T41">chef</text:span><text:span text:style-name="T42"> a </text:span><text:span text:style-name="T41">schedaEvento.</text:span></text:p>
        </text:list-item>
        <text:list-item>
          <text:p text:style-name="P27">è stato impostato lo stato dell’evento a “Chef assegnato”.</text:p>
        </text:list-item>
      </text:list>
      <text:p text:style-name="P28"/>
      <text:p text:style-name="P28"/>
      <text:p text:style-name="P29"><text:span text:style-name="T43">4. </text:span><text:span text:style-name="T25">prenotaPersonale(</text:span><text:span text:style-name="T44">insieme P di </text:span><text:span text:style-name="T45">P</text:span><text:span text:style-name="T44">ersonale</text:span><text:span text:style-name="T25">)</text:span></text:p>
      <text:p text:style-name="P6"/>
      <text:p text:style-name="P7">Pre-condizioni:</text:p>
      <text:list xml:id="list173846268735244" text:continue-list="list173845484208453" text:style-name="L5">
        <text:list-item>
          <text:p text:style-name="P23">lo stato dell’evento è “In corso” <text:span text:style-name="T46">oppure “Chef assegnato”</text:span>.</text:p>
        </text:list-item>
        <text:list-item>
          <text:p text:style-name="P30">esistono tutte le istanze<text:span text:style-name="T22"> personale </text:span>dell’insieme P.</text:p>
        </text:list-item>
      </text:list>
      <text:p text:style-name="P8"/>
      <text:p text:style-name="P8">Post-condizioni:</text:p>
      <text:list xml:id="list2126694322" text:style-name="L8">
        <text:list-item>
          <text:p text:style-name="P31"><text:span text:style-name="T15">è</text:span><text:span text:style-name="T47"> stata verificata la disponibilità di ciascun </text:span><text:span text:style-name="T48">personale</text:span><text:span text:style-name="T49">.</text:span></text:p>
        </text:list-item>
        <text:list-item>
          <text:p text:style-name="P32">il <text:span text:style-name="T22">personale</text:span> coinvolto è stato riservato preventivamente.</text:p>
        </text:list-item>
        <text:list-item>
          <text:p text:style-name="P32">è <text:span text:style-name="T50">stato impostato lo stato del </text:span><text:span text:style-name="T51">personale </text:span><text:span text:style-name="T50">coinvolto a “prenotato”.</text:span></text:p>
        </text:list-item>
        <text:list-item>
          <text:p text:style-name="P32">è stato impostato lo stato dell’evento a “Personale prenotato”.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5. approvaMenu(<text:span text:style-name="T36">menu</text:span><text:span text:style-name="T37">: Menu, </text:span><text:span text:style-name="T52">servizio</text:span><text:span text:style-name="T53">: Servizio</text:span><text:span text:style-name="T37">)</text:span></text:p>
      <text:p text:style-name="P6"/>
      <text:p text:style-name="P7">Pre-condizioni:</text:p>
      <text:list text:style-name="L9">
        <text:list-item>
          <text:p text:style-name="P35"><text:span text:style-name="T54">lo stato dell’evento è “</text:span><text:span text:style-name="T55">Personale prenotato</text:span><text:span text:style-name="T54">”.</text:span></text:p>
        </text:list-item>
      </text:list>
      <text:list xml:id="list173845255683205" text:continue-list="list173846268735244" text:style-name="L5">
        <text:list-item>
          <text:p text:style-name="P36">esiste un’istanza Menu <text:span text:style-name="T22">menu </text:span>creata da <text:span text:style-name="T22">chef.</text:span></text:p>
        </text:list-item>
        <text:list-item>
          <text:p text:style-name="P37">esiste l’istanza servizio.</text:p>
        </text:list-item>
      </text:list>
      <text:p text:style-name="P8"/>
      <text:p text:style-name="P8">Post-condizioni:</text:p>
      <text:list text:style-name="L10">
        <text:list-item>
          <text:p text:style-name="P38"><text:span text:style-name="T15">è </text:span><text:span text:style-name="T56">stato approvato il </text:span><text:span text:style-name="T57">menu.</text:span></text:p>
        </text:list-item>
        <text:list-item>
          <text:p text:style-name="P39">menu <text:span text:style-name="T30">è </text:span><text:span text:style-name="T24">in uso in</text:span><text:span text:style-name="T30"> </text:span>servizio.</text:p>
        </text:list-item>
        <text:list-item>
          <text:p text:style-name="P40">è stato impostato lo stato dell’evento a “Evento in corso”.</text:p>
        </text:list-item>
      </text:list>
      <text:p text:style-name="P41"/>
      <text:p text:style-name="P41"/>
      <text:p text:style-name="P41">6. assegnaPersonale(<text:span text:style-name="T58">insieme P di </text:span><text:span text:style-name="T59">P</text:span><text:span text:style-name="T58">ersonale</text:span><text:span text:style-name="T60">, </text:span><text:span text:style-name="T36">servizio</text:span><text:span text:style-name="T37">: Servizio</text:span>)</text:p>
      <text:p text:style-name="P6"/>
      <text:p text:style-name="P7">Pre-condizioni:</text:p>
      <text:list xml:id="list173847280640895" text:continue-list="list173845255683205" text:style-name="L5">
        <text:list-item>
          <text:p text:style-name="P23">lo stato dell’evento è “In corso”.</text:p>
        </text:list-item>
        <text:list-item>
          <text:p text:style-name="P30">esistono tutte le istanze<text:span text:style-name="T22"> personale </text:span>dell’insieme P.</text:p>
        </text:list-item>
        <text:list-item>
          <text:p text:style-name="P37">esiste l’istanza <text:span text:style-name="T22">servizio.</text:span></text:p>
        </text:list-item>
      </text:list>
      <text:p text:style-name="P8"/>
      <text:p text:style-name="P8">Post-condizioni:</text:p>
      <text:list text:continue-list="list2126694322" text:style-name="L8">
        <text:list-item>
          <text:p text:style-name="P31"><text:span text:style-name="T15">è</text:span><text:span text:style-name="T47"> stata verificata la disponibilità di ciascun </text:span><text:span text:style-name="T48">personale</text:span><text:span text:style-name="T49">.</text:span></text:p>
        </text:list-item>
        <text:list-item>
          <text:p text:style-name="P42">[se c’è <text:span text:style-name="T22">personale</text:span> in eccesso] è stato liberato il <text:span text:style-name="T22">personale</text:span> in eccesso.</text:p>
        </text:list-item>
      </text:list>
      <text:list text:style-name="L11">
        <text:list-item>
          <text:p text:style-name="P43">è <text:span text:style-name="T50">stato impostato lo stato </text:span><text:span text:style-name="T61">di ciascun</text:span><text:span text:style-name="T50"> </text:span><text:span text:style-name="T51">personale </text:span><text:span text:style-name="T50">coinvolto a “assegnato”.</text:span></text:p>
        </text:list-item>
        <text:list-item>
          <text:p text:style-name="P44">personale <text:span text:style-name="T24">lavora</text:span><text:span text:style-name="T30"> </text:span><text:span text:style-name="T24">per</text:span><text:span text:style-name="T30"> </text:span>servizio.</text:p>
        </text:list-item>
      </text:list>
      <text:p text:style-name="P33"/>
      <text:p text:style-name="P33"/>
      <text:p text:style-name="P45">7. <text:span text:style-name="T62">preparaLocation(</text:span><text:span text:style-name="T63">luogo</text:span><text:span text:style-name="T64">: testo, </text:span><text:span text:style-name="T63">servizio</text:span><text:span text:style-name="T64">: Servizio)</text:span></text:p>
      <text:p text:style-name="P6"/>
      <text:p text:style-name="P7">Pre-condizioni:</text:p>
      <text:list xml:id="list173846491022471" text:continue-list="list173847280640895" text:style-name="L5">
        <text:list-item>
          <text:p text:style-name="P23">lo stato dell’evento è “In corso”.</text:p>
        </text:list-item>
        <text:list-item>
          <text:p text:style-name="P37"><text:span text:style-name="T65">esiste l’istanza </text:span><text:span text:style-name="T39">servizio.</text:span></text:p>
        </text:list-item>
        <text:list-item>
          <text:p text:style-name="P46"><text:span text:style-name="T66">luogo</text:span><text:span text:style-name="T30"> è valido</text:span></text:p>
        </text:list-item>
      </text:list>
      <text:p text:style-name="P8"/>
      <text:p text:style-name="P8">Post-condizioni:</text:p>
      <text:list text:style-name="L12">
        <text:list-item>
          <text:p text:style-name="P47"><text:span text:style-name="T30">è </text:span><text:span text:style-name="T67">stata creata un’istanza Location</text:span><text:span text:style-name="T68"> location.</text:span></text:p>
        </text:list-item>
        <text:list-item>
          <text:p text:style-name="P48"><text:span text:style-name="T22">location.luogo</text:span> = <text:span text:style-name="T36">luogo</text:span>.</text:p>
        </text:list-item>
        <text:list-item>
          <text:p text:style-name="P49"><text:span text:style-name="T69">servizio </text:span><text:span text:style-name="T70">si svolge in</text:span><text:span text:style-name="T69"> location.</text:span></text:p>
        </text:list-item>
      </text:list>
      <text:p text:style-name="P50"/>
      <text:p text:style-name="P33"/>
      <text:p text:style-name="P51">8. appuntaEventoEMenu()</text:p>
      <text:p text:style-name="P6"/>
      <text:p text:style-name="P7">Pre-condizioni:</text:p>
      <text:list xml:id="list173845787481081" text:continue-list="list173846491022471" text:style-name="L5">
        <text:list-item>
          <text:p text:style-name="P23">lo stato dell’evento è “In corso”.</text:p>
        </text:list-item>
      </text:list>
      <text:p text:style-name="P8"/>
      <text:p text:style-name="P8">Post-condizioni:</text:p>
      <text:list text:style-name="L13">
        <text:list-item>
          <text:p text:style-name="P52"><text:span text:style-name="T71">è </text:span><text:span text:style-name="T54">stata creata l’istanza Note </text:span><text:span text:style-name="T72">note.</text:span></text:p>
        </text:list-item>
      </text:list>
      <text:list text:style-name="L14">
        <text:list-item>
          <text:p text:style-name="P53"><text:span text:style-name="T15">è </text:span><text:span text:style-name="T73">stato salvato </text:span><text:span text:style-name="T74">evento</text:span><text:span text:style-name="T75"> e tutti i </text:span><text:span text:style-name="T74">menu</text:span><text:span text:style-name="T75"> all’iterno di </text:span><text:span text:style-name="T74">note.</text:span></text:p>
        </text:list-item>
      </text:list>
      <text:p text:style-name="P54"/>
      <text:p text:style-name="P54"/>
      <text:p text:style-name="P55">9. terminaEvento()</text:p>
      <text:p text:style-name="P6"/>
      <text:p text:style-name="P7">Pre-condizioni:</text:p>
      <text:list text:continue-list="list173845787481081" text:style-name="L5">
        <text:list-item>
          <text:p text:style-name="P23">lo stato dell’evento è “In corso”.</text:p>
        </text:list-item>
      </text:list>
      <text:p text:style-name="P8"/>
      <text:p text:style-name="P8">Post-condizioni:</text:p>
      <text:list text:style-name="L15">
        <text:list-item>
          <text:p text:style-name="P56"><text:span text:style-name="T76">è stato impostato lo stato dell’evento a “</text:span><text:span text:style-name="T77">Evento chiuso</text:span><text:span text:style-name="T76">”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34:56.423416967</meta:creation-date>
    <dc:date>2026-07-21T17:38:45.118106050</dc:date>
    <meta:editing-duration>PT2H18M31S</meta:editing-duration>
    <meta:editing-cycles>38</meta:editing-cycles>
    <meta:generator>LibreOffice/26.2.4.2$Linux_X86_64 LibreOffice_project/620$Build-2</meta:generator>
    <meta:document-statistic meta:table-count="0" meta:image-count="0" meta:object-count="0" meta:page-count="2" meta:paragraph-count="77" meta:word-count="461" meta:character-count="3088" meta:non-whitespace-character-count="2752"/>
  </office:meta>
</office:document-meta>
</file>